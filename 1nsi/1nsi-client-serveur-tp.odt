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40000015DD7886246.png" manifest:media-type="image/png"/>
  <manifest:file-entry manifest:full-path="Pictures/100000010000077B0000017EC52849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</office:font-face-decls>
  <office:automatic-styles>
    <style:style style:name="P1" style:family="paragraph" style:parent-style-name="tfTitre_20_Chapitre">
      <style:text-properties fo:font-size="23pt" officeooo:rsid="01435e49" officeooo:paragraph-rsid="01435e49" style:font-size-asian="23pt" style:font-size-complex="23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loext:graphic-properties draw:fill-hatch-name="hatch"/>
      <style:paragraph-properties fo:margin-top="0.199cm" fo:margin-bottom="0.199cm" style:contextual-spacing="false" fo:line-height="115%"/>
    </style:style>
    <style:style style:name="P4" style:family="paragraph" style:parent-style-name="Standard">
      <loext:graphic-properties draw:fill-hatch-name="hatch"/>
      <style:paragraph-properties fo:margin-top="0.199cm" fo:margin-bottom="0.199cm" style:contextual-spacing="false" fo:line-height="115%" fo:text-align="center" style:justify-single-word="false"/>
    </style:style>
    <style:style style:name="P5" style:family="paragraph" style:parent-style-name="Text_20_body">
      <style:text-properties officeooo:rsid="014dd91e" officeooo:paragraph-rsid="014dd91e"/>
    </style:style>
    <style:style style:name="P6" style:family="paragraph" style:parent-style-name="Text_20_body">
      <style:text-properties officeooo:rsid="01545389" officeooo:paragraph-rsid="0154b157"/>
    </style:style>
    <style:style style:name="P7" style:family="paragraph" style:parent-style-name="Standard" style:list-style-name="tfNum_20_1_29_">
      <style:paragraph-properties fo:line-height="115%"/>
    </style:style>
    <style:style style:name="P8" style:family="paragraph" style:parent-style-name="Standard" style:list-style-name="tfPuce" style:master-page-name="">
      <loext:graphic-properties draw:fill="none"/>
      <style:paragraph-properties fo:margin-left="1.199cm" fo:margin-right="0cm" fo:line-height="115%" fo:text-indent="-0.499cm" style:auto-text-indent="false" style:page-number="auto" fo:background-color="transparent"/>
      <style:text-properties officeooo:paragraph-rsid="014a227a"/>
    </style:style>
    <style:style style:name="P9" style:family="paragraph" style:parent-style-name="Standard" style:list-style-name="tfPuce">
      <loext:graphic-properties draw:fill="none"/>
      <style:paragraph-properties fo:margin-left="1.199cm" fo:margin-right="0cm" fo:line-height="115%" fo:text-indent="-0.499cm" style:auto-text-indent="false" fo:background-color="transparent"/>
    </style:style>
    <style:style style:name="P10" style:family="paragraph" style:parent-style-name="Standard" style:list-style-name="tfNum_20_1_29_">
      <style:paragraph-properties fo:line-height="115%"/>
      <style:text-properties officeooo:rsid="014a227a" officeooo:paragraph-rsid="014a227a"/>
    </style:style>
    <style:style style:name="P11" style:family="paragraph" style:parent-style-name="Standard" style:list-style-name="tfPuce">
      <style:paragraph-properties fo:line-height="115%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 style:list-style-name="tfNum_20_1_29_">
      <loext:graphic-properties draw:fill-hatch-name="hatch"/>
      <style:paragraph-properties fo:margin-top="0cm" fo:margin-bottom="0cm" style:contextual-spacing="false" fo:line-height="115%"/>
      <style:text-properties officeooo:paragraph-rsid="01545389"/>
    </style:style>
    <style:style style:name="P13" style:family="paragraph" style:parent-style-name="Text_20_body" style:list-style-name="tfNum_20_1_29_">
      <loext:graphic-properties draw:fill-hatch-name="hatch"/>
      <style:paragraph-properties fo:margin-top="0cm" fo:margin-bottom="0cm" style:contextual-spacing="false" fo:line-height="115%"/>
      <style:text-properties officeooo:paragraph-rsid="014cca1f"/>
    </style:style>
    <style:style style:name="P14" style:family="paragraph" style:parent-style-name="Text_20_body" style:list-style-name="tfNum_20_1_29_">
      <loext:graphic-properties draw:fill-hatch-name="hatch"/>
      <style:paragraph-properties fo:margin-top="0cm" fo:margin-bottom="0cm" style:contextual-spacing="false" fo:line-height="115%"/>
    </style:style>
    <style:style style:name="P15" style:family="paragraph" style:parent-style-name="Text_20_body" style:list-style-name="tfNum_20_1_29_" style:master-page-name="">
      <loext:graphic-properties draw:fill="none" draw:fill-hatch-name="hatch"/>
      <style:paragraph-properties fo:margin-top="0cm" fo:margin-bottom="0cm" style:contextual-spacing="false" fo:line-height="115%" style:page-number="auto" fo:background-color="transparent"/>
    </style:style>
    <style:style style:name="P16" style:family="paragraph" style:parent-style-name="Text_20_body" style:list-style-name="tfPuce" style:master-page-name="">
      <loext:graphic-properties draw:fill="none" draw:fill-hatch-name="hatch"/>
      <style:paragraph-properties fo:margin-left="1.199cm" fo:margin-right="0cm" fo:margin-top="0cm" fo:margin-bottom="0cm" style:contextual-spacing="false" fo:line-height="115%" fo:text-indent="-0.499cm" style:auto-text-indent="false" style:page-number="auto" fo:background-color="transparent"/>
      <style:text-properties officeooo:paragraph-rsid="014cca1f"/>
    </style:style>
    <style:style style:name="P17" style:family="paragraph" style:parent-style-name="Text_20_body" style:list-style-name="tfPuce">
      <loext:graphic-properties draw:fill="none" draw:fill-hatch-name="hatch"/>
      <style:paragraph-properties fo:margin-left="1.199cm" fo:margin-right="0cm" fo:margin-top="0cm" fo:margin-bottom="0cm" style:contextual-spacing="false" fo:line-height="115%" fo:text-indent="-0.499cm" style:auto-text-indent="false" fo:background-color="transparent"/>
    </style:style>
    <style:style style:name="P18" style:family="paragraph" style:parent-style-name="Text_20_body" style:list-style-name="tfPuce" style:master-page-name="">
      <loext:graphic-properties draw:fill="none" draw:fill-hatch-name="hatch"/>
      <style:paragraph-properties fo:margin-left="1.199cm" fo:margin-right="0cm" fo:margin-top="0cm" fo:margin-bottom="0cm" style:contextual-spacing="false" fo:line-height="115%" fo:text-indent="-0.499cm" style:auto-text-indent="false" style:page-number="auto" fo:background-color="transparent"/>
      <style:text-properties officeooo:paragraph-rsid="0153f06c"/>
    </style:style>
    <style:style style:name="P19" style:family="paragraph" style:parent-style-name="Text_20_body" style:list-style-name="tfPuce">
      <loext:graphic-properties draw:fill="none" draw:fill-hatch-name="hatch"/>
      <style:paragraph-properties fo:margin-left="1.199cm" fo:margin-right="0cm" fo:margin-top="0cm" fo:margin-bottom="0cm" style:contextual-spacing="false" fo:line-height="115%" fo:text-indent="-0.499cm" style:auto-text-indent="false" fo:background-color="transparent"/>
      <style:text-properties officeooo:rsid="0153f06c" officeooo:paragraph-rsid="0153f06c"/>
    </style:style>
    <style:style style:name="P20" style:family="paragraph" style:parent-style-name="Text_20_body" style:list-style-name="tfPuce">
      <style:paragraph-properties fo:line-height="115%"/>
      <style:text-properties style:font-name="Courier New" fo:font-size="10pt" fo:font-weight="bold" officeooo:paragraph-rsid="0156df47" style:font-size-asian="10pt" style:font-weight-asian="bold" style:font-size-complex="10pt" style:font-weight-complex="bold"/>
    </style:style>
    <style:style style:name="P21" style:family="paragraph" style:parent-style-name="Text_20_body" style:list-style-name="tfNum_20_1_29_">
      <loext:graphic-properties draw:fill-hatch-name="hatch"/>
      <style:paragraph-properties fo:margin-top="0cm" fo:margin-bottom="0cm" style:contextual-spacing="false" fo:line-height="115%"/>
      <style:text-properties officeooo:rsid="0154b157" officeooo:paragraph-rsid="0154b157"/>
    </style:style>
    <style:style style:name="P22" style:family="paragraph" style:parent-style-name="Text_20_body" style:list-style-name="tfNum_20_1_29_">
      <loext:graphic-properties draw:fill-hatch-name="hatch"/>
      <style:paragraph-properties fo:margin-top="0cm" fo:margin-bottom="0cm" style:contextual-spacing="false" fo:line-height="115%"/>
      <style:text-properties style:font-name="Arial3" officeooo:rsid="0154b157" officeooo:paragraph-rsid="0154b157" style:font-size-asian="10.5pt"/>
    </style:style>
    <style:style style:name="P23" style:family="paragraph" style:parent-style-name="tfTitre_20_1_29_" style:list-style-name=""/>
    <style:style style:name="P24" style:family="paragraph" style:parent-style-name="tfTitre_20_I_29_">
      <style:paragraph-properties fo:break-before="page"/>
    </style:style>
    <style:style style:name="T1" style:family="text">
      <style:text-properties style:font-name="Arial3" style:font-size-asian="10.5pt"/>
    </style:style>
    <style:style style:name="T2" style:family="text">
      <style:text-properties style:font-name="Arial3" officeooo:rsid="014dc3e5" style:font-size-asian="10.5pt"/>
    </style:style>
    <style:style style:name="T3" style:family="text">
      <style:text-properties style:font-name="Arial3" officeooo:rsid="014dd91e" style:font-size-asian="10.5pt"/>
    </style:style>
    <style:style style:name="T4" style:family="text">
      <style:text-properties style:font-name="Arial3" officeooo:rsid="01545389" style:font-size-asian="10.5pt"/>
    </style:style>
    <style:style style:name="T5" style:family="text">
      <style:text-properties style:font-name="Arial3" officeooo:rsid="0154b157" style:font-size-asian="10.5pt"/>
    </style:style>
    <style:style style:name="T6" style:family="text">
      <style:text-properties style:font-name="Arial3" fo:font-weight="bold" officeooo:rsid="0153f06c" style:font-size-asian="10.5pt" style:font-weight-asian="bold" style:font-weight-complex="bold"/>
    </style:style>
    <style:style style:name="T7" style:family="text">
      <style:text-properties style:font-name="Arial3" fo:font-weight="bold" officeooo:rsid="014dc3e5" style:font-size-asian="10.5pt" style:font-weight-asian="bold" style:font-weight-complex="bold"/>
    </style:style>
    <style:style style:name="T8" style:family="text">
      <style:text-properties style:font-name="Arial3" fo:font-weight="bold" officeooo:rsid="01490894" style:font-weight-asian="bold" style:font-weight-complex="bold"/>
    </style:style>
    <style:style style:name="T9" style:family="text">
      <style:text-properties style:font-name="Arial3" fo:font-weight="bold" officeooo:rsid="01531b80" style:font-weight-asian="bold" style:font-weight-complex="bold"/>
    </style:style>
    <style:style style:name="T10" style:family="text">
      <style:text-properties style:font-name="Arial3" officeooo:rsid="01490894"/>
    </style:style>
    <style:style style:name="T11" style:family="text">
      <style:text-properties style:font-name="Arial3" officeooo:rsid="01531b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style:font-name="Arial2" fo:font-size="18pt" fo:font-style="italic" fo:font-weight="bold" officeooo:rsid="014cca1f" style:font-size-asian="20pt" style:font-weight-asian="bold" style:font-size-complex="20pt" style:font-weight-complex="bold"/>
    </style:style>
    <style:style style:name="T14" style:family="text">
      <style:text-properties officeooo:rsid="0143fbd4"/>
    </style:style>
    <style:style style:name="T15" style:family="text">
      <style:text-properties officeooo:rsid="01490894"/>
    </style:style>
    <style:style style:name="T16" style:family="text">
      <style:text-properties officeooo:rsid="014c7704"/>
    </style:style>
    <style:style style:name="T17" style:family="text">
      <style:text-properties officeooo:rsid="014cca1f"/>
    </style:style>
    <style:style style:name="T18" style:family="text">
      <style:text-properties officeooo:rsid="014dc3e5"/>
    </style:style>
    <style:style style:name="T19" style:family="text">
      <style:text-properties officeooo:rsid="014dd91e"/>
    </style:style>
    <style:style style:name="T20" style:family="text">
      <style:text-properties officeooo:rsid="0151c1ac"/>
    </style:style>
    <style:style style:name="T21" style:family="text">
      <style:text-properties officeooo:rsid="01531b80"/>
    </style:style>
    <style:style style:name="T22" style:family="text">
      <style:text-properties officeooo:rsid="0153f06c"/>
    </style:style>
    <style:style style:name="T23" style:family="text">
      <style:text-properties officeooo:rsid="01545389"/>
    </style:style>
    <style:style style:name="T24" style:family="text">
      <style:text-properties officeooo:rsid="0154b157"/>
    </style:style>
    <style:style style:name="T25" style:family="text">
      <style:text-properties officeooo:rsid="0156df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êtes HTTP</text:p>
      <text:list xml:id="list2268131645" text:style-name="tfNum_20_I_29_">
        <text:list-item>
          <text:p text:style-name="tfTitre_20_I_29_">Succession des requêtes pour afficher une page web :</text:p>
        </text:list-item>
      </text:list>
      <text:list text:style-name="tfNum_20_1_29_">
        <text:list-item>
          <text:p text:style-name="P7"><text:span text:style-name="T14">Sur votre navigateur, </text:span><text:span text:style-name="T20">a</text:span>fficher la page « Travailler efficacement en NSI ».</text:p>
        </text:list-item>
        <text:list-item>
          <text:p text:style-name="P7">Afficher le code source de cette page <text:span text:style-name="T20">sur un nouvel onglet </text:span>et, en lisant ce code source, <text:span text:style-name="T20">not</text:span>er les fichiers supplémentaires dont le navigateur va avoir besoin pour afficher la page.</text:p>
        </text:list-item>
        <text:list-item>
          <text:p text:style-name="P7">Appuyer sur l<text:span text:style-name="T25">es</text:span> touche<text:span text:style-name="T25">s</text:span> <text:span text:style-name="T25">Ctrl+Maj+I</text:span> <text:span text:style-name="T14">du clavier </text:span>pour visualiser les outils de développement du navigateur, <text:span text:style-name="T14">s</text:span>électionner l'onglet « <text:span text:style-name="T14">R</text:span>éseau » et cocher « Désactiver le cache ».</text:p>
        </text:list-item>
      </text:list>
      <text:p text:style-name="P3"><draw:frame draw:style-name="fr2" draw:name="Image1" text:anchor-type="as-char" svg:width="19.001cm" svg:height="3.789cm" draw:z-index="0"><draw:image xlink:href="Pictures/100000010000077B0000017EC52849BC.png" xlink:type="simple" xlink:show="embed" xlink:actuate="onLoad" draw:mime-type="image/png"/></draw:frame></text:p>
      <text:list text:continue-numbering="true" text:style-name="tfNum_20_1_29_">
        <text:list-item>
          <text:p text:style-name="P7">Rafraîchir la page web et observer la succession des requêtes.<text:line-break/><text:span text:style-name="T15">Distinguer la requ</text:span><text:span text:style-name="T10">ête</text:span> de départ <text:span text:style-name="T15">de celles </text:span>dont le navigateur a eu l'initiative.<text:line-break/><text:span text:style-name="T14">Comparer la liste de</text:span><text:span text:style-name="T15">s</text:span><text:span text:style-name="T14"> fichiers reçus avec votre réponse à la question 2.<text:line-break/></text:span><text:span text:style-name="T15">Ces fichiers s</text:span>ont-<text:span text:style-name="T15">il</text:span>s dans un ordre logique ?</text:p>
        </text:list-item>
        <text:list-item>
          <text:p text:style-name="P7"><text:span text:style-name="T21">En cliquant </text:span>sur les noms des différents fichiers reçus par le navigateur, <text:span text:style-name="T21">on peut visualiser un certain nombre d’informations sur les requêtes</text:span><text:span text:style-name="T11"> faites par le client et sur les réponses du serveur.<text:line-break/></text:span><text:span text:style-name="T21">Bien afficher</text:span><text:span text:style-name="T15"> </text:span><text:span text:style-name="T21">tous </text:span><text:span text:style-name="T15">les en-t</text:span><text:span text:style-name="T10">êtes en mode </text:span><text:span text:style-name="T9">B</text:span><text:span text:style-name="T8">rut</text:span><text:span text:style-name="T10">.</text:span></text:p>
        </text:list-item>
      </text:list>
      <text:p text:style-name="P4"><draw:frame draw:style-name="fr1" draw:name="Image2" text:anchor-type="as-char" svg:width="11.012cm" svg:height="4.196cm" draw:z-index="1"><draw:image xlink:href="Pictures/10000001000003940000015DD7886246.png" xlink:type="simple" xlink:show="embed" xlink:actuate="onLoad" draw:mime-type="image/png"/></draw:frame></text:p>
      <text:list xml:id="list163219162273554" text:continue-numbering="true" text:style-name="tfNum_20_1_29_">
        <text:list-item>
          <text:p text:style-name="P10">Pour chacun de ces fichiers :</text:p>
        </text:list-item>
      </text:list>
      <text:list xml:id="list949366510" text:style-name="tfPuce">
        <text:list-item>
          <text:p text:style-name="P8">Dans <text:span text:style-name="T12">l'en-tête de la requête</text:span>, observer particulièrement la première ligne puis Host et User-Agent.</text:p>
        </text:list-item>
        <text:list-item>
          <text:p text:style-name="P9">Dans <text:span text:style-name="T12">l'en-tête de la réponse</text:span>, observer particulièrement la première ligne puis Date, Server, Content-Length et Content-Type</text:p>
        </text:list-item>
        <text:list-item>
          <text:p text:style-name="P9">Observer aussi le <text:span text:style-name="T12">corps de la réponse</text:span> dans les onglets Aperçu et Réponse.</text:p>
        </text:list-item>
        <text:list-item>
          <text:p text:style-name="P9">Observer enfin la chronologie de la requête et de sa réponse dans l'onglet Délai.</text:p>
        </text:list-item>
      </text:list>
      <text:p text:style-name="Text_20_body"/>
      <text:list text:continue-list="list2268131645" text:style-name="tfNum_20_I_29_">
        <text:list-item>
          <text:p text:style-name="P24"><text:span text:style-name="T22">Différence entre</text:span><text:span text:style-name="T13"> GET et POST</text:span></text:p>
        </text:list-item>
      </text:list>
      <text:p text:style-name="P23">Avec les outils de développement du navigateur :</text:p>
      <text:list xml:id="list163219114138028" text:continue-list="list163219162273554" text:style-name="tfNum_20_1_29_">
        <text:list-item>
          <text:list>
            <text:list-item>
              <text:p text:style-name="P12">Afficher sur votre navigateur la page « Exemple de Formulaire HTML », puis a<text:span text:style-name="T23">fficher à nouveau l’onglet réseau</text:span> <text:span text:style-name="T23">d</text:span>es outils de développement.</text:p>
            </text:list-item>
            <text:list-item>
              <text:p text:style-name="P13">R<text:span text:style-name="T17">emplir le</text:span> formulaire 1 (méthode GET) et valider :</text:p>
            </text:list-item>
          </text:list>
        </text:list-item>
      </text:list>
      <text:list xml:id="list163218308920451" text:continue-list="list949366510" text:style-name="tfPuce">
        <text:list-item>
          <text:p text:style-name="P16"><text:span text:style-name="T18">En étudiant l’en-t</text:span><text:span text:style-name="T2">ête de la requête envoyée par le client (affichage </text:span><text:span text:style-name="T6">B</text:span><text:span text:style-name="T7">rut</text:span><text:span text:style-name="T2">), repérer comment les </text:span><text:span text:style-name="T3">réponses de l’internaute</text:span> <text:span text:style-name="T18">ont été transmises au serveur.</text:span></text:p>
        </text:list-item>
        <text:list-item>
          <text:p text:style-name="P19">Observez l’adresse URL qui est affichée dans la barre d’adresse du navigateur. Faites le lien avec <text:span text:style-name="T18">l’en-t</text:span><text:span text:style-name="T2">ête de la requête.</text:span></text:p>
        </text:list-item>
        <text:list-item>
          <text:p text:style-name="P17">En déduire une façon d'afficher directement la même page <text:span text:style-name="T16">de </text:span>réponse sans passer par le formulaire de départ.</text:p>
        </text:list-item>
      </text:list>
      <text:list xml:id="list163217745270362" text:continue-list="list163219114138028" text:style-name="tfNum_20_1_29_">
        <text:list-item>
          <text:list>
            <text:list-item>
              <text:p text:style-name="P14">Re<text:span text:style-name="T18">mplir le</text:span> formulaire 2 (méthode POST) et valider :</text:p>
            </text:list-item>
          </text:list>
        </text:list-item>
      </text:list>
      <text:list xml:id="list163217729049776" text:continue-list="list163218308920451" text:style-name="tfPuce">
        <text:list-item>
          <text:p text:style-name="P18"><text:span text:style-name="T19">Les réponses de l’internaute sont-elles encore visibles dans</text:span><text:span text:style-name="T18"> l’en-t</text:span><text:span text:style-name="T2">ête de la requête envoyée par le client (affichage </text:span><text:span text:style-name="T6">B</text:span><text:span text:style-name="T7">rut</text:span><text:span text:style-name="T2">) ?</text:span></text:p>
        </text:list-item>
        <text:list-item>
          <text:p text:style-name="P19"><text:span text:style-name="T2">Observez l’adresse URL qui est affichée dans la barre d’adresse du navigateur. </text:span><text:span text:style-name="T1">Y a-t-il un changement dans cette URL depuis que l’on a validé le formulaire ?</text:span></text:p>
        </text:list-item>
      </text:list>
      <text:list xml:id="list163218367012982" text:continue-list="list163217745270362" text:style-name="tfNum_20_1_29_">
        <text:list-item>
          <text:list>
            <text:list-item>
              <text:p text:style-name="P15">Observer le code source de la réponse <text:span text:style-name="T22">(méthode GET ou POST)</text:span>. Ce code a été généré par un script PHP exécuté sur le serveur. Peut-on retrouver le code PHP <text:span text:style-name="T22">en question </text:span>dans la réponse envoyée par le serveur ?</text:p>
            </text:list-item>
          </text:list>
        </text:list-item>
      </text:list>
      <text:p text:style-name="Text_20_body"/>
      <text:p text:style-name="P23">Avec la commande HTTPie</text:p>
      <text:p text:style-name="P5">On a vu ci-dessus qu’<text:span text:style-name="T24">avec</text:span> la méthode POST, <text:span text:style-name="T23">les réponses de l’internaute n’étaient pas visibles dans l’URL, ni m</text:span><text:span text:style-name="T4">ême dans l’en-tête de la requête. Comment ces réponses parviennent-elles alors au serveur ?</text:span></text:p>
      <text:p text:style-name="P6"><text:span text:style-name="T1">Pour le savoir, nous allons utiliser la commande HTTPie qui permet de lancer </text:span><text:span text:style-name="T5">des requêtes </text:span><text:span text:style-name="T1">en ligne de commande et de </text:span><text:span text:style-name="T5">les </text:span><text:span text:style-name="T1">visualiser </text:span><text:span text:style-name="T5">dans leur intégralité : </text:span><text:span text:style-name="T1">en-tête </text:span><text:span text:style-name="T5">+</text:span><text:span text:style-name="T1"> corps.</text:span></text:p>
      <text:p text:style-name="P2">Ouvrir le terminal et comparer les résultats des deux commandes ci-dessous :</text:p>
      <text:list text:continue-list="list163217729049776" text:style-name="tfPuce">
        <text:list-item>
          <text:p text:style-name="P11">http -v -f <text:span text:style-name="T25">fdcsjh</text:span>.free.fr/1nsi/1nsi-client-serveur-reponse.php nom==<text:span text:style-name="T23">T</text:span>oto nsi==Yes</text:p>
        </text:list-item>
        <text:list-item>
          <text:p text:style-name="P20">http -v -f <text:span text:style-name="T25">fdcsjh</text:span>.free.fr/1nsi/1nsi-client-serveur-reponse.php nom=<text:span text:style-name="T23">T</text:span>oto nsi=Yes</text:p>
        </text:list-item>
      </text:list>
      <text:list text:continue-list="list163218367012982" text:style-name="tfNum_20_1_29_">
        <text:list-item>
          <text:list>
            <text:list-item text:start-value="1">
              <text:p text:style-name="P21">Quelle différence y a-t-il entre ces deux commandes ?</text:p>
            </text:list-item>
            <text:list-item>
              <text:p text:style-name="P21">Laquelle correspond à une requ<text:span text:style-name="T1">ête avec GET ? Et laquelle avec POST ?</text:span></text:p>
            </text:list-item>
            <text:list-item>
              <text:p text:style-name="P22">Observer attentivement la requête POST. Où voit-on les valeurs entrées par l’internaute ?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</office:font-face-decls>
  <office:styles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3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Requête_20_HTTP" style:display-name="Requête HTTP" style:family="paragraph" style:parent-style-name="Standard">
      <loext:graphic-properties draw:fill="solid" draw:fill-color="#eeeeee"/>
      <style:paragraph-properties fo:margin-left="1cm" fo:margin-right="1cm" fo:text-indent="0cm" style:auto-text-indent="false" fo:background-color="#eeeeee" fo:padding="0.25cm" fo:border="0.74pt solid #000000"/>
      <style:text-properties fo:color="#8b4513" loext:opacity="100%" officeooo:rsid="01075636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2.7.2$Linux_X86_64 LibreOffice_project/420$Build-2</meta:generator>
    <dc:date>2026-05-27T16:32:17.455135076</dc:date>
    <meta:editing-duration>P1DT4H43M20S</meta:editing-duration>
    <meta:editing-cycles>226</meta:editing-cycles>
    <meta:document-statistic meta:table-count="0" meta:image-count="2" meta:object-count="0" meta:page-count="2" meta:paragraph-count="34" meta:word-count="578" meta:character-count="3468" meta:non-whitespace-character-count="2948"/>
  </office:meta>
</office:document-meta>
</file>