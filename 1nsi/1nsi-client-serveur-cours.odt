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30000018B9C731E24.png" manifest:media-type="image/png"/>
  <manifest:file-entry manifest:full-path="Pictures/10000000000003C30000015C6EA5EA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automatic-styles>
    <style:style style:name="Tableau1" style:family="table">
      <style:table-properties style:width="19.001cm" table:align="margins"/>
    </style:style>
    <style:style style:name="Tableau1.A" style:family="table-column">
      <style:table-column-properties style:column-width="1.901cm" style:rel-column-width="6558*"/>
    </style:style>
    <style:style style:name="Tableau1.B" style:family="table-column">
      <style:table-column-properties style:column-width="5.699cm" style:rel-column-width="19658*"/>
    </style:style>
    <style:style style:name="Tableau1.D" style:family="table-column">
      <style:table-column-properties style:column-width="5.701cm" style:rel-column-width="19661*"/>
    </style:style>
    <style:style style:name="Tableau1.A1" style:family="table-cell">
      <style:table-cell-properties fo:padding="0.097cm" fo:border-left="0.75pt solid #000000" fo:border-right="none" fo:border-top="0.75pt solid #000000" fo:border-bottom="0.75pt solid #000000"/>
    </style:style>
    <style:style style:name="Tableau1.D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D2" style:family="table-cell">
      <style:table-cell-properties fo:padding="0.097cm" fo:border-left="0.75pt solid #000000" fo:border-right="0.75pt solid #000000" fo:border-top="none" fo:border-bottom="0.75pt solid #000000"/>
    </style:style>
    <style:style style:name="Tableau3" style:family="table">
      <style:table-properties style:width="11.105cm" table:align="left"/>
    </style:style>
    <style:style style:name="Tableau3.A" style:family="table-column">
      <style:table-column-properties style:column-width="2.004cm"/>
    </style:style>
    <style:style style:name="Tableau3.B" style:family="table-column">
      <style:table-column-properties style:column-width="9.102cm"/>
    </style:style>
    <style:style style:name="Tableau3.A1" style:family="table-cell">
      <style:table-cell-properties fo:padding="0.097cm" fo:border-left="0.75pt solid #000000" fo:border-right="none" fo:border-top="0.75pt solid #000000" fo:border-bottom="0.75pt solid #000000"/>
    </style:style>
    <style:style style:name="Tableau3.B1" style:family="table-cell">
      <style:table-cell-properties fo:padding="0.097cm" fo:border="0.75pt solid #000000"/>
    </style:style>
    <style:style style:name="Tableau3.A2" style:family="table-cell">
      <style:table-cell-properties fo:padding="0.097cm" fo:border-left="0.75pt solid #000000" fo:border-right="none" fo:border-top="none" fo:border-bottom="0.75pt solid #000000"/>
    </style:style>
    <style:style style:name="Tableau3.B2" style:family="table-cell">
      <style:table-cell-properties fo:padding="0.097cm" fo:border-left="0.75pt solid #000000" fo:border-right="0.75pt solid #000000" fo:border-top="none" fo:border-bottom="0.75pt solid #000000"/>
    </style:style>
    <style:style style:name="Tableau2" style:family="table">
      <style:table-properties style:width="19.001cm" table:align="margins"/>
    </style:style>
    <style:style style:name="Tableau2.A" style:family="table-column">
      <style:table-column-properties style:column-width="9.5cm" style:rel-column-width="32767*"/>
    </style:style>
    <style:style style:name="Tableau2.B" style:family="table-column">
      <style:table-column-properties style:column-width="9.5cm" style:rel-column-width="32768*"/>
    </style:style>
    <style:style style:name="Tableau2.A1" style:family="table-cell">
      <style:table-cell-properties fo:padding="0.097cm" fo:border-left="0.75pt solid #000000" fo:border-right="none" fo:border-top="0.75pt solid #000000" fo:border-bottom="none"/>
    </style:style>
    <style:style style:name="Tableau2.B1" style:family="table-cell">
      <style:table-cell-properties fo:padding="0.097cm" fo:border-left="0.75pt solid #000000" fo:border-right="0.75pt solid #000000" fo:border-top="0.75pt solid #000000" fo:border-bottom="none"/>
    </style:style>
    <style:style style:name="Tableau2.A2" style:family="table-cell">
      <style:table-cell-properties fo:padding="0.097cm" fo:border-left="0.75pt solid #000000" fo:border-right="none" fo:border-top="none" fo:border-bottom="0.75pt solid #000000"/>
    </style:style>
    <style:style style:name="Tableau2.B2" style:family="table-cell">
      <style:table-cell-properties fo:padding="0.097cm" fo:border-left="0.75pt solid #000000" fo:border-right="0.75pt solid #000000" fo:border-top="none" fo:border-bottom="0.75pt solid #000000"/>
    </style:style>
    <style:style style:name="P1" style:family="paragraph" style:parent-style-name="Standard">
      <style:text-properties officeooo:rsid="01075636" officeooo:paragraph-rsid="010d89e8"/>
    </style:style>
    <style:style style:name="P2" style:family="paragraph" style:parent-style-name="Standard">
      <loext:graphic-properties draw:fill-gradient-name="gradient" draw:fill-hatch-name="hatch"/>
      <style:paragraph-properties fo:margin-top="0cm" fo:margin-bottom="0.199cm" style:contextual-spacing="false"/>
      <style:text-properties officeooo:rsid="01075636" officeooo:paragraph-rsid="010d89e8"/>
    </style:style>
    <style:style style:name="P3" style:family="paragraph" style:parent-style-name="Standard">
      <loext:graphic-properties draw:fill="solid" draw:fill-color="#eeeeee" draw:fill-gradient-name="gradient" draw:fill-hatch-name="hatch"/>
      <style:paragraph-properties fo:margin-left="1cm" fo:margin-right="1cm" fo:text-indent="0cm" style:auto-text-indent="false" fo:background-color="#eeeeee" fo:padding="0.25cm" fo:border="0.74pt solid #000000"/>
      <style:text-properties officeooo:rsid="01079efd" officeooo:paragraph-rsid="010d89e8"/>
    </style:style>
    <style:style style:name="P4" style:family="paragraph" style:parent-style-name="Standard">
      <loext:graphic-properties draw:fill="solid" draw:fill-color="#eeeeee" draw:fill-gradient-name="gradient" draw:fill-hatch-name="hatch"/>
      <style:paragraph-properties fo:margin-left="1cm" fo:margin-right="1cm" fo:text-indent="0cm" style:auto-text-indent="false" fo:background-color="#eeeeee" fo:padding="0.25cm" fo:border="0.74pt solid #000000"/>
      <style:text-properties fo:color="#8b4513" loext:opacity="100%" officeooo:rsid="01075636" officeooo:paragraph-rsid="010d89e8"/>
    </style:style>
    <style:style style:name="P5" style:family="paragraph" style:parent-style-name="Standard">
      <loext:graphic-properties draw:fill="solid" draw:fill-color="#eeeeee" draw:fill-gradient-name="gradient" draw:fill-hatch-name="hatch"/>
      <style:paragraph-properties fo:margin-left="1cm" fo:margin-right="1cm" fo:text-indent="0cm" style:auto-text-indent="false" fo:background-color="#eeeeee" fo:padding="0.25cm" fo:border="0.74pt solid #000000"/>
      <style:text-properties fo:color="#8b4513" loext:opacity="100%" officeooo:rsid="01079efd" officeooo:paragraph-rsid="010d89e8"/>
    </style:style>
    <style:style style:name="P6" style:family="paragraph" style:parent-style-name="Standard">
      <loext:graphic-properties draw:fill="solid" draw:fill-color="#eeeeee" draw:fill-gradient-name="gradient" draw:fill-hatch-name="hatch"/>
      <style:paragraph-properties fo:margin-left="1cm" fo:margin-right="1cm" fo:text-indent="0cm" style:auto-text-indent="false" fo:background-color="#eeeeee" fo:padding="0.25cm" fo:border="0.74pt solid #000000"/>
      <style:text-properties fo:color="#708090" loext:opacity="100%" officeooo:rsid="01079efd" officeooo:paragraph-rsid="010d89e8"/>
    </style:style>
    <style:style style:name="P7" style:family="paragraph" style:parent-style-name="Text_20_body">
      <loext:graphic-properties draw:fill-gradient-name="gradient" draw:fill-hatch-name="hatch"/>
      <style:paragraph-properties fo:margin-top="0cm" fo:margin-bottom="0.25cm" style:contextual-spacing="false" fo:line-height="100%" fo:text-align="center" style:justify-single-word="false"/>
      <style:text-properties officeooo:paragraph-rsid="0105ac53"/>
    </style:style>
    <style:style style:name="P8" style:family="paragraph" style:parent-style-name="Text_20_body">
      <style:paragraph-properties fo:line-height="100%"/>
      <style:text-properties officeooo:paragraph-rsid="011d5822"/>
    </style:style>
    <style:style style:name="P9" style:family="paragraph" style:parent-style-name="Text_20_body">
      <style:paragraph-properties fo:line-height="100%"/>
      <style:text-properties officeooo:paragraph-rsid="010fa99c"/>
    </style:style>
    <style:style style:name="P10" style:family="paragraph" style:parent-style-name="Text_20_body">
      <style:paragraph-properties fo:line-height="100%"/>
      <style:text-properties officeooo:paragraph-rsid="013c0f1d"/>
    </style:style>
    <style:style style:name="P11" style:family="paragraph" style:parent-style-name="Text_20_body">
      <style:paragraph-properties fo:line-height="100%"/>
      <style:text-properties officeooo:rsid="0102357d" officeooo:paragraph-rsid="010d89e8"/>
    </style:style>
    <style:style style:name="P12" style:family="paragraph" style:parent-style-name="Text_20_body">
      <loext:graphic-properties draw:fill-gradient-name="gradient" draw:fill-hatch-name="hatch"/>
      <style:paragraph-properties fo:margin-top="0cm" fo:margin-bottom="0.25cm" style:contextual-spacing="false" fo:line-height="100%" fo:text-align="center" style:justify-single-word="false"/>
      <style:text-properties officeooo:rsid="0105ac53" officeooo:paragraph-rsid="0105ac53"/>
    </style:style>
    <style:style style:name="P13" style:family="paragraph" style:parent-style-name="Text_20_body">
      <style:paragraph-properties fo:line-height="100%"/>
      <style:text-properties officeooo:rsid="010eae66" officeooo:paragraph-rsid="010eb96a"/>
    </style:style>
    <style:style style:name="P14" style:family="paragraph" style:parent-style-name="Text_20_body">
      <style:paragraph-properties fo:line-height="100%"/>
      <style:text-properties style:font-name="Arial4" officeooo:rsid="01014c36" officeooo:paragraph-rsid="00fd0791" style:font-size-asian="10.5pt"/>
    </style:style>
    <style:style style:name="P15" style:family="paragraph" style:parent-style-name="Text_20_body">
      <style:paragraph-properties fo:line-height="100%"/>
      <style:text-properties style:font-name="Arial4" officeooo:rsid="0104def4" officeooo:paragraph-rsid="011d5822" style:font-size-asian="10.5pt"/>
    </style:style>
    <style:style style:name="P16" style:family="paragraph" style:parent-style-name="Text_20_body">
      <style:paragraph-properties fo:line-height="100%"/>
      <style:text-properties style:font-name="Arial4" officeooo:rsid="01033a6e" officeooo:paragraph-rsid="011d5822" style:font-size-asian="10.5pt"/>
    </style:style>
    <style:style style:name="P17" style:family="paragraph" style:parent-style-name="Text_20_body">
      <style:paragraph-properties fo:line-height="100%"/>
      <style:text-properties style:font-name="Arial4" officeooo:rsid="011f62d7" officeooo:paragraph-rsid="011f62d7" style:font-size-asian="10.5pt"/>
    </style:style>
    <style:style style:name="P18" style:family="paragraph" style:parent-style-name="Text_20_body">
      <loext:graphic-properties draw:fill-gradient-name="gradient" draw:fill-hatch-name="hatch"/>
      <style:paragraph-properties fo:margin-top="0cm" fo:margin-bottom="0.25cm" style:contextual-spacing="false" fo:line-height="100%"/>
      <style:text-properties style:font-name="Arial4" officeooo:rsid="01125824" officeooo:paragraph-rsid="0114bffc" style:font-size-asian="10.5pt"/>
    </style:style>
    <style:style style:name="P19" style:family="paragraph" style:parent-style-name="Text_20_body">
      <loext:graphic-properties draw:fill-hatch-name="hatch"/>
      <style:paragraph-properties fo:margin-top="0cm" fo:margin-bottom="0cm" style:contextual-spacing="false" fo:line-height="115%"/>
      <style:text-properties style:font-name="Arial4" officeooo:rsid="01269fe4" officeooo:paragraph-rsid="01282801" style:font-size-asian="10.5pt"/>
    </style:style>
    <style:style style:name="P20" style:family="paragraph" style:parent-style-name="Text_20_body">
      <loext:graphic-properties draw:fill-hatch-name="hatch"/>
      <style:paragraph-properties fo:margin-top="0cm" fo:margin-bottom="0cm" style:contextual-spacing="false" fo:line-height="115%"/>
      <style:text-properties style:font-name="Arial4" officeooo:rsid="01269fe4" officeooo:paragraph-rsid="01296554" style:font-size-asian="10.5pt"/>
    </style:style>
    <style:style style:name="P21" style:family="paragraph" style:parent-style-name="Text_20_body">
      <loext:graphic-properties draw:fill-hatch-name="hatch"/>
      <style:paragraph-properties fo:margin-top="0cm" fo:margin-bottom="0cm" style:contextual-spacing="false" fo:line-height="115%"/>
      <style:text-properties style:font-name="Arial4" officeooo:rsid="01269fe4" officeooo:paragraph-rsid="01269fe4" style:font-size-asian="10.5pt"/>
    </style:style>
    <style:style style:name="P22" style:family="paragraph" style:parent-style-name="Text_20_body">
      <style:paragraph-properties fo:line-height="100%"/>
      <style:text-properties style:font-name="Arial4" officeooo:rsid="010fa99c" officeooo:paragraph-rsid="012f201a" style:font-size-asian="10.5pt"/>
    </style:style>
    <style:style style:name="P23" style:family="paragraph" style:parent-style-name="Text_20_body">
      <style:paragraph-properties fo:line-height="100%" fo:text-align="center" style:justify-single-word="false"/>
      <style:text-properties style:font-name="Arial4" officeooo:rsid="013082a4" officeooo:paragraph-rsid="013082a4" style:font-size-asian="10.5pt"/>
    </style:style>
    <style:style style:name="P24" style:family="paragraph" style:parent-style-name="Requête_20_HTTP">
      <style:text-properties style:font-name="Arial4" officeooo:rsid="012f201a" officeooo:paragraph-rsid="0131c678" style:font-size-asian="10.5pt"/>
    </style:style>
    <style:style style:name="P25" style:family="paragraph" style:parent-style-name="Text_20_body" style:master-page-name="">
      <loext:graphic-properties draw:fill="none" draw:fill-hatch-name="hatch"/>
      <style:paragraph-properties fo:margin-left="1cm" fo:margin-right="0cm" fo:margin-top="0cm" fo:margin-bottom="0.049cm" style:contextual-spacing="false" fo:line-height="100%" fo:text-indent="0cm" style:auto-text-indent="false" style:page-number="auto" fo:background-color="transparent"/>
      <style:text-properties style:font-name="Arial4" officeooo:rsid="0131c678" officeooo:paragraph-rsid="0131c678" style:font-size-asian="10.5pt"/>
    </style:style>
    <style:style style:name="P26" style:family="paragraph" style:parent-style-name="Text_20_body">
      <style:paragraph-properties fo:line-height="100%"/>
      <style:text-properties style:font-name="Arial4" officeooo:rsid="0135157a" officeooo:paragraph-rsid="0135157a" style:font-size-asian="10.5pt"/>
    </style:style>
    <style:style style:name="P27" style:family="paragraph" style:parent-style-name="Text_20_body">
      <loext:graphic-properties draw:fill-hatch-name="hatch"/>
      <style:paragraph-properties fo:margin-top="0cm" fo:margin-bottom="0cm" style:contextual-spacing="false" fo:line-height="115%"/>
      <style:text-properties style:font-name="Arial4" fo:font-weight="bold" officeooo:rsid="01269fe4" officeooo:paragraph-rsid="01269fe4" style:font-size-asian="10.5pt" style:font-weight-asian="bold" style:font-weight-complex="bold"/>
    </style:style>
    <style:style style:name="P28" style:family="paragraph" style:parent-style-name="tfTitre_20_Chapitre">
      <style:text-properties fo:font-size="23pt" officeooo:rsid="00fd0791" officeooo:paragraph-rsid="00fd0791" style:font-size-asian="23pt" style:font-size-complex="23pt"/>
    </style:style>
    <style:style style:name="P29" style:family="paragraph" style:parent-style-name="Standard">
      <loext:graphic-properties draw:fill-hatch-name="hatch"/>
      <style:paragraph-properties fo:line-height="115%"/>
      <style:text-properties officeooo:rsid="01069d1d" officeooo:paragraph-rsid="010d89e8"/>
    </style:style>
    <style:style style:name="P30" style:family="paragraph" style:parent-style-name="Standard">
      <style:text-properties officeooo:paragraph-rsid="00fd0791"/>
    </style:style>
    <style:style style:name="P31" style:family="paragraph" style:parent-style-name="Table_20_Contents">
      <style:text-properties officeooo:rsid="0114bffc" officeooo:paragraph-rsid="0114bffc" style:font-size-asian="10.5pt"/>
    </style:style>
    <style:style style:name="P32" style:family="paragraph" style:parent-style-name="Table_20_Contents">
      <style:paragraph-properties fo:text-align="center" style:justify-single-word="false"/>
      <style:text-properties officeooo:rsid="0114bffc" officeooo:paragraph-rsid="0114bffc" style:font-size-asian="10.5pt"/>
    </style:style>
    <style:style style:name="P33" style:family="paragraph" style:parent-style-name="Table_20_Contents">
      <style:text-properties officeooo:rsid="01154d92" officeooo:paragraph-rsid="01154d92" style:font-size-asian="10.5pt"/>
    </style:style>
    <style:style style:name="P34" style:family="paragraph" style:parent-style-name="Table_20_Contents">
      <style:paragraph-properties fo:text-align="center" style:justify-single-word="false"/>
      <style:text-properties style:font-size-asian="10.5pt"/>
    </style:style>
    <style:style style:name="P35" style:family="paragraph" style:parent-style-name="Standard">
      <style:paragraph-properties fo:text-align="center" style:justify-single-word="false"/>
      <style:text-properties officeooo:paragraph-rsid="0135309c" style:font-size-asian="10.5pt"/>
    </style:style>
    <style:style style:name="P36" style:family="paragraph" style:parent-style-name="Table_20_Contents">
      <style:text-properties officeooo:rsid="01209cdc" officeooo:paragraph-rsid="01209cdc" style:font-size-asian="10.5pt"/>
    </style:style>
    <style:style style:name="P37" style:family="paragraph" style:parent-style-name="Table_20_Contents">
      <style:paragraph-properties fo:text-align="center" style:justify-single-word="false"/>
      <style:text-properties officeooo:rsid="01209cdc" officeooo:paragraph-rsid="01209cdc" style:font-size-asian="10.5pt"/>
    </style:style>
    <style:style style:name="P38" style:family="paragraph" style:parent-style-name="Text_20_body">
      <loext:graphic-properties draw:fill-gradient-name="gradient" draw:fill-hatch-name="hatch"/>
      <style:paragraph-properties fo:margin-top="0cm" fo:margin-bottom="0.25cm" style:contextual-spacing="false" fo:line-height="100%"/>
      <style:text-properties officeooo:rsid="011255c0" officeooo:paragraph-rsid="01154d92" style:font-size-asian="10.5pt"/>
    </style:style>
    <style:style style:name="P39" style:family="paragraph" style:parent-style-name="Table_20_Contents">
      <style:paragraph-properties fo:text-align="center" style:justify-single-word="false"/>
      <style:text-properties officeooo:rsid="0135309c" officeooo:paragraph-rsid="0135309c" style:font-size-asian="10.5pt"/>
    </style:style>
    <style:style style:name="P40" style:family="paragraph" style:parent-style-name="Text_20_body">
      <style:text-properties officeooo:rsid="011d5822" officeooo:paragraph-rsid="011d5822"/>
    </style:style>
    <style:style style:name="P41" style:family="paragraph" style:parent-style-name="Requête_20_HTTP">
      <loext:graphic-properties draw:fill-hatch-name="hatch"/>
    </style:style>
    <style:style style:name="P42" style:family="paragraph" style:parent-style-name="Standard">
      <style:text-properties fo:font-size="8pt" style:font-size-asian="7pt" style:font-size-complex="8pt"/>
    </style:style>
    <style:style style:name="P43" style:family="paragraph" style:parent-style-name="Text_20_body" style:master-page-name="">
      <loext:graphic-properties draw:fill="none" draw:fill-hatch-name="hatch"/>
      <style:paragraph-properties fo:margin-left="1cm" fo:margin-right="0cm" fo:margin-top="0cm" fo:margin-bottom="0.049cm" style:contextual-spacing="false" fo:line-height="100%" fo:text-indent="0cm" style:auto-text-indent="false" style:page-number="auto" fo:background-color="transparent"/>
      <style:text-properties officeooo:rsid="0131c678" officeooo:paragraph-rsid="0131c678"/>
    </style:style>
    <style:style style:name="P44" style:family="paragraph" style:parent-style-name="Requête_20_HTTP">
      <style:text-properties fo:color="#c9211e" loext:opacity="100%" style:font-name="Arial4" officeooo:rsid="012f201a" officeooo:paragraph-rsid="0131c678" style:font-size-asian="10.5pt"/>
    </style:style>
    <style:style style:name="P45" style:family="paragraph" style:parent-style-name="Table_20_Contents">
      <loext:graphic-properties draw:fill="solid" draw:fill-color="#eeeeee" draw:fill-gradient-name="Gradient_20_2" draw:fill-hatch-name="hatch"/>
      <style:paragraph-properties fo:background-color="#eeeeee"/>
      <style:text-properties fo:font-size="9pt" officeooo:rsid="01209cdc" officeooo:paragraph-rsid="01209cdc" style:font-size-asian="9pt" style:font-size-complex="9pt"/>
    </style:style>
    <style:style style:name="P46" style:family="paragraph" style:parent-style-name="Requête_20_HTTP">
      <loext:graphic-properties draw:fill="solid" draw:fill-color="#eeeeee" draw:fill-gradient-name="Gradient_20_3" draw:fill-hatch-name="hatch"/>
      <style:paragraph-properties fo:background-color="#eeeeee"/>
      <style:text-properties style:use-window-font-color="true" loext:opacity="0%" fo:font-size="9pt" style:font-size-asian="9pt" style:font-size-complex="9pt"/>
    </style:style>
    <style:style style:name="P47" style:family="paragraph" style:parent-style-name="Text_20_body">
      <style:paragraph-properties fo:line-height="100%"/>
      <style:text-properties officeooo:rsid="0137c2b4" officeooo:paragraph-rsid="0137c2b4"/>
    </style:style>
    <style:style style:name="P48" style:family="paragraph" style:parent-style-name="Requête_20_HTTP">
      <loext:graphic-properties draw:fill-hatch-name="hatch"/>
      <style:text-properties officeooo:paragraph-rsid="01451e88"/>
    </style:style>
    <style:style style:name="P49" style:family="paragraph" style:parent-style-name="Requête_20_HTTP">
      <style:text-properties style:font-name="Arial4" officeooo:rsid="012f201a" officeooo:paragraph-rsid="01472a07" style:font-size-asian="10.5pt"/>
    </style:style>
    <style:style style:name="P50" style:family="paragraph" style:parent-style-name="Standard" style:list-style-name="tfNum_20_1_29_">
      <loext:graphic-properties draw:fill-hatch-name="hatch"/>
      <style:paragraph-properties fo:line-height="115%"/>
      <style:text-properties officeooo:rsid="01069d1d" officeooo:paragraph-rsid="010d89e8"/>
    </style:style>
    <style:style style:name="P51" style:family="paragraph" style:parent-style-name="Standard" style:list-style-name="tfNum_20_1_29_">
      <loext:graphic-properties draw:fill-hatch-name="hatch"/>
      <style:paragraph-properties fo:line-height="115%"/>
      <style:text-properties style:font-name="Arial4" officeooo:rsid="01075636" officeooo:paragraph-rsid="010d89e8"/>
    </style:style>
    <style:style style:name="P52" style:family="paragraph" style:parent-style-name="Standard" style:list-style-name="tfNum_20_1_29_">
      <loext:graphic-properties draw:fill-hatch-name="hatch"/>
      <style:paragraph-properties fo:line-height="115%"/>
      <style:text-properties officeooo:rsid="01075636" officeooo:paragraph-rsid="010d89e8"/>
    </style:style>
    <style:style style:name="P53" style:family="paragraph" style:parent-style-name="Standard" style:list-style-name="tfNum_20_1_29_">
      <loext:graphic-properties draw:fill-hatch-name="hatch"/>
      <style:paragraph-properties fo:line-height="115%"/>
      <style:text-properties officeooo:rsid="01086188" officeooo:paragraph-rsid="010d89e8"/>
    </style:style>
    <style:style style:name="P54" style:family="paragraph" style:parent-style-name="Standard" style:list-style-name="tfPuce">
      <style:text-properties officeooo:paragraph-rsid="010eb96a"/>
    </style:style>
    <style:style style:name="P55" style:family="paragraph" style:parent-style-name="Standard" style:list-style-name="tfPuce">
      <loext:graphic-properties draw:fill-hatch-name="hatch"/>
      <style:paragraph-properties fo:line-height="115%"/>
    </style:style>
    <style:style style:name="P56" style:family="paragraph" style:parent-style-name="Text_20_body" style:list-style-name="tfNum_20_1_29_">
      <loext:graphic-properties draw:fill-hatch-name="hatch"/>
      <style:paragraph-properties fo:margin-top="0cm" fo:margin-bottom="0cm" style:contextual-spacing="false" fo:line-height="115%"/>
      <style:text-properties style:font-name="Arial4" officeooo:rsid="01269fe4" officeooo:paragraph-rsid="01282801" style:font-size-asian="10.5pt"/>
    </style:style>
    <style:style style:name="P57" style:family="paragraph" style:parent-style-name="Text_20_body" style:list-style-name="tfNum_20_1_29_">
      <loext:graphic-properties draw:fill-hatch-name="hatch"/>
      <style:paragraph-properties fo:margin-top="0cm" fo:margin-bottom="0cm" style:contextual-spacing="false" fo:line-height="115%"/>
      <style:text-properties style:font-name="Arial4" officeooo:rsid="01269fe4" officeooo:paragraph-rsid="01296554" style:font-size-asian="10.5pt"/>
    </style:style>
    <style:style style:name="P58" style:family="paragraph" style:parent-style-name="Text_20_body" style:list-style-name="tfPuce">
      <loext:graphic-properties draw:fill-hatch-name="hatch"/>
      <style:paragraph-properties fo:margin-top="0cm" fo:margin-bottom="0cm" style:contextual-spacing="false" fo:line-height="115%"/>
      <style:text-properties style:font-name="Arial4" officeooo:rsid="01269fe4" officeooo:paragraph-rsid="01339dba" style:font-size-asian="10.5pt"/>
    </style:style>
    <style:style style:name="P59" style:family="paragraph" style:parent-style-name="Text_20_body" style:list-style-name="tfPuce">
      <loext:graphic-properties draw:fill-hatch-name="hatch"/>
      <style:paragraph-properties fo:margin-top="0cm" fo:margin-bottom="0cm" style:contextual-spacing="false" fo:line-height="115%"/>
      <style:text-properties style:font-name="Arial4" officeooo:rsid="01296554" officeooo:paragraph-rsid="01296554" style:font-size-asian="10.5pt"/>
    </style:style>
    <style:style style:name="P60" style:family="paragraph" style:parent-style-name="Text_20_body">
      <style:paragraph-properties fo:line-height="100%"/>
      <style:text-properties style:font-name="Arial4" officeooo:rsid="0135157a" officeooo:paragraph-rsid="0135157a" style:font-size-asian="10.5pt"/>
    </style:style>
    <style:style style:name="P61" style:family="paragraph" style:parent-style-name="Text_20_body" style:list-style-name="tfPuce">
      <style:paragraph-properties fo:line-height="100%"/>
      <style:text-properties officeooo:paragraph-rsid="010fa99c"/>
    </style:style>
    <style:style style:name="P62" style:family="paragraph" style:parent-style-name="Text_20_body" style:list-style-name="tfPuce">
      <loext:graphic-properties draw:fill-hatch-name="hatch"/>
      <style:paragraph-properties fo:margin-top="0.3cm" fo:margin-bottom="0.25cm" style:contextual-spacing="false" fo:line-height="100%"/>
      <style:text-properties officeooo:paragraph-rsid="0131c678"/>
    </style:style>
    <style:style style:name="P63" style:family="paragraph" style:parent-style-name="tfTitre_20_1_29_">
      <style:text-properties officeooo:paragraph-rsid="010d89e8"/>
    </style:style>
    <style:style style:name="P64" style:family="paragraph" style:parent-style-name="tfTitre_20_1_29_">
      <style:paragraph-properties fo:break-before="page"/>
      <style:text-properties officeooo:paragraph-rsid="011d5822"/>
    </style:style>
    <style:style style:name="P65" style:family="paragraph" style:parent-style-name="tfTitre_20_1_29_">
      <style:paragraph-properties fo:break-before="page"/>
    </style:style>
    <style:style style:name="P66" style:family="paragraph" style:parent-style-name="tfTitre_20_I_29_">
      <style:paragraph-properties fo:break-before="page"/>
      <style:text-properties officeooo:paragraph-rsid="0105ac53"/>
    </style:style>
    <style:style style:name="P67" style:family="paragraph" style:parent-style-name="tfTitre_20_I_29_">
      <style:paragraph-properties fo:break-before="page"/>
      <style:text-properties officeooo:paragraph-rsid="01451e88"/>
    </style:style>
    <style:style style:name="P68" style:family="paragraph">
      <style:paragraph-properties fo:text-align="center"/>
      <style:text-properties style:text-line-through-style="none" style:text-line-through-type="none" style:font-name="Arial3" fo:font-size="12pt" fo:font-style="normal" style:text-underline-style="none"/>
    </style:style>
    <style:style style:name="T1" style:family="text">
      <style:text-properties style:font-name="Arial4"/>
    </style:style>
    <style:style style:name="T2" style:family="text">
      <style:text-properties style:font-name="Arial4" style:font-size-asian="10.5pt"/>
    </style:style>
    <style:style style:name="T3" style:family="text">
      <style:text-properties style:font-name="Arial4" officeooo:rsid="00db695e" style:font-size-asian="10.5pt"/>
    </style:style>
    <style:style style:name="T4" style:family="text">
      <style:text-properties style:font-name="Arial4" officeooo:rsid="00feff90" style:font-size-asian="10.5pt"/>
    </style:style>
    <style:style style:name="T5" style:family="text">
      <style:text-properties style:font-name="Arial4" officeooo:rsid="01014c36" style:font-size-asian="10.5pt"/>
    </style:style>
    <style:style style:name="T6" style:family="text">
      <style:text-properties style:font-name="Arial4" officeooo:rsid="01033a6e" style:font-size-asian="10.5pt"/>
    </style:style>
    <style:style style:name="T7" style:family="text">
      <style:text-properties style:font-name="Arial4" officeooo:rsid="01066d8e" style:font-size-asian="10.5pt"/>
    </style:style>
    <style:style style:name="T8" style:family="text">
      <style:text-properties style:font-name="Arial4" officeooo:rsid="010a603c" style:font-size-asian="10.5pt"/>
    </style:style>
    <style:style style:name="T9" style:family="text">
      <style:text-properties style:font-name="Arial4" officeooo:rsid="010d89e8" style:font-size-asian="10.5pt"/>
    </style:style>
    <style:style style:name="T10" style:family="text">
      <style:text-properties style:font-name="Arial4" officeooo:rsid="010eb96a" style:font-size-asian="10.5pt"/>
    </style:style>
    <style:style style:name="T11" style:family="text">
      <style:text-properties style:font-name="Arial4" officeooo:rsid="011061a8" style:font-size-asian="10.5pt"/>
    </style:style>
    <style:style style:name="T12" style:family="text">
      <style:text-properties style:font-name="Arial4" officeooo:rsid="0110dd10" style:font-size-asian="10.5pt"/>
    </style:style>
    <style:style style:name="T13" style:family="text">
      <style:text-properties style:font-name="Arial4" officeooo:rsid="01154d92" style:font-size-asian="10.5pt"/>
    </style:style>
    <style:style style:name="T14" style:family="text">
      <style:text-properties style:font-name="Arial4" officeooo:rsid="01190b43" style:font-size-asian="10.5pt"/>
    </style:style>
    <style:style style:name="T15" style:family="text">
      <style:text-properties style:font-name="Arial4" officeooo:rsid="011abc27" style:font-size-asian="10.5pt"/>
    </style:style>
    <style:style style:name="T16" style:family="text">
      <style:text-properties style:font-name="Arial4" officeooo:rsid="011b7b1a" style:font-size-asian="10.5pt"/>
    </style:style>
    <style:style style:name="T17" style:family="text">
      <style:text-properties style:font-name="Arial4" officeooo:rsid="011c252d" style:font-size-asian="10.5pt"/>
    </style:style>
    <style:style style:name="T18" style:family="text">
      <style:text-properties style:font-name="Arial4" officeooo:rsid="01236026" style:font-size-asian="10.5pt"/>
    </style:style>
    <style:style style:name="T19" style:family="text">
      <style:text-properties style:font-name="Arial4" officeooo:rsid="010fa99c" style:font-size-asian="10.5pt"/>
    </style:style>
    <style:style style:name="T20" style:family="text">
      <style:text-properties style:font-name="Arial4" officeooo:rsid="012f201a" style:font-size-asian="10.5pt"/>
    </style:style>
    <style:style style:name="T21" style:family="text">
      <style:text-properties style:font-name="Arial4" officeooo:rsid="01317965" style:font-size-asian="10.5pt"/>
    </style:style>
    <style:style style:name="T22" style:family="text">
      <style:text-properties style:font-name="Arial4" officeooo:rsid="0131c678" style:font-size-asian="10.5pt"/>
    </style:style>
    <style:style style:name="T23" style:family="text">
      <style:text-properties style:font-name="Arial4" officeooo:rsid="013c0f1d" style:font-size-asian="10.5pt"/>
    </style:style>
    <style:style style:name="T24" style:family="text">
      <style:text-properties style:font-name="Arial4" officeooo:rsid="013d1032" style:font-size-asian="10.5pt"/>
    </style:style>
    <style:style style:name="T25" style:family="text">
      <style:text-properties style:font-name="Arial4" officeooo:rsid="013ec0f3" style:font-size-asian="10.5pt"/>
    </style:style>
    <style:style style:name="T26" style:family="text">
      <style:text-properties style:font-name="Arial4" officeooo:rsid="0140a383" style:font-size-asian="10.5pt"/>
    </style:style>
    <style:style style:name="T27" style:family="text">
      <style:text-properties style:font-name="Arial4" officeooo:rsid="01421b9a" style:font-size-asian="10.5pt"/>
    </style:style>
    <style:style style:name="T28" style:family="text">
      <style:text-properties style:font-name="Arial4" officeooo:rsid="0106d74a"/>
    </style:style>
    <style:style style:name="T29" style:family="text">
      <style:text-properties style:font-name="Arial4" officeooo:rsid="01075636"/>
    </style:style>
    <style:style style:name="T30" style:family="text">
      <style:text-properties style:font-name="Arial4" officeooo:rsid="01086188"/>
    </style:style>
    <style:style style:name="T31" style:family="text">
      <style:text-properties style:font-name="Arial4" officeooo:rsid="010a603c"/>
    </style:style>
    <style:style style:name="T32" style:family="text">
      <style:text-properties style:font-name="Arial4" officeooo:rsid="010abe5d"/>
    </style:style>
    <style:style style:name="T33" style:family="text">
      <style:text-properties style:font-name="Arial4" officeooo:rsid="010be079"/>
    </style:style>
    <style:style style:name="T34" style:family="text">
      <style:text-properties style:font-name="Arial4" officeooo:rsid="010d89e8"/>
    </style:style>
    <style:style style:name="T35" style:family="text">
      <style:text-properties style:font-name="Arial4" fo:background-color="#eeeeee" loext:char-shading-value="0" style:font-size-asian="10.5pt"/>
    </style:style>
    <style:style style:name="T36" style:family="text">
      <style:text-properties style:font-name="Arial4" officeooo:rsid="010eb96a" fo:background-color="#eeeeee" loext:char-shading-value="0" style:font-size-asian="10.5pt"/>
    </style:style>
    <style:style style:name="T37" style:family="text">
      <style:text-properties style:font-name="Arial4" officeooo:rsid="010eb96a"/>
    </style:style>
    <style:style style:name="T38" style:family="text">
      <style:text-properties style:font-name="Arial4" officeooo:rsid="010fa99c"/>
    </style:style>
    <style:style style:name="T39" style:family="text">
      <style:text-properties style:font-name="Arial4" officeooo:rsid="01005bb8"/>
    </style:style>
    <style:style style:name="T40" style:family="text">
      <style:text-properties style:font-name="Arial4" officeooo:rsid="01014c36"/>
    </style:style>
    <style:style style:name="T41" style:family="text">
      <style:text-properties style:font-name="Arial4" fo:font-weight="bold" style:font-size-asian="10.5pt" style:font-weight-asian="bold" style:font-weight-complex="bold"/>
    </style:style>
    <style:style style:name="T42" style:family="text">
      <style:text-properties style:font-name="Arial4" fo:font-weight="bold" officeooo:rsid="00db695e" style:font-size-asian="10.5pt" style:font-weight-asian="bold" style:font-weight-complex="bold"/>
    </style:style>
    <style:style style:name="T43" style:family="text">
      <style:text-properties style:font-name="Arial4" fo:font-weight="bold" style:font-weight-asian="bold" style:font-weight-complex="bold"/>
    </style:style>
    <style:style style:name="T44" style:family="text">
      <style:text-properties style:font-name="Arial4" fo:font-weight="bold" officeooo:rsid="0106d74a" style:font-weight-asian="bold" style:font-weight-complex="bold"/>
    </style:style>
    <style:style style:name="T45" style:family="text">
      <style:text-properties style:font-name="Arial4" officeooo:rsid="011abc27"/>
    </style:style>
    <style:style style:name="T46" style:family="text">
      <style:text-properties officeooo:rsid="00feff90"/>
    </style:style>
    <style:style style:name="T47" style:family="text">
      <style:text-properties fo:color="#c9211e" loext:opacity="100%"/>
    </style:style>
    <style:style style:name="T48" style:family="text">
      <style:text-properties officeooo:rsid="0105ac53"/>
    </style:style>
    <style:style style:name="T49" style:family="text">
      <style:text-properties officeooo:rsid="01069d1d"/>
    </style:style>
    <style:style style:name="T50" style:family="text">
      <style:text-properties officeooo:rsid="0106d74a"/>
    </style:style>
    <style:style style:name="T51" style:family="text">
      <style:text-properties officeooo:rsid="01075636"/>
    </style:style>
    <style:style style:name="T52" style:family="text">
      <style:text-properties officeooo:rsid="010a59d5"/>
    </style:style>
    <style:style style:name="T53" style:family="text">
      <style:text-properties officeooo:rsid="010a603c"/>
    </style:style>
    <style:style style:name="T54" style:family="text">
      <style:text-properties fo:color="#708090" loext:opacity="100%" style:font-name="Arial4" officeooo:rsid="010abe5d"/>
    </style:style>
    <style:style style:name="T55" style:family="text">
      <style:text-properties fo:color="#708090" loext:opacity="100%" style:font-name="Arial4" fo:background-color="#eeeeee" loext:char-shading-value="0" style:font-size-asian="10.5pt"/>
    </style:style>
    <style:style style:name="T56" style:family="text">
      <style:text-properties fo:color="#708090" loext:opacity="100%" style:font-name="Arial4" officeooo:rsid="010eae66" fo:background-color="#eeeeee" loext:char-shading-value="0" style:font-size-asian="10.5pt"/>
    </style:style>
    <style:style style:name="T57" style:family="text">
      <style:text-properties fo:color="#8b4513" loext:opacity="100%"/>
    </style:style>
    <style:style style:name="T58" style:family="text">
      <style:text-properties fo:color="#8b4513" loext:opacity="100%" officeooo:rsid="010abe5d"/>
    </style:style>
    <style:style style:name="T59" style:family="text">
      <style:text-properties fo:color="#8b4513" loext:opacity="100%" style:font-name="Arial4" officeooo:rsid="010abe5d"/>
    </style:style>
    <style:style style:name="T60" style:family="text">
      <style:text-properties fo:color="#8b4513" loext:opacity="100%" style:font-name="Arial4" fo:background-color="#eeeeee" loext:char-shading-value="0" style:font-size-asian="10.5pt"/>
    </style:style>
    <style:style style:name="T61" style:family="text">
      <style:text-properties fo:color="#8b4513" loext:opacity="100%" officeooo:rsid="01075636"/>
    </style:style>
    <style:style style:name="T62" style:family="text">
      <style:text-properties officeooo:rsid="010be079"/>
    </style:style>
    <style:style style:name="T63" style:family="text">
      <style:text-properties officeooo:rsid="010d89e8"/>
    </style:style>
    <style:style style:name="T64" style:family="text">
      <style:text-properties fo:color="#ff0000" loext:opacity="100%" style:font-name="Arial4" fo:font-weight="bold" fo:background-color="#eeeeee" loext:char-shading-value="0" style:font-size-asian="10.5pt" style:font-weight-asian="bold" style:font-weight-complex="bold"/>
    </style:style>
    <style:style style:name="T65" style:family="text">
      <style:text-properties fo:color="#ff0000" loext:opacity="100%" style:font-name="Arial4" fo:font-weight="bold" officeooo:rsid="010eb96a" fo:background-color="#eeeeee" loext:char-shading-value="0" style:font-size-asian="10.5pt" style:font-weight-asian="bold" style:font-weight-complex="bold"/>
    </style:style>
    <style:style style:name="T66" style:family="text">
      <style:text-properties officeooo:rsid="010eb96a"/>
    </style:style>
    <style:style style:name="T67" style:family="text">
      <style:text-properties officeooo:rsid="010fa99c"/>
    </style:style>
    <style:style style:name="T68" style:family="text">
      <style:text-properties officeooo:rsid="01171b7d"/>
    </style:style>
    <style:style style:name="T69" style:family="text">
      <style:text-properties fo:font-weight="bold" officeooo:rsid="01209cdc" style:font-weight-asian="bold" style:font-weight-complex="bold"/>
    </style:style>
    <style:style style:name="T70" style:family="text">
      <style:text-properties fo:font-weight="bold" officeooo:rsid="01296554" style:font-weight-asian="bold" style:font-weight-complex="bold"/>
    </style:style>
    <style:style style:name="T71" style:family="text">
      <style:text-properties fo:font-weight="bold" officeooo:rsid="012d6e74" style:font-weight-asian="bold" style:font-weight-complex="bold"/>
    </style:style>
    <style:style style:name="T72" style:family="text">
      <style:text-properties fo:font-weight="bold" officeooo:rsid="0106d74a" style:font-weight-asian="bold" style:font-weight-complex="bold"/>
    </style:style>
    <style:style style:name="T73" style:family="text">
      <style:text-properties officeooo:rsid="01079efd"/>
    </style:style>
    <style:style style:name="T74" style:family="text">
      <style:text-properties officeooo:rsid="011c252d"/>
    </style:style>
    <style:style style:name="T75" style:family="text">
      <style:text-properties officeooo:rsid="00fd0791"/>
    </style:style>
    <style:style style:name="T76" style:family="text">
      <style:text-properties officeooo:rsid="011f62d7"/>
    </style:style>
    <style:style style:name="T77" style:family="text">
      <style:text-properties officeooo:rsid="01209cdc"/>
    </style:style>
    <style:style style:name="T78" style:family="text">
      <style:text-properties officeooo:rsid="012340dd"/>
    </style:style>
    <style:style style:name="T79" style:family="text">
      <style:text-properties officeooo:rsid="01236026"/>
    </style:style>
    <style:style style:name="T80" style:family="text">
      <style:text-properties officeooo:rsid="01282801"/>
    </style:style>
    <style:style style:name="T81" style:family="text">
      <style:text-properties officeooo:rsid="01296554"/>
    </style:style>
    <style:style style:name="T82" style:family="text">
      <style:text-properties officeooo:rsid="012c18f3"/>
    </style:style>
    <style:style style:name="T83" style:family="text">
      <style:text-properties officeooo:rsid="012d6e74"/>
    </style:style>
    <style:style style:name="T84" style:family="text">
      <style:text-properties officeooo:rsid="012f201a"/>
    </style:style>
    <style:style style:name="T85" style:family="text">
      <style:text-properties officeooo:rsid="0135309c"/>
    </style:style>
    <style:style style:name="T86" style:family="text">
      <style:text-properties officeooo:rsid="0138f501"/>
    </style:style>
    <style:style style:name="T87" style:family="text">
      <style:text-properties fo:font-variant="normal" fo:text-transform="none" style:font-name="Arial" fo:font-size="14pt" fo:font-style="normal" fo:font-weight="bold" officeooo:rsid="0138f501" style:font-size-asian="13pt" style:font-weight-asian="bold" style:font-size-complex="13pt" style:font-weight-complex="bold"/>
    </style:style>
    <style:style style:name="T88" style:family="text">
      <style:text-properties officeooo:rsid="0139fe12"/>
    </style:style>
    <style:style style:name="T89" style:family="text">
      <style:text-properties officeooo:rsid="013a18fe"/>
    </style:style>
    <style:style style:name="T90" style:family="text">
      <style:text-properties officeooo:rsid="013d1032"/>
    </style:style>
    <style:style style:name="T91" style:family="text">
      <style:text-properties officeooo:rsid="013ec0f3"/>
    </style:style>
    <style:style style:name="T92" style:family="text">
      <style:text-properties officeooo:rsid="0140a383"/>
    </style:style>
    <style:style style:name="T93" style:family="text">
      <style:text-properties officeooo:rsid="01421b9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fo:border="solid" loext:decorative="false" style:wrap="run-through" style:number-wrapped-paragraphs="no-limit" style:vertical-pos="middle" style:vertical-rel="text"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teraction<text:span text:style-name="T52">s</text:span> client-serveur <text:span text:style-name="T68">sur le web</text:span></text:p>
      <text:p text:style-name="P30"><text:span text:style-name="T75">Après avoir </text:span><text:span text:style-name="T74">étudié</text:span><text:span text:style-name="T75"> comment écrire </text:span><text:span text:style-name="T48">des</text:span><text:span text:style-name="T75"> page</text:span><text:span text:style-name="T48">s</text:span><text:span text:style-name="T75"> web, intéressons nous maintenant aux mécanismes qui permett</text:span><text:span text:style-name="T46">ent</text:span><text:span text:style-name="T75"> à un internaute de l</text:span><text:span text:style-name="T48">es</text:span><text:span text:style-name="T75"> consulter.</text:span></text:p>
      <text:p text:style-name="Text_20_body"/>
      <text:list xml:id="list1078961620" text:style-name="tfNum_20_I_29_">
        <text:list-item>
          <text:p text:style-name="tfTitre_20_I_29_">Le modèle client-serveur</text:p>
        </text:list-item>
      </text:list>
      <text:list text:style-name="tfNum_20_1_29_">
        <text:list-item>
          <text:p text:style-name="tfTitre_20_1_29_"><text:span text:style-name="T18">Introduc</text:span><text:span text:style-name="T2">tion</text:span></text:p>
        </text:list-item>
      </text:list>
      <text:p text:style-name="P10"><text:span text:style-name="T3">Sur internet, la plupart des échanges de données fonctionnent sur le modèle </text:span><text:span text:style-name="T42">client-serveur</text:span><text:span text:style-name="T3">.<text:line-break/>Un </text:span><text:span text:style-name="T42">client</text:span><text:span text:style-name="T3"> (par exemple </text:span><text:span text:style-name="T4">l’ordinateur d’un internaute</text:span><text:span text:style-name="T3">) fait une requête à un </text:span><text:span text:style-name="T42">serveur</text:span><text:span text:style-name="T3"> (souvent situé dans un data center), </text:span><text:span text:style-name="T23">puis </text:span><text:span text:style-name="T3">ce dernier lui </text:span><text:span text:style-name="T23">répond en lui </text:span><text:span text:style-name="T3">envo</text:span><text:span text:style-name="T23">yant</text:span><text:span text:style-name="T3"> les données demandées (par exemple un mail, une page web, une vidéo,...).</text:span></text:p>
      <text:p text:style-name="P10"><text:span text:style-name="T3">Selon le contexte, </text:span><text:span text:style-name="T5">les termes </text:span><text:span text:style-name="T42">client</text:span><text:span text:style-name="T3"> et </text:span><text:span text:style-name="T42">serveur</text:span><text:span text:style-name="T3"> désigne</text:span><text:span text:style-name="T5">nt</text:span><text:span text:style-name="T3"> soit des </text:span><text:span text:style-name="T5">ordinateurs, soit les </text:span><text:span text:style-name="T3">logiciels </text:span><text:span text:style-name="T5">tournant sur ces ordinateurs et permettant la communication.</text:span></text:p>
      <text:p text:style-name="P7"><draw:frame draw:style-name="fr2" draw:name="Image4" text:anchor-type="as-char" svg:width="12.157cm" svg:height="4.392cm" draw:z-index="0"><draw:image xlink:href="Pictures/10000000000003C30000015C6EA5EAB3.png" xlink:type="simple" xlink:show="embed" xlink:actuate="onLoad" draw:mime-type="image/png"/></draw:frame></text:p>
      <text:p text:style-name="P12"><text:span text:style-name="T5">Exemple de serveur utilisé dans </text:span><text:span text:style-name="T2">un</text:span><text:span text:style-name="T5"> data center</text:span></text:p>
      <text:p text:style-name="P14"/>
      <text:list text:continue-numbering="true" text:style-name="tfNum_20_1_29_">
        <text:list-item>
          <text:p text:style-name="tfTitre_20_1_29_">Dans le cas du web<text:span text:style-name="T63"> :</text:span></text:p>
        </text:list-item>
      </text:list>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34"/>
          </table:table-cell>
          <table:table-cell table:style-name="Tableau1.A1" office:value-type="string">
            <text:p text:style-name="P32">Ordinateur</text:p>
          </table:table-cell>
          <table:table-cell table:style-name="Tableau1.A1" office:value-type="string">
            <text:p text:style-name="P32">Logiciels</text:p>
          </table:table-cell>
          <table:table-cell table:style-name="Tableau1.D1" office:value-type="string">
            <text:p text:style-name="P32">Langages</text:p>
          </table:table-cell>
        </table:table-row>
        <table:table-row>
          <table:table-cell table:style-name="Tableau1.A2" office:value-type="string">
            <text:p text:style-name="P32">Client</text:p>
          </table:table-cell>
          <table:table-cell table:style-name="Tableau1.A2" office:value-type="string">
            <text:p text:style-name="P31">Ordinateurs des internautes</text:p>
          </table:table-cell>
          <table:table-cell table:style-name="Tableau1.A2" office:value-type="string">
            <text:p text:style-name="P31">Navigateurs des internautes : <text:span text:style-name="T39">Chrome, Firefox, Edge, Safari, …</text:span></text:p>
          </table:table-cell>
          <table:table-cell table:style-name="Tableau1.D2" office:value-type="string">
            <text:p text:style-name="P38">HTML, CSS,<text:span text:style-name="T1"> Javascript</text:span></text:p>
          </table:table-cell>
        </table:table-row>
        <table:table-row>
          <table:table-cell table:style-name="Tableau1.A2" office:value-type="string">
            <text:p text:style-name="P32">Serveur</text:p>
          </table:table-cell>
          <table:table-cell table:style-name="Tableau1.A2" office:value-type="string">
            <text:p text:style-name="P31">Ordinateurs spécialisés allumés 24h/24</text:p>
          </table:table-cell>
          <table:table-cell table:style-name="Tableau1.A2" office:value-type="string">
            <text:p text:style-name="P31">Serveurs web : <text:span text:style-name="T40">Apache, Nginx, IIS,…</text:span></text:p>
          </table:table-cell>
          <table:table-cell table:style-name="Tableau1.D2" office:value-type="string">
            <text:p text:style-name="P33">Php, Python, Java,...</text:p>
          </table:table-cell>
        </table:table-row>
      </table:table>
      <text:p text:style-name="P18"/>
      <text:list xml:id="list162533281382314" text:continue-numbering="true" text:style-name="tfNum_20_1_29_">
        <text:list-item>
          <text:p text:style-name="tfTitre_20_1_29_"><text:span text:style-name="T17">Pages</text:span><text:span text:style-name="T2"> web « statiques » </text:span><text:span text:style-name="T15">et</text:span><text:span text:style-name="T2"> </text:span><text:span text:style-name="T17">page</text:span><text:span text:style-name="T2">s web « dynamiques »</text:span></text:p>
        </text:list-item>
      </text:list>
      <text:p text:style-name="Text_20_body"><text:span text:style-name="T2">On </text:span><text:span text:style-name="T17">a coutume de </text:span><text:span text:style-name="T2">distingue</text:span><text:span text:style-name="T17">r</text:span><text:span text:style-name="T2"> les pages web </text:span><text:span text:style-name="T41">statiques</text:span><text:span text:style-name="T2"> </text:span><text:span text:style-name="T24">(</text:span><text:span text:style-name="T2">qui sont enregistrées « telles quelles » sur les disques durs des serveurs Web</text:span><text:span text:style-name="T24">)</text:span><text:span text:style-name="T2"> </text:span><text:span text:style-name="T25">et</text:span><text:span text:style-name="T2"> les pages web </text:span><text:span text:style-name="T41">dynamiques</text:span><text:span text:style-name="T2"> </text:span><text:span text:style-name="T24">(</text:span><text:span text:style-name="T2">dont le code HTML-CSS-JavaScript est généré par le serveur au moment où l'internaute veut les consulter</text:span><text:span text:style-name="T24">)</text:span><text:span text:style-name="T2">.<text:line-break/></text:span>Par exemple, ce site Web est statique alors que le site de Météo France est dynamique <text:span text:style-name="T91">car</text:span><text:span text:style-name="T90"> la météo</text:span> change tout le temps <text:span text:style-name="T93">et n’est pas la m</text:span><text:span text:style-name="T27">ême selon les lieux !</text:span></text:p>
      <text:p text:style-name="Text_20_body"><text:span text:style-name="T25">Dans le cas d’une page web dynamique, le serveur va « calculer » </text:span><text:span text:style-name="T2">le code HTML-CSS-JavaScript </text:span><text:span text:style-name="T25">à envoyer</text:span><text:span text:style-name="T17"> au</text:span><text:span text:style-name="T14"> client</text:span><text:span text:style-name="T2"> </text:span><text:span text:style-name="T25">à l’aide de scripts écrits dans </text:span><text:span text:style-name="T2">langages de programmation comme le </text:span><text:span text:style-name="T13">Php, Python </text:span><text:span text:style-name="T2">ou</text:span><text:span text:style-name="T13"> Java</text:span><text:span text:style-name="T2">. </text:span><text:span text:style-name="T14">C</text:span>es langages serveurs interagissent souvent avec une base de donnée.</text:p>
      <text:p text:style-name="P40"><text:span text:style-name="T90">Remarque :</text:span> Un code Javascript <text:span text:style-name="T90">étant</text:span> exécuté sur le navigateur du client, <text:span text:style-name="T90">il</text:span> ne peut agir que sur la page web en cours, alors qu’un code Php e<text:span text:style-name="T93">st</text:span> exécuté sur le serveur <text:span text:style-name="T93">et</text:span><text:span text:style-name="T90"> </text:span>peut modifier ce qui est stocké sur <text:span text:style-name="T90">le serveur</text:span>.</text:p>
      <text:list xml:id="list162533589117394" text:continue-list="list1078961620" text:style-name="tfNum_20_I_29_">
        <text:list-item>
          <text:p text:style-name="P66"><text:span text:style-name="T3">L</text:span><text:span text:style-name="T2">e protocole HTTP</text:span></text:p>
        </text:list-item>
      </text:list>
      <text:p text:style-name="P11"><text:span text:style-name="T7">Un</text:span><text:span text:style-name="T2"> navigateur et </text:span><text:span text:style-name="T7">un</text:span><text:span text:style-name="T2"> serveur web communique</text:span><text:span text:style-name="T6">nt</text:span><text:span text:style-name="T2"> en utilisant le protocole HTTP </text:span><text:span text:style-name="T9">(</text:span><text:span text:style-name="T2">ou HTTPS</text:span><text:span text:style-name="T9">)</text:span><text:span text:style-name="T2"> q</text:span><text:span text:style-name="T16">ui est un protocole </text:span><text:span text:style-name="T6">de la couche </text:span><text:span text:style-name="T6"><draw:control text:anchor-type="as-char" draw:z-index="2" draw:name="Contrôle 1" draw:style-name="gr1" draw:text-style-name="P68" svg:width="3.998cm" svg:height="0.6cm" draw:control="control1"/></text:span><text:span text:style-name="T6">.</text:span></text:p>
      <text:list text:continue-list="list162533281382314" text:style-name="tfNum_20_1_29_">
        <text:list-item text:start-value="1">
          <text:p text:style-name="P63">Requête<text:span text:style-name="T49">s</text:span> HTTP</text:p>
        </text:list-item>
      </text:list>
      <text:p text:style-name="P29">Supposons que l’on veuille consulter le site <text:a xlink:type="simple" xlink:href="https://tfontanet.github.io/" text:style-name="Internet_20_link" text:visited-style-name="Visited_20_Internet_20_Link">https://tfontanet.github.io/</text:a>. </text:p>
      <text:list xml:id="list162532781789793" text:continue-numbering="true" text:style-name="tfNum_20_1_29_">
        <text:list-item>
          <text:list>
            <text:list-item>
              <text:list>
                <text:list-item text:start-value="1">
                  <text:p text:style-name="P50"><text:span text:style-name="T51">L’internaute tape </text:span><text:span text:style-name="T50">l’adresse du site dans la barre d’adresse du navigateur </text:span><text:span text:style-name="T53">ou clique sur un lien.</text:span></text:p>
                </text:list-item>
              </text:list>
            </text:list-item>
            <text:list-item>
              <text:p text:style-name="P50"><text:span text:style-name="T51">Le navigateur</text:span><text:span text:style-name="T50"> rédige une </text:span><text:span text:style-name="T72">requ</text:span><text:span text:style-name="T44">ête HTTP</text:span><text:span text:style-name="T28"> </text:span><text:span text:style-name="T33">pour demander la page d’accueil du site</text:span><text:span text:style-name="T29"> au</text:span><text:span text:style-name="T28"> serveur </text:span><text:span text:style-name="T29">qui héberge le domaine tfontanet.free.fr.</text:span></text:p>
            </text:list-item>
            <text:list-item>
              <text:p text:style-name="P51">Le serveur reçoit la requête et y répond en envoyant le source html de la page web demandée.</text:p>
            </text:list-item>
            <text:list-item>
              <text:p text:style-name="P52"><text:span text:style-name="T1">Le navigateur </text:span><text:span text:style-name="T34">l</text:span><text:span text:style-name="T1">it le source html </text:span><text:span text:style-name="T34">et</text:span><text:span text:style-name="T1"> identifie les ressources supplémentaires dont il va avoir besoin pour afficher la page </text:span><text:span text:style-name="T33">(</text:span><text:span text:style-name="T1">images, feuilles css,…</text:span><text:span text:style-name="T33">), </text:span><text:span text:style-name="T34">puis</text:span><text:span text:style-name="T33"> </text:span><text:span text:style-name="T34">il</text:span><text:span text:style-name="T30"> </text:span><text:span text:style-name="T31">envoie au serveur</text:span><text:span text:style-name="T1"> </text:span><text:span text:style-name="T31">d</text:span><text:span text:style-name="T1">es </text:span><text:span text:style-name="T43">requêtes</text:span><text:span text:style-name="T1"> supplémentaires pour obtenir ces ressources.</text:span></text:p>
            </text:list-item>
            <text:list-item>
              <text:p text:style-name="P53">Le navigateur <text:span text:style-name="T62">reçoit ces ressources au fur et à mesure et </text:span>affiche la page web.</text:p>
            </text:list-item>
          </text:list>
        </text:list-item>
      </text:list>
      <text:p text:style-name="P1"/>
      <text:p text:style-name="P2">Exemple de requ<text:span text:style-name="T1">ête envoyée par le navigateur :</text:span></text:p>
      <text:p text:style-name="Requête_20_HTTP">GET / HTTP/1.1</text:p>
      <text:p text:style-name="P4">Accept: */*</text:p>
      <text:p text:style-name="P4">Accept-Encoding: gzip, deflate</text:p>
      <text:p text:style-name="P4">Connection: keep-alive</text:p>
      <text:p text:style-name="P4">Host: tfontanet.github.io</text:p>
      <text:p text:style-name="P4">User-Agent: Chrome/114.0.0.0 (X11; Linux x86_64)</text:p>
      <text:p text:style-name="P42"/>
      <text:p text:style-name="P13"><text:span text:style-name="T10">Cette</text:span><text:span text:style-name="T2"> requête commence par : </text:span><text:span text:style-name="T60">GET</text:span><text:span text:style-name="T35"> </text:span><text:span text:style-name="T64">/</text:span><text:span text:style-name="T35"> </text:span><text:span text:style-name="T55">HTTP/1.1</text:span></text:p>
      <text:list xml:id="list3735700807" text:style-name="tfPuce">
        <text:list-item>
          <text:p text:style-name="P55"><text:span text:style-name="T60">GET</text:span><text:span text:style-name="T2"> </text:span><text:span text:style-name="T10">désigne la « méthode HTTP » à utiliser (voir ci-dessous).</text:span></text:p>
        </text:list-item>
        <text:list-item>
          <text:p text:style-name="P55"><text:span text:style-name="T36"><text:s/></text:span><text:span text:style-name="T65">/</text:span><text:span text:style-name="T36"> </text:span><text:span text:style-name="T66"><text:s/>précise le nom du fichier demandé au serveur </text:span><text:span text:style-name="T67">(</text:span><text:span text:style-name="T66">Ici, le slash désigne la page d’accueil du site</text:span><text:span text:style-name="T67">)</text:span><text:span text:style-name="T66">.</text:span></text:p>
        </text:list-item>
        <text:list-item>
          <text:p text:style-name="P54"><text:span text:style-name="T56">HTTP/1.1</text:span> <text:span text:style-name="T66">correspond à la version du protocole HTTP utilisée.</text:span></text:p>
        </text:list-item>
      </text:list>
      <text:p text:style-name="Standard"/>
      <text:p text:style-name="Standard"><text:span text:style-name="T66">A cette requ</text:span><text:span text:style-name="T37">ête, le serveur va répondre </text:span><text:span text:style-name="T38">par un message en deux parties </text:span><text:span text:style-name="T45">avec</text:span><text:span text:style-name="T73"> </text:span><text:span text:style-name="T58">ent</text:span><text:span text:style-name="T59">ête</text:span><text:span text:style-name="T32"> puis </text:span><text:span text:style-name="T54">données</text:span> :</text:p>
      <text:p text:style-name="P5">HTTP/1.1 200 OK</text:p>
      <text:p text:style-name="P5">Accept-Ranges: bytes</text:p>
      <text:p text:style-name="P5">Connection: close</text:p>
      <text:p text:style-name="P5">Content-Length: 2695</text:p>
      <text:p text:style-name="P5">Content-Type: text/html</text:p>
      <text:p text:style-name="P5">Date: Thu, 27 Jul 2023 14:25:43 GMT</text:p>
      <text:p text:style-name="P5">ETag: "84c176-a87-64c0b5ec"</text:p>
      <text:p text:style-name="P5">Last-Modified: Wed, 26 Jul 2023 05:58:04 GMT</text:p>
      <text:p text:style-name="P5">Server: Apache/ProXad [Jan 23 2019 20:05:46]</text:p>
      <text:p text:style-name="P3"/>
      <text:p text:style-name="P6">&lt;!doctype html&gt;</text:p>
      <text:p text:style-name="P6">&lt;html lang="fr"&gt;</text:p>
      <text:p text:style-name="P6"><text:s text:c="2"/>&lt;head&gt;</text:p>
      <text:p text:style-name="P6"><text:s text:c="4"/>&lt;title&gt;Cours, devoirs et activités mathématiques à télécharger&lt;/title&gt;</text:p>
      <text:p text:style-name="P6"><text:s text:c="4"/>&lt;meta charset="utf-8"&gt;</text:p>
      <text:p text:style-name="P6"><text:s text:c="4"/>&lt;meta name="viewport" content="width=device-width, initial-scale=1.0"&gt;</text:p>
      <text:p text:style-name="P6"><text:s text:c="4"/>&lt;link rel="stylesheet" type="text/css" href="style.css"&gt;</text:p>
      <text:p text:style-name="P6"><text:s text:c="2"/>&lt;/head&gt;</text:p>
      <text:p text:style-name="P6"><text:s text:c="2"/>&lt;body&gt;</text:p>
      <text:p text:style-name="P6"><text:s text:c="4"/>&lt;div id="marges"&gt;</text:p>
      <text:p text:style-name="P6"><text:s text:c="4"/>………………..………………...</text:p>
      <text:list text:continue-list="list162532781789793" text:style-name="tfNum_20_1_29_">
        <text:list-item>
          <text:p text:style-name="P64">HTTP ou HTTP<text:span text:style-name="T47">S</text:span> ?</text:p>
        </text:list-item>
      </text:list>
      <text:p text:style-name="P16">Avec le protocole HTTP, les échanges de données se font « en clair ». Si quelqu’un place un équipement pour intercepter le flux de données entre un internaute et un serveur, il aura accès à toutes les données échangées.</text:p>
      <text:p text:style-name="P16">Avec le protocole HTTPS, les échanges de données sont chiffrés. Une personne malintentionnée pourra toujours intercepter le flux de données entre un internaute et un serveur mais ce flux sera inexploitable pour elle car elle ne dispose pas de la clé de déchiffrement.</text:p>
      <text:p text:style-name="P8"><text:span text:style-name="T6">Tant qu’un internaute consulte des sites publics sur lesquels il ne transmet aucune information personnelle (identifiants,…), le protocole HTTP est suffisant. En revanche, </text:span><text:span text:style-name="T8">s’i</text:span><text:span text:style-name="T12">l doit</text:span><text:span text:style-name="T6"> par exemple s’identifie</text:span><text:span text:style-name="T8">r</text:span><text:span text:style-name="T6"> sur un site, il </text:span><text:span text:style-name="T8">est prudent de</text:span><text:span text:style-name="T6"> vérifier que la connexion est bien en HTTPS pour éviter que </text:span><text:span text:style-name="T8">le</text:span><text:span text:style-name="T6"> mot de passe ne transite en clair sur le réseau.</text:span></text:p>
      <text:p text:style-name="P15"/>
      <text:list xml:id="list162534279510297" text:continue-numbering="true" text:style-name="tfNum_20_1_29_">
        <text:list-item>
          <text:p text:style-name="tfTitre_20_1_29_">Code de réponse du serveur</text:p>
        </text:list-item>
      </text:list>
      <text:p text:style-name="P26">Dans la première ligne de la réponse du serveur, il y a <text:span text:style-name="T89">toujours </text:span>un code HTTP.<text:line-break/><text:span text:style-name="T89">Citons ici q</text:span><text:span text:style-name="T85">uelques codes à connaître</text:span> :</text:p>
      <table:table table:name="Tableau3" table:style-name="Tableau3">
        <table:table-column table:style-name="Tableau3.A"/>
        <table:table-column table:style-name="Tableau3.B"/>
        <table:table-row>
          <table:table-cell table:style-name="Tableau3.A1" office:value-type="string">
            <text:p text:style-name="P39">Code</text:p>
          </table:table-cell>
          <table:table-cell table:style-name="Tableau3.B1" office:value-type="string">
            <text:p text:style-name="P39">Signification</text:p>
          </table:table-cell>
        </table:table-row>
        <table:table-row>
          <table:table-cell table:style-name="Tableau3.A2" office:value-type="string">
            <text:p text:style-name="P39">200</text:p>
          </table:table-cell>
          <table:table-cell table:style-name="Tableau3.B2" office:value-type="string">
            <text:p text:style-name="P35"><draw:control text:anchor-type="as-char" draw:z-index="3" draw:name="Contrôle 2" draw:style-name="gr1" draw:text-style-name="P68" svg:width="8.841cm" svg:height="0.6cm" draw:control="control2"/></text:p>
          </table:table-cell>
        </table:table-row>
        <table:table-row>
          <table:table-cell table:style-name="Tableau3.A2" office:value-type="string">
            <text:p text:style-name="P39">304</text:p>
          </table:table-cell>
          <table:table-cell table:style-name="Tableau3.B2" office:value-type="string">
            <text:p text:style-name="P35"><draw:control text:anchor-type="as-char" draw:z-index="4" draw:name="Contrôle 4" draw:style-name="gr1" draw:text-style-name="P68" svg:width="8.841cm" svg:height="0.6cm" draw:control="control3"/></text:p>
          </table:table-cell>
        </table:table-row>
        <table:table-row>
          <table:table-cell table:style-name="Tableau3.A2" office:value-type="string">
            <text:p text:style-name="P39">404</text:p>
          </table:table-cell>
          <table:table-cell table:style-name="Tableau3.B2" office:value-type="string">
            <text:p text:style-name="P35"><draw:control text:anchor-type="as-char" draw:z-index="5" draw:name="Contrôle 6" draw:style-name="gr1" draw:text-style-name="P68" svg:width="8.841cm" svg:height="0.6cm" draw:control="control4"/></text:p>
          </table:table-cell>
        </table:table-row>
      </table:table>
      <text:p text:style-name="P26"/>
      <text:p text:style-name="P26"/>
      <text:p text:style-name="P26"/>
      <text:list text:continue-list="list162533589117394" text:style-name="tfNum_20_I_29_">
        <text:list-item>
          <text:p text:style-name="P67"><text:span text:style-name="T76">Échanges de données : </text:span>Le cas des formulaires HTML</text:p>
        </text:list-item>
      </text:list>
      <text:list text:continue-list="list162534279510297" text:style-name="tfNum_20_1_29_">
        <text:list-item text:start-value="1">
          <text:p text:style-name="tfTitre_20_1_29_">Introduction</text:p>
        </text:list-item>
      </text:list>
      <text:p text:style-name="P17">Le client et le serveur sont amenés à échanger <text:span text:style-name="T78">régulièrement</text:span><text:span text:style-name="T77"> </text:span>des données. <text:line-break/><text:span text:style-name="T78">La plupart du temps</text:span>, <text:span text:style-name="T77">l’internaute se contente de consulter des pages web. </text:span><text:span text:style-name="T78">Dans ce cas,</text:span><text:span text:style-name="T77"> </text:span>les données (<text:span text:style-name="T78">= </text:span>source HTML, CSS ou Javascript, images, vidéos,…) vont <text:span text:style-name="T80">uniquement </text:span>du serveur au client. <text:line-break/><text:span text:style-name="T77">Toutefois, il arrive </text:span><text:span text:style-name="T78">aussi</text:span><text:span text:style-name="T77"> que le client ait à communiquer des informations au serveur </text:span><text:span text:style-name="T79">(= </text:span><text:span text:style-name="T80">d</text:span><text:span text:style-name="T77">es identifiants pour se connecter à un site, </text:span><text:span text:style-name="T88">sa position GPS, </text:span><text:span text:style-name="T77">un fichier à mettre sur le cloud,…</text:span><text:span text:style-name="T79">).</text:span><text:span text:style-name="T77"> Dans ce cas, l’échange client vers serveur se fait habituellement via un </text:span><text:span text:style-name="T69">formulaire HTML</text:span><text:span text:style-name="T77">.</text:span></text:p>
      <text:p text:style-name="P17"/>
      <text:list text:continue-numbering="true" text:style-name="tfNum_20_1_29_">
        <text:list-item>
          <text:p text:style-name="tfTitre_20_1_29_">Exemple de formulaire <text:span text:style-name="T80">HTML</text:span> :</text:p>
        </text:list-item>
      </text:list>
      <table:table table:name="Tableau2" table:style-name="Tableau2">
        <table:table-column table:style-name="Tableau2.A"/>
        <table:table-column table:style-name="Tableau2.B"/>
        <table:table-row>
          <table:table-cell table:style-name="Tableau2.A1" office:value-type="string">
            <text:p text:style-name="P37">Code HTML</text:p>
          </table:table-cell>
          <table:table-cell table:style-name="Tableau2.B1" office:value-type="string">
            <text:p text:style-name="P37">Rendu sur le navigateur</text:p>
          </table:table-cell>
        </table:table-row>
        <table:table-row>
          <table:table-cell table:style-name="Tableau2.A2" office:value-type="string">
            <text:p text:style-name="P45">&lt;form action="<text:span text:style-name="T57">1nsi-client-serveur-reponse.php</text:span>" method="get"&gt;</text:p>
            <text:p text:style-name="P45"><text:s text:c="2"/>&lt;fieldset&gt;</text:p>
            <text:p text:style-name="P45"><text:s text:c="4"/>&lt;legend&gt;Votre nom&lt;/legend&gt;</text:p>
            <text:p text:style-name="P45"><text:s text:c="4"/>&lt;p&gt;Nom : &lt;input type="text" <text:span text:style-name="T57">name</text:span>="nom" <text:span text:style-name="T57">value</text:span>=""&gt;&lt;/p&gt;</text:p>
            <text:p text:style-name="P45"><text:s text:c="4"/>&lt;p&gt;</text:p>
            <text:p text:style-name="P45"><text:s text:c="6"/>J'étudie NSI : </text:p>
            <text:p text:style-name="P45"><text:s text:c="6"/>&lt;input type="radio" <text:span text:style-name="T57">name</text:span>="nsi" <text:span text:style-name="T57">value</text:span>="Yes" checked&gt; Oui</text:p>
            <text:p text:style-name="P45"><text:s text:c="6"/>&amp;nbsp;&amp;nbsp;&amp;nbsp;</text:p>
            <text:p text:style-name="P45"><text:s text:c="6"/>&lt;input type="radio" <text:span text:style-name="T57">name</text:span>="nsi" <text:span text:style-name="T57">value</text:span>="No"&gt; Non</text:p>
            <text:p text:style-name="P45"><text:s text:c="4"/>&lt;/p&gt;</text:p>
            <text:p text:style-name="P45"><text:s text:c="2"/>&lt;/fieldset&gt;</text:p>
            <text:p text:style-name="P45"><text:s text:c="2"/>&lt;br&gt;</text:p>
            <text:p text:style-name="P45"><text:s text:c="2"/>&lt;div class="center"&gt;</text:p>
            <text:p text:style-name="P45"><text:s text:c="4"/>&lt;input type="submit" value="Validez votre réponse"&gt;</text:p>
            <text:p text:style-name="P45"><text:s text:c="2"/>&lt;/div&gt;</text:p>
            <text:p text:style-name="P45">&lt;/form&gt;</text:p>
          </table:table-cell>
          <table:table-cell table:style-name="Tableau2.B2" office:value-type="string">
            <text:p text:style-name="P36"><draw:frame draw:style-name="fr1" draw:name="Image1" text:anchor-type="as-char" svg:width="9.308cm" svg:height="5.717cm" draw:z-index="1"><draw:image xlink:href="Pictures/10000000000002830000018B9C731E24.png" xlink:type="simple" xlink:show="embed" xlink:actuate="onLoad" draw:mime-type="image/png"/></draw:frame></text:p>
          </table:table-cell>
        </table:table-row>
      </table:table>
      <text:p text:style-name="P23"><text:a xlink:type="simple" xlink:href="https://tfontanet.github.io/1nsi/1nsi-client-serveur-formulaire.html" text:style-name="Internet_20_link" text:visited-style-name="Visited_20_Internet_20_Link">Lien vers le formulaire</text:a></text:p>
      <text:p text:style-name="P19"/>
      <text:p text:style-name="P19"><text:span text:style-name="T80">Quand l’internaute va cliquer sur le bouton « Validez votre réponse », </text:span><text:span text:style-name="T82">cela va déclencher une série d’actions :</text:span></text:p>
      <text:list xml:id="list162534044838897" text:continue-numbering="true" text:style-name="tfNum_20_1_29_">
        <text:list-item>
          <text:list>
            <text:list-item>
              <text:p text:style-name="P56"><text:span text:style-name="T82">Le client va envoyer au serveur les réponses de l’internaute appelée</text:span><text:span text:style-name="T92">s</text:span><text:span text:style-name="T82"> « paramètres ». Dans le formulaire ci-dessus, il y a 2 paramètres </text:span><text:span text:style-name="T83">qui s’appellent </text:span><text:span text:style-name="T71">nom</text:span><text:span text:style-name="T83"> et </text:span><text:span text:style-name="T71">nsi</text:span><text:span text:style-name="T83">.</text:span></text:p>
            </text:list-item>
            <text:list-item>
              <text:p text:style-name="P57"><text:span text:style-name="T80">Le serveur va exécuter le code php de</text:span> la page « 1nsi-client-serveur-reponse.php » <text:span text:style-name="T81">en utilisant les</text:span><text:span text:style-name="T80"> </text:span><text:span text:style-name="T82">valeurs des paramètres</text:span><text:span text:style-name="T81"> </text:span><text:span text:style-name="T80">pour produire une </text:span><text:span text:style-name="T83">nouvelle </text:span><text:span text:style-name="T80">page HTML.</text:span></text:p>
            </text:list-item>
            <text:list-item>
              <text:p text:style-name="P57"><text:span text:style-name="T81">Le serveur va envoyer cette page HTML</text:span><text:span text:style-name="T80"> au client.</text:span></text:p>
            </text:list-item>
          </text:list>
        </text:list-item>
      </text:list>
      <text:p text:style-name="P20"/>
      <text:p text:style-name="P27">Remarques :</text:p>
      <text:list xml:id="list162532479145026" text:continue-list="list3735700807" text:style-name="tfPuce">
        <text:list-item>
          <text:p text:style-name="P58"><text:span text:style-name="T81">Un</text:span> formulaire est encadré par les balises &lt;form&gt; et &lt;/form&gt; <text:span text:style-name="T81">et utilise </text:span><text:span text:style-name="T83">autant</text:span><text:span text:style-name="T81"> de balises &lt;input type="????" name="????" value="????"&gt; </text:span><text:span text:style-name="T83">qu’il y a de paramètres à transmettre</text:span><text:span text:style-name="T81">.</text:span></text:p>
        </text:list-item>
        <text:list-item>
          <text:p text:style-name="P58"><text:span text:style-name="T81">Les attributs </text:span><text:span text:style-name="T70">name</text:span><text:span text:style-name="T81"> et </text:span><text:span text:style-name="T70">value</text:span><text:span text:style-name="T81"> permettront au langage serveur de récupérer les valeurs entrées par l’internaute.</text:span></text:p>
        </text:list-item>
        <text:list-item>
          <text:p text:style-name="P59">Ce mécanisme est écrit en pur HTML. Il n’est pas utile d’ajouter ici du JavaScript.</text:p>
        </text:list-item>
      </text:list>
      <text:p text:style-name="P21"/>
      <text:list xml:id="list162533690496225" text:continue-list="list162534044838897" text:style-name="tfNum_20_1_29_">
        <text:list-item>
          <text:p text:style-name="P65">Méthodes GET et POST</text:p>
        </text:list-item>
      </text:list>
      <text:p text:style-name="P22">Une requête HTTP commence par un mot clé qui précise le type d’action attendu. On parle de « méthode HTTP ». </text:p>
      <text:p text:style-name="P22"><text:span text:style-name="T84">Lors de l’envoi d’un </text:span><text:span text:style-name="T81">formulaire, il faut choisir entre </text:span><text:span text:style-name="T70">GET</text:span><text:span text:style-name="T81"> et </text:span><text:span text:style-name="T70">POST :</text:span></text:p>
      <text:list text:continue-list="list162532479145026" text:style-name="tfPuce">
        <text:list-item>
          <text:p text:style-name="P61"><text:span text:style-name="T19">La méthode GET </text:span><text:span text:style-name="T11">v</text:span><text:span text:style-name="T20">a insérer les valeurs des paramètres dans l’URL (peu discret, mais pratique </text:span><text:span text:style-name="T21">si on veut que le navigateur mémorise nos réponses</text:span><text:span text:style-name="T22">)</text:span><text:span text:style-name="T21">.</text:span></text:p>
        </text:list-item>
      </text:list>
      <text:p text:style-name="P43"><text:span text:style-name="T21">E</text:span><text:span text:style-name="T2">x avec le formulaire précédent :</text:span></text:p>
      <text:p text:style-name="P41">GET /1nsi/1nsi-client-serveur-reponse.php?<text:span text:style-name="T47">nom=Thibaud&amp;nsi=Yes</text:span> HTTP/1.1</text:p>
      <text:p text:style-name="P48">Host: <text:span text:style-name="T61">fdcsjh.free.fr</text:span></text:p>
      <text:list text:continue-numbering="true" text:style-name="tfPuce">
        <text:list-item>
          <text:p text:style-name="P62"><text:span text:style-name="T19">La méthode </text:span><text:span text:style-name="T22">POST</text:span><text:span text:style-name="T19"> </text:span><text:span text:style-name="T11">v</text:span><text:span text:style-name="T20">a insérer les valeurs des paramètres dans l</text:span><text:span text:style-name="T22">e corps de la requête</text:span><text:span text:style-name="T20"> (p</text:span><text:span text:style-name="T22">lus</text:span><text:span text:style-name="T20"> discret, </text:span><text:span text:style-name="T22">et </text:span><text:span text:style-name="T26">même </text:span><text:span text:style-name="T22">indispensable s’il y a un volume important de données à transmettre)</text:span><text:span text:style-name="T21">.</text:span></text:p>
        </text:list-item>
      </text:list>
      <text:p text:style-name="P25">Même requête que ci-dessus mais avec la méthode POST :</text:p>
      <text:p text:style-name="P24">POST /1nsi/1nsi-client-serveur-reponse.php HTTP/1.1</text:p>
      <text:p text:style-name="P49">Host: <text:span text:style-name="T61">fdcsjh.free.fr</text:span></text:p>
      <text:p text:style-name="P24">Content-Type: application/x-www-form-urlencoded</text:p>
      <text:p text:style-name="P24">Content-Length: 16</text:p>
      <text:p text:style-name="P24"/>
      <text:p text:style-name="P44">nom=Thibaud&amp;nsi=Yes</text:p>
      <text:p text:style-name="P9"/>
      <text:list text:continue-list="list162533690496225" text:style-name="tfNum_20_1_29_">
        <text:list-item>
          <text:p text:style-name="tfTitre_20_1_29_">Exemple de code Php <text:span text:style-name="T86">exécuté c</text:span><text:span text:style-name="T87">ôté serveur</text:span></text:p>
        </text:list-item>
      </text:list>
      <text:p text:style-name="P47">Voici le code de la page « 1nsi-client-serveur-reponse.php » :</text:p>
      <text:p text:style-name="P46">&lt;?php </text:p>
      <text:p text:style-name="P46"><text:s text:c="2"/>$methode = "Inconnue";</text:p>
      <text:p text:style-name="P46"><text:s text:c="2"/>$nom = "Anonyme";</text:p>
      <text:p text:style-name="P46"><text:s text:c="2"/>$nsi = "et vous auriez mieux fait de choisir NSI ;-(";</text:p>
      <text:p text:style-name="P46"><text:s text:c="2"/>if (isset($_GET['nom'])) {</text:p>
      <text:p text:style-name="P46"><text:s text:c="4"/>$methode = "GET";</text:p>
      <text:p text:style-name="P46"><text:s text:c="4"/>$nom = $_GET['nom'];</text:p>
      <text:p text:style-name="P46"><text:s text:c="4"/>if ($_GET['nsi'] == "Yes") {$nsi = "et vous avez bien fait de choisir NSI ;-)";}</text:p>
      <text:p text:style-name="P46"><text:s text:c="2"/>} elseif (isset($_POST['nom'])) {</text:p>
      <text:p text:style-name="P46"><text:s text:c="4"/>$methode = "POST";</text:p>
      <text:p text:style-name="P46"><text:s text:c="4"/>$nom = $_POST['nom'];</text:p>
      <text:p text:style-name="P46"><text:s text:c="4"/>if ($_POST['nsi'] == "Yes") {$nsi = "et vous avez bien fait de choisir NSI ;-)";}</text:p>
      <text:p text:style-name="P46"><text:s text:c="2"/>}</text:p>
      <text:p text:style-name="P46">?&gt;</text:p>
      <text:p text:style-name="P46">&lt;!doctype html&gt;</text:p>
      <text:p text:style-name="P46">&lt;html lang="fr"&gt;</text:p>
      <text:p text:style-name="P46"><text:s text:c="4"/>&lt;meta charset="utf-8"&gt;</text:p>
      <text:p text:style-name="P46"><text:s text:c="4"/>&lt;style&gt;</text:p>
      <text:p text:style-name="P46"><text:s text:c="6"/>body {background-color: #e8e8e8; font-family: sans-serif}</text:p>
      <text:p text:style-name="P46"><text:s text:c="6"/>div {margin: auto; max-width: 400px; background-color: #ffffff; padding: 30px}</text:p>
      <text:p text:style-name="P46"><text:s text:c="6"/>fieldset {background-color: #f8f8f8; padding: 15px; border: 3px solid #d4d4d4; border-radius: 10px}</text:p>
      <text:p text:style-name="P46"><text:s text:c="4"/>&lt;/style&gt;</text:p>
      <text:p text:style-name="P46"><text:s text:c="2"/>&lt;/head&gt;</text:p>
      <text:p text:style-name="P46"><text:s text:c="2"/>&lt;body&gt;</text:p>
      <text:p text:style-name="P46"><text:s text:c="4"/>&lt;br&gt;&lt;br&gt;</text:p>
      <text:p text:style-name="P46"><text:s text:c="4"/>&lt;div&gt;</text:p>
      <text:p text:style-name="P46"><text:s text:c="6"/>&lt;fieldset&gt;</text:p>
      <text:p text:style-name="P46"><text:s text:c="8"/>&lt;legend&gt;Bonjour &lt;?php echo $nom ?&gt;&lt;/legend&gt;</text:p>
      <text:p text:style-name="P46"><text:s text:c="8"/>&lt;p&gt;Vous avez utilisé la méthode : &lt;?php echo $methode ?&gt;&lt;/p&gt;</text:p>
      <text:p text:style-name="P46"><text:s text:c="8"/>&lt;p&gt;&lt;?php echo "Il est ".date("H:i:s").", votre IP est ".$_SERVER['REMOTE_ADDR']; ?&gt;&lt;/p&gt;</text:p>
      <text:p text:style-name="P46"><text:s text:c="8"/>&lt;p&gt;&lt;?php echo $nsi ?&gt;&lt;/p&gt;</text:p>
      <text:p text:style-name="P46"><text:s text:c="6"/>&lt;/fieldset&gt;</text:p>
      <text:p text:style-name="P46"><text:s text:c="4"/>&lt;/div&gt;&lt;br&gt;&lt;br&gt;</text:p>
      <text:p text:style-name="P46"><text:s text:c="2"/>&lt;/body&gt;</text:p>
      <text:p text:style-name="P46">&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Normal" style:font-family-generic="swiss"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4"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Requête_20_HTTP" style:display-name="Requête HTTP" style:family="paragraph" style:parent-style-name="Standard">
      <loext:graphic-properties draw:fill="solid" draw:fill-color="#eeeeee"/>
      <style:paragraph-properties fo:margin-left="1cm" fo:margin-right="1cm" fo:text-indent="0cm" style:auto-text-indent="false" fo:background-color="#eeeeee" fo:padding="0.25cm" fo:border="0.74pt solid #000000"/>
      <style:text-properties fo:color="#8b4513" loext:opacity="100%" officeooo:rsid="0107563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201cm" fo:margin-right="0.201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0P0" style:volatile="true">
      <number:number number:decimal-places="2" number:min-decimal-places="2" number:min-integer-digits="1" number:grouping="true"/>
      <number:text> </number:text>
      <number:currency-symbol number:language="fr" number:country="FR">F</number:currency-symbol>
    </number:currency-style>
    <number:currency-style style:name="N120">
      <number:text>-</number:text>
      <number:number number:decimal-places="2" number:min-decimal-places="2" number:min-integer-digits="1" number:grouping="true"/>
      <number:text> </number:text>
      <number:currency-symbol number:language="fr" number:country="FR">F</number:currency-symbol>
      <style:map style:condition="value()&gt;=0" style:apply-style-name="N120P0"/>
    </number:currency-style>
    <number:currency-style style:name="N121P0" style:volatile="true">
      <number:number number:decimal-places="0" number:min-decimal-places="0" number:min-integer-digits="1" number:grouping="true"/>
      <number:text> </number:text>
      <number:currency-symbol number:language="fr" number:country="FR">F</number:currency-symbol>
    </number:currency-style>
    <number:currency-style style:name="N121">
      <number:text>-</number:text>
      <number:number number:decimal-places="0" number:min-decimal-places="0" number:min-integer-digits="1" number:grouping="true"/>
      <number:text> </number:text>
      <number:currency-symbol number:language="fr" number:country="FR">F</number:currency-symbol>
      <style:map style:condition="value()&gt;=0" style:apply-style-name="N121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24.2.7.2$Linux_X86_64 LibreOffice_project/420$Build-2</meta:generator>
    <dc:date>2026-05-27T16:25:32.303865293</dc:date>
    <meta:editing-duration>P1DT1H25M11S</meta:editing-duration>
    <meta:editing-cycles>213</meta:editing-cycles>
    <meta:document-statistic meta:table-count="3" meta:image-count="2" meta:object-count="0" meta:page-count="5" meta:paragraph-count="162" meta:word-count="1394" meta:character-count="9088" meta:non-whitespace-character-count="7660"/>
  </office:meta>
</office:document-meta>
</file>