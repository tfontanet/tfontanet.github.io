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A0000010D2EA6ACA6.png" manifest:media-type="image/png"/>
  <manifest:file-entry manifest:full-path="Pictures/100000000000014A000000F83455D3DD.png" manifest:media-type="image/png"/>
  <manifest:file-entry manifest:full-path="Pictures/100000000000014A000000F8BB3738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office:font-face-decls>
  <office:automatic-styles>
    <style:style style:name="Tableau3" style:family="table">
      <style:table-properties style:width="19.59cm" table:align="margins"/>
    </style:style>
    <style:style style:name="Tableau3.A" style:family="table-column">
      <style:table-column-properties style:column-width="1.632cm" style:rel-column-width="5460*"/>
    </style:style>
    <style:style style:name="Tableau3.B" style:family="table-column">
      <style:table-column-properties style:column-width="1.632cm" style:rel-column-width="5461*"/>
    </style:style>
    <style:style style:name="Tableau3.F" style:family="table-column">
      <style:table-column-properties style:column-width="1.633cm" style:rel-column-width="5462*"/>
    </style:style>
    <style:style style:name="Tableau3.L" style:family="table-column">
      <style:table-column-properties style:column-width="1.633cm" style:rel-column-width="5467*"/>
    </style:style>
    <style:style style:name="Tableau3.A1" style:family="table-cell">
      <style:table-cell-properties fo:padding="0.097cm" fo:border-left="1pt solid #000000" fo:border-right="none" fo:border-top="1pt solid #000000" fo:border-bottom="1pt solid #000000"/>
    </style:style>
    <style:style style:name="Tableau3.L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L2" style:family="table-cell">
      <style:table-cell-properties fo:padding="0.097cm" fo:border-left="1pt solid #000000" fo:border-right="1pt solid #000000" fo:border-top="none" fo:border-bottom="1pt solid #000000"/>
    </style:style>
    <style:style style:name="Tableau8" style:family="table">
      <style:table-properties style:width="14.4cm" table:align="center"/>
    </style:style>
    <style:style style:name="Tableau8.A" style:family="table-column">
      <style:table-column-properties style:column-width="6.001cm"/>
    </style:style>
    <style:style style:name="Tableau8.B" style:family="table-column">
      <style:table-column-properties style:column-width="1.679cm"/>
    </style:style>
    <style:style style:name="Tableau8.D" style:family="table-column">
      <style:table-column-properties style:column-width="1.681cm"/>
    </style:style>
    <style:style style:name="Tableau8.A1" style:family="table-cell">
      <style:table-cell-properties fo:padding="0.097cm" fo:border-left="none" fo:border-right="none" fo:border-top="none" fo:border-bottom="1pt solid #000000"/>
    </style:style>
    <style:style style:name="Tableau8.B1" style:family="table-cell">
      <style:table-cell-properties fo:padding="0.097cm" fo:border="1pt solid #000000"/>
    </style:style>
    <style:style style:name="Tableau8.B2" style:family="table-cell">
      <style:table-cell-properties fo:padding="0.097cm" fo:border-left="1pt solid #000000" fo:border-right="none" fo:border-top="none" fo:border-bottom="1pt solid #000000"/>
    </style:style>
    <style:style style:name="Tableau8.F2" style:family="table-cell">
      <style:table-cell-properties fo:padding="0.097cm" fo:border-left="1pt solid #000000" fo:border-right="1pt solid #000000" fo:border-top="none" fo:border-bottom="1pt solid #000000"/>
    </style:style>
    <style:style style:name="Tableau1" style:family="table">
      <style:table-properties style:width="19.59cm" fo:margin-top="0.199cm" fo:margin-bottom="0.199cm" table:align="margins"/>
    </style:style>
    <style:style style:name="Tableau1.A" style:family="table-column">
      <style:table-column-properties style:column-width="0.984cm" style:rel-column-width="3295*"/>
    </style:style>
    <style:style style:name="Tableau1.B" style:family="table-column">
      <style:table-column-properties style:column-width="1.162cm" style:rel-column-width="3887*"/>
    </style:style>
    <style:style style:name="Tableau1.C" style:family="table-column">
      <style:table-column-properties style:column-width="1.388cm" style:rel-column-width="4643*"/>
    </style:style>
    <style:style style:name="Tableau1.D" style:family="table-column">
      <style:table-column-properties style:column-width="1.616cm" style:rel-column-width="5405*"/>
    </style:style>
    <style:style style:name="Tableau1.E" style:family="table-column">
      <style:table-column-properties style:column-width="1.842cm" style:rel-column-width="6160*"/>
    </style:style>
    <style:style style:name="Tableau1.F" style:family="table-column">
      <style:table-column-properties style:column-width="2.067cm" style:rel-column-width="6916*"/>
    </style:style>
    <style:style style:name="Tableau1.G" style:family="table-column">
      <style:table-column-properties style:column-width="2.293cm" style:rel-column-width="7672*"/>
    </style:style>
    <style:style style:name="Tableau1.H" style:family="table-column">
      <style:table-column-properties style:column-width="2.519cm" style:rel-column-width="8428*"/>
    </style:style>
    <style:style style:name="Tableau1.I" style:family="table-column">
      <style:table-column-properties style:column-width="2.745cm" style:rel-column-width="9184*"/>
    </style:style>
    <style:style style:name="Tableau1.J" style:family="table-column">
      <style:table-column-properties style:column-width="2.972cm" style:rel-column-width="9945*"/>
    </style:style>
    <style:style style:name="Tableau1.1" style:family="table-row">
      <style:table-row-properties style:min-row-height="0.487cm" fo:keep-together="auto"/>
    </style:style>
    <style:style style:name="Tableau1.A1" style:family="table-cell">
      <style:table-cell-properties style:vertical-align="bottom" fo:padding-left="0.049cm" fo:padding-right="0.049cm" fo:padding-top="0cm" fo:padding-bottom="0cm" fo:border-left="1pt solid #000000" fo:border-right="none" fo:border-top="1pt solid #000000" fo:border-bottom="1pt solid #000000"/>
    </style:style>
    <style:style style:name="Tableau1.J1" style:family="table-cell">
      <style:table-cell-properties style:vertical-align="bottom" fo:padding-left="0.049cm" fo:padding-right="0.049cm" fo:padding-top="0cm" fo:padding-bottom="0cm" fo:border="1pt solid #000000"/>
    </style:style>
    <style:style style:name="Tableau1.A2" style:family="table-cell">
      <style:table-cell-properties style:vertical-align="bottom" fo:padding-left="0.049cm" fo:padding-right="0.049cm" fo:padding-top="0cm" fo:padding-bottom="0cm" fo:border-left="1pt solid #000000" fo:border-right="none" fo:border-top="none" fo:border-bottom="none"/>
    </style:style>
    <style:style style:name="Tableau1.J2" style:family="table-cell">
      <style:table-cell-properties style:vertical-align="bottom" fo:padding-left="0.049cm" fo:padding-right="0.049cm" fo:padding-top="0cm" fo:padding-bottom="0cm" fo:border-left="1pt solid #000000" fo:border-right="1pt solid #000000" fo:border-top="none" fo:border-bottom="none"/>
    </style:style>
    <style:style style:name="Tableau1.F38" style:family="table-cell" style:data-style-name="N0">
      <style:table-cell-properties style:vertical-align="bottom" fo:padding-left="0.049cm" fo:padding-right="0.049cm" fo:padding-top="0cm" fo:padding-bottom="0cm" fo:border-left="1pt solid #000000" fo:border-right="none" fo:border-top="1pt solid #000000" fo:border-bottom="1pt solid #000000"/>
    </style:style>
    <style:style style:name="Tableau1.J38" style:family="table-cell" style:data-style-name="N0">
      <style:table-cell-properties style:vertical-align="bottom" fo:padding-left="0.049cm" fo:padding-right="0.049cm" fo:padding-top="0cm" fo:padding-bottom="0cm" fo:border="1pt solid #000000"/>
    </style:style>
    <style:style style:name="Tableau4" style:family="table">
      <style:table-properties style:width="19.59cm" table:align="margins"/>
    </style:style>
    <style:style style:name="Tableau4.A" style:family="table-column">
      <style:table-column-properties style:column-width="2.798cm" style:rel-column-width="9358*"/>
    </style:style>
    <style:style style:name="Tableau4.B" style:family="table-column">
      <style:table-column-properties style:column-width="2.799cm" style:rel-column-width="9364*"/>
    </style:style>
    <style:style style:name="Tableau4.C" style:family="table-column">
      <style:table-column-properties style:column-width="2.796cm" style:rel-column-width="9352*"/>
    </style:style>
    <style:style style:name="Tableau4.D" style:family="table-column">
      <style:table-column-properties style:column-width="2.801cm" style:rel-column-width="9370*"/>
    </style:style>
    <style:style style:name="Tableau4.F" style:family="table-column">
      <style:table-column-properties style:column-width="2.909cm" style:rel-column-width="9730*"/>
    </style:style>
    <style:style style:name="Tableau4.G" style:family="table-column">
      <style:table-column-properties style:column-width="2.692cm" style:rel-column-width="9003*"/>
    </style:style>
    <style:style style:name="Tableau4.A1" style:family="table-cell">
      <style:table-cell-properties fo:padding="0.097cm" fo:border="none"/>
    </style:style>
    <style:style style:name="Tableau4.A2" style:family="table-cell">
      <style:table-cell-properties fo:padding="0.097cm" fo:border-left="1pt solid #000000" fo:border-right="none" fo:border-top="1pt solid #000000" fo:border-bottom="1pt solid #000000"/>
    </style:style>
    <style:style style:name="Tableau4.G2" style:family="table-cell">
      <style:table-cell-properties fo:padding="0.097cm" fo:border="1pt solid #000000"/>
    </style:style>
    <style:style style:name="Tableau10" style:family="table">
      <style:table-properties style:width="19.59cm" table:align="margins"/>
    </style:style>
    <style:style style:name="Tableau10.A" style:family="table-column">
      <style:table-column-properties style:column-width="2.799cm" style:rel-column-width="9362*"/>
    </style:style>
    <style:style style:name="Tableau10.G" style:family="table-column">
      <style:table-column-properties style:column-width="2.799cm" style:rel-column-width="9363*"/>
    </style:style>
    <style:style style:name="Tableau10.A1" style:family="table-cell">
      <style:table-cell-properties fo:padding="0.097cm" fo:border-left="1pt solid #000000" fo:border-right="none" fo:border-top="1pt solid #000000" fo:border-bottom="1pt solid #000000"/>
    </style:style>
    <style:style style:name="Tableau10.G1" style:family="table-cell">
      <style:table-cell-properties fo:padding="0.097cm" fo:border="1pt solid #000000"/>
    </style:style>
    <style:style style:name="Tableau2" style:family="table">
      <style:table-properties style:width="19.59cm" table:align="margins"/>
    </style:style>
    <style:style style:name="Tableau2.A" style:family="table-column">
      <style:table-column-properties style:column-width="2.798cm" style:rel-column-width="9358*"/>
    </style:style>
    <style:style style:name="Tableau2.B" style:family="table-column">
      <style:table-column-properties style:column-width="2.799cm" style:rel-column-width="9364*"/>
    </style:style>
    <style:style style:name="Tableau2.F" style:family="table-column">
      <style:table-column-properties style:column-width="2.909cm" style:rel-column-width="9730*"/>
    </style:style>
    <style:style style:name="Tableau2.G" style:family="table-column">
      <style:table-column-properties style:column-width="2.692cm" style:rel-column-width="9003*"/>
    </style:style>
    <style:style style:name="Tableau2.A1" style:family="table-cell">
      <style:table-cell-properties fo:padding="0.097cm" fo:border="none"/>
    </style:style>
    <style:style style:name="Tableau2.A2" style:family="table-cell">
      <style:table-cell-properties fo:padding="0.097cm" fo:border-left="1pt solid #000000" fo:border-right="none" fo:border-top="1pt solid #000000" fo:border-bottom="1pt solid #000000"/>
    </style:style>
    <style:style style:name="Tableau2.G2" style:family="table-cell">
      <style:table-cell-properties fo:padding="0.097cm" fo:border="1pt solid #000000"/>
    </style:style>
    <style:style style:name="Tableau11" style:family="table">
      <style:table-properties style:width="19.59cm" table:align="margins"/>
    </style:style>
    <style:style style:name="Tableau11.A" style:family="table-column">
      <style:table-column-properties style:column-width="2.799cm" style:rel-column-width="9362*"/>
    </style:style>
    <style:style style:name="Tableau11.G" style:family="table-column">
      <style:table-column-properties style:column-width="2.799cm" style:rel-column-width="9363*"/>
    </style:style>
    <style:style style:name="Tableau11.A1" style:family="table-cell">
      <style:table-cell-properties fo:padding="0.097cm" fo:border-left="1pt solid #000000" fo:border-right="none" fo:border-top="1pt solid #000000" fo:border-bottom="1pt solid #000000"/>
    </style:style>
    <style:style style:name="Tableau11.G1" style:family="table-cell">
      <style:table-cell-properties fo:padding="0.097cm" fo:border="1pt solid #000000"/>
    </style:style>
    <style:style style:name="Tableau5" style:family="table">
      <style:table-properties style:width="19.59cm" fo:margin-top="0cm" fo:margin-bottom="0cm" table:align="margins"/>
    </style:style>
    <style:style style:name="Tableau5.A" style:family="table-column">
      <style:table-column-properties style:column-width="6.53cm" style:rel-column-width="21845*"/>
    </style:style>
    <style:style style:name="Tableau5.A1" style:family="table-cell">
      <style:table-cell-properties fo:padding="0cm" fo:border="none"/>
    </style:style>
    <style:style style:name="Tableau6" style:family="table">
      <style:table-properties style:width="19.59cm" table:align="margins"/>
    </style:style>
    <style:style style:name="Tableau6.A" style:family="table-column">
      <style:table-column-properties style:column-width="6.53cm" style:rel-column-width="21845*"/>
    </style:style>
    <style:style style:name="Tableau6.A1" style:family="table-cell">
      <style:table-cell-properties fo:padding="0.097cm" fo:border-left="1pt solid #000000" fo:border-right="none" fo:border-top="1pt solid #000000" fo:border-bottom="1pt solid #000000"/>
    </style:style>
    <style:style style:name="Tableau6.C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C2" style:family="table-cell">
      <style:table-cell-properties fo:padding="0.097cm" fo:border-left="1pt solid #000000" fo:border-right="1pt solid #000000" fo:border-top="none" fo:border-bottom="1pt solid #000000"/>
    </style:style>
    <style:style style:name="Tableau7" style:family="table">
      <style:table-properties style:width="12.905cm" fo:margin-top="0.199cm" fo:margin-bottom="0.199cm" table:align="left"/>
    </style:style>
    <style:style style:name="Tableau7.A" style:family="table-column">
      <style:table-column-properties style:column-width="2.194cm"/>
    </style:style>
    <style:style style:name="Tableau7.B" style:family="table-column">
      <style:table-column-properties style:column-width="5.355cm"/>
    </style:style>
    <style:style style:name="Tableau7.A1" style:family="table-cell">
      <style:table-cell-properties fo:padding="0.097cm" fo:border-left="1pt solid #000000" fo:border-right="none" fo:border-top="1pt solid #000000" fo:border-bottom="1pt solid #000000"/>
    </style:style>
    <style:style style:name="Tableau7.C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C2" style:family="table-cell">
      <style:table-cell-properties fo:padding="0.097cm" fo:border-left="1pt solid #000000" fo:border-right="1pt solid #000000" fo:border-top="none" fo:border-bottom="1pt solid #000000"/>
    </style:style>
    <style:style style:name="Tableau9" style:family="table">
      <style:table-properties style:width="19.59cm" table:align="margins"/>
    </style:style>
    <style:style style:name="Tableau9.A" style:family="table-column">
      <style:table-column-properties style:column-width="3.265cm" style:rel-column-width="10922*"/>
    </style:style>
    <style:style style:name="Tableau9.F" style:family="table-column">
      <style:table-column-properties style:column-width="3.265cm" style:rel-column-width="10925*"/>
    </style:style>
    <style:style style:name="Tableau9.A1" style:family="table-cell">
      <style:table-cell-properties fo:padding="0.097cm" fo:border-left="1pt solid #000000" fo:border-right="none" fo:border-top="1pt solid #000000" fo:border-bottom="1pt solid #000000"/>
    </style:style>
    <style:style style:name="Tableau9.F1" style:family="table-cell">
      <style:table-cell-properties fo:padding="0.097cm" fo:border="1pt solid #000000"/>
    </style:style>
    <style:style style:name="Tableau9.A2" style:family="table-cell">
      <style:table-cell-properties fo:padding="0.097cm" fo:border-left="1pt solid #000000" fo:border-right="none" fo:border-top="none" fo:border-bottom="1pt solid #000000"/>
    </style:style>
    <style:style style:name="Tableau9.F2" style:family="table-cell">
      <style:table-cell-properties fo:padding="0.097cm" fo:border-left="1pt solid #000000" fo:border-right="1pt solid #000000" fo:border-top="none" fo:border-bottom="1pt solid #000000"/>
    </style:style>
    <style:style style:name="Tableau9.B4" style:family="table-cell" style:data-style-name="N114">
      <style:table-cell-properties fo:padding="0.097cm" fo:border-left="1pt solid #000000" fo:border-right="none" fo:border-top="none" fo:border-bottom="1pt solid #000000"/>
    </style:style>
    <style:style style:name="Tableau9.F4" style:family="table-cell" style:data-style-name="N114">
      <style:table-cell-properties fo:padding="0.097cm" fo:border-left="1pt solid #000000" fo:border-right="1pt solid #000000" fo:border-top="none" fo:border-bottom="1pt solid #000000"/>
    </style:style>
    <style:style style:name="P1" style:family="paragraph" style:parent-style-name="Standard">
      <style:text-properties officeooo:paragraph-rsid="00ee1bef"/>
    </style:style>
    <style:style style:name="P2" style:family="paragraph" style:parent-style-name="Standard">
      <style:paragraph-properties fo:margin-top="0cm" fo:margin-bottom="0.199cm" style:contextual-spacing="false"/>
      <style:text-properties officeooo:paragraph-rsid="00ee1bef"/>
    </style:style>
    <style:style style:name="P3" style:family="paragraph" style:parent-style-name="tfCodePython">
      <style:text-properties officeooo:paragraph-rsid="00ee1bef"/>
    </style:style>
    <style:style style:name="P4" style:family="paragraph" style:parent-style-name="tfTitre_20_non_20_numéroté">
      <style:text-properties officeooo:paragraph-rsid="00ee1bef"/>
    </style:style>
    <style:style style:name="P5" style:family="paragraph" style:parent-style-name="Standard">
      <style:text-properties officeooo:rsid="00e25b00" officeooo:paragraph-rsid="00e25b00"/>
    </style:style>
    <style:style style:name="P6" style:family="paragraph" style:parent-style-name="Standard">
      <style:text-properties officeooo:rsid="00e25b00" officeooo:paragraph-rsid="00e843df"/>
    </style:style>
    <style:style style:name="P7" style:family="paragraph" style:parent-style-name="Standard">
      <style:text-properties officeooo:paragraph-rsid="00e52749"/>
    </style:style>
    <style:style style:name="P8" style:family="paragraph" style:parent-style-name="tfTitre_20_non_20_numéroté">
      <style:text-properties officeooo:paragraph-rsid="00e52749"/>
    </style:style>
    <style:style style:name="P9" style:family="paragraph" style:parent-style-name="Standard">
      <style:text-properties officeooo:rsid="000a8b9b" officeooo:paragraph-rsid="00e52749"/>
    </style:style>
    <style:style style:name="P10" style:family="paragraph" style:parent-style-name="Standard">
      <style:text-properties officeooo:rsid="000a8b9b" officeooo:paragraph-rsid="00e843df"/>
    </style:style>
    <style:style style:name="P11" style:family="paragraph" style:parent-style-name="Standard">
      <style:paragraph-properties fo:text-align="start" style:justify-single-word="false">
        <style:tab-stops>
          <style:tab-stop style:position="4.902cm"/>
        </style:tab-stops>
      </style:paragraph-properties>
      <style:text-properties officeooo:rsid="000a8b9b" officeooo:paragraph-rsid="0100e017"/>
    </style:style>
    <style:style style:name="P12" style:family="paragraph" style:parent-style-name="Table_20_Contents">
      <style:paragraph-properties fo:text-align="center" style:justify-single-word="false"/>
      <style:text-properties officeooo:rsid="000a8b9b" officeooo:paragraph-rsid="00e52749"/>
    </style:style>
    <style:style style:name="P13" style:family="paragraph" style:parent-style-name="Standard">
      <style:text-properties officeooo:paragraph-rsid="00e843df"/>
    </style:style>
    <style:style style:name="P14" style:family="paragraph" style:parent-style-name="tfCodePython">
      <style:text-properties officeooo:paragraph-rsid="00e843df"/>
    </style:style>
    <style:style style:name="P15" style:family="paragraph" style:parent-style-name="Standard">
      <style:text-properties officeooo:paragraph-rsid="00e25b00"/>
    </style:style>
    <style:style style:name="P16" style:family="paragraph" style:parent-style-name="tfCodePython">
      <style:text-properties officeooo:paragraph-rsid="00e25b00"/>
    </style:style>
    <style:style style:name="P17" style:family="paragraph" style:parent-style-name="Standard">
      <style:text-properties officeooo:paragraph-rsid="00ed5a4c"/>
    </style:style>
    <style:style style:name="P18" style:family="paragraph" style:parent-style-name="Standard">
      <style:text-properties officeooo:rsid="00e52749" officeooo:paragraph-rsid="00e52749"/>
    </style:style>
    <style:style style:name="P19" style:family="paragraph" style:parent-style-name="Standard">
      <style:text-properties officeooo:paragraph-rsid="00f2320d"/>
    </style:style>
    <style:style style:name="P20" style:family="paragraph" style:parent-style-name="tfTitre_20_non_20_numéroté">
      <style:paragraph-properties fo:margin-top="0cm" fo:margin-bottom="0.199cm" style:contextual-spacing="false"/>
      <style:text-properties officeooo:paragraph-rsid="00f2320d"/>
    </style:style>
    <style:style style:name="P21" style:family="paragraph" style:parent-style-name="tfTitre_20_non_20_numéroté">
      <style:text-properties officeooo:paragraph-rsid="00f2320d"/>
    </style:style>
    <style:style style:name="P22" style:family="paragraph" style:parent-style-name="tfTitre_20_non_20_numéroté">
      <style:paragraph-properties fo:break-before="page"/>
      <style:text-properties officeooo:paragraph-rsid="00f2320d"/>
    </style:style>
    <style:style style:name="P23" style:family="paragraph" style:parent-style-name="Standard">
      <style:paragraph-properties fo:text-align="start" style:justify-single-word="false">
        <style:tab-stops>
          <style:tab-stop style:position="4.902cm"/>
        </style:tab-stops>
      </style:paragraph-properties>
      <style:text-properties officeooo:paragraph-rsid="0100e017"/>
    </style:style>
    <style:style style:name="P24" style:family="paragraph" style:parent-style-name="Standard">
      <style:paragraph-properties fo:text-align="center" style:justify-single-word="false">
        <style:tab-stops/>
      </style:paragraph-properties>
      <style:text-properties fo:font-size="10pt" officeooo:rsid="00fac87b" officeooo:paragraph-rsid="00fac87b" style:font-size-asian="10pt" style:font-size-complex="10pt"/>
    </style:style>
    <style:style style:name="P25" style:family="paragraph" style:parent-style-name="Standard">
      <style:paragraph-properties fo:text-align="center" style:justify-single-word="false">
        <style:tab-stops/>
      </style:paragraph-properties>
      <style:text-properties fo:font-size="10pt" style:font-size-asian="10pt" style:font-size-complex="10pt"/>
    </style:style>
    <style:style style:name="P26" style:family="paragraph" style:parent-style-name="Standard">
      <style:text-properties officeooo:rsid="00fe017c" officeooo:paragraph-rsid="00fe017c"/>
    </style:style>
    <style:style style:name="P27" style:family="paragraph" style:parent-style-name="Standard">
      <style:paragraph-properties fo:text-align="start" style:justify-single-word="false"/>
      <style:text-properties officeooo:rsid="00e5ece8" officeooo:paragraph-rsid="00e5ece8"/>
    </style:style>
    <style:style style:name="P28" style:family="paragraph" style:parent-style-name="Table_20_Contents">
      <style:paragraph-properties fo:text-align="center" style:justify-single-word="false"/>
      <style:text-properties officeooo:rsid="00e5ece8" officeooo:paragraph-rsid="00e5ece8"/>
    </style:style>
    <style:style style:name="P29" style:family="paragraph" style:parent-style-name="Standard">
      <style:text-properties officeooo:rsid="000ec792" officeooo:paragraph-rsid="00e52749"/>
    </style:style>
    <style:style style:name="P30" style:family="paragraph" style:parent-style-name="Table_20_Contents">
      <style:paragraph-properties fo:text-align="center" style:justify-single-word="false"/>
      <style:text-properties officeooo:rsid="000ec792" officeooo:paragraph-rsid="00e52749"/>
    </style:style>
    <style:style style:name="P31" style:family="paragraph" style:parent-style-name="Standard">
      <style:text-properties officeooo:paragraph-rsid="0101fecf"/>
    </style:style>
    <style:style style:name="P32" style:family="paragraph" style:parent-style-name="Standard">
      <style:text-properties officeooo:paragraph-rsid="01021cfc"/>
    </style:style>
    <style:style style:name="P33" style:family="paragraph" style:parent-style-name="Standard">
      <style:paragraph-properties fo:line-height="150%"/>
      <style:text-properties officeooo:paragraph-rsid="01021cfc"/>
    </style:style>
    <style:style style:name="P34" style:family="paragraph" style:parent-style-name="Standard">
      <style:paragraph-properties fo:line-height="150%"/>
      <style:text-properties officeooo:paragraph-rsid="00f9fde5"/>
    </style:style>
    <style:style style:name="P35" style:family="paragraph" style:parent-style-name="Standard">
      <style:paragraph-properties fo:line-height="150%"/>
      <style:text-properties officeooo:paragraph-rsid="01197bdc"/>
    </style:style>
    <style:style style:name="P36" style:family="paragraph" style:parent-style-name="tfCodePython">
      <style:paragraph-properties fo:line-height="150%"/>
      <style:text-properties officeooo:paragraph-rsid="01197bdc"/>
    </style:style>
    <style:style style:name="P37" style:family="paragraph" style:parent-style-name="tfCodePython">
      <style:paragraph-properties fo:line-height="150%"/>
    </style:style>
    <style:style style:name="P38" style:family="paragraph" style:parent-style-name="tfCodePython">
      <style:paragraph-properties fo:line-height="150%"/>
      <style:text-properties officeooo:paragraph-rsid="00e843df"/>
    </style:style>
    <style:style style:name="P39" style:family="paragraph" style:parent-style-name="tfCodePython">
      <style:paragraph-properties fo:line-height="150%"/>
      <style:text-properties officeooo:paragraph-rsid="010c0204"/>
    </style:style>
    <style:style style:name="P40" style:family="paragraph" style:parent-style-name="Standard">
      <style:paragraph-properties fo:line-height="150%"/>
      <style:text-properties officeooo:paragraph-rsid="0181d67d"/>
    </style:style>
    <style:style style:name="P41" style:family="paragraph" style:parent-style-name="tfCodePython">
      <style:paragraph-properties fo:line-height="150%"/>
      <style:text-properties officeooo:paragraph-rsid="0181d67d"/>
    </style:style>
    <style:style style:name="P42" style:family="paragraph" style:parent-style-name="tfCodePython">
      <style:paragraph-properties fo:line-height="150%"/>
      <style:text-properties officeooo:paragraph-rsid="01828411"/>
    </style:style>
    <style:style style:name="P43" style:family="paragraph" style:parent-style-name="Standard">
      <style:text-properties officeooo:paragraph-rsid="0104919a"/>
    </style:style>
    <style:style style:name="P44" style:family="paragraph" style:parent-style-name="Standard">
      <style:text-properties officeooo:paragraph-rsid="0107906d"/>
    </style:style>
    <style:style style:name="P45" style:family="paragraph" style:parent-style-name="Standard">
      <style:text-properties officeooo:paragraph-rsid="01080ee9"/>
    </style:style>
    <style:style style:name="P46" style:family="paragraph" style:parent-style-name="Standard">
      <style:text-properties officeooo:paragraph-rsid="0108a492"/>
    </style:style>
    <style:style style:name="P47" style:family="paragraph" style:parent-style-name="Standard">
      <style:text-properties officeooo:rsid="0108c040" officeooo:paragraph-rsid="0108c040"/>
    </style:style>
    <style:style style:name="P48" style:family="paragraph" style:parent-style-name="Standard">
      <style:text-properties officeooo:paragraph-rsid="010af310"/>
    </style:style>
    <style:style style:name="P49" style:family="paragraph" style:parent-style-name="tfTitre_20_non_20_numéroté">
      <style:text-properties officeooo:paragraph-rsid="010af310"/>
    </style:style>
    <style:style style:name="P50" style:family="paragraph" style:parent-style-name="Standard">
      <style:paragraph-properties fo:text-align="center" style:justify-single-word="false"/>
      <style:text-properties officeooo:rsid="010bcca1" officeooo:paragraph-rsid="010bcca1"/>
    </style:style>
    <style:style style:name="P51" style:family="paragraph" style:parent-style-name="Table_20_Contents">
      <style:paragraph-properties fo:text-align="center" style:justify-single-word="false"/>
      <style:text-properties officeooo:rsid="010bcca1" officeooo:paragraph-rsid="010bcca1"/>
    </style:style>
    <style:style style:name="P52" style:family="paragraph" style:parent-style-name="Standard">
      <style:paragraph-properties fo:text-align="center" style:justify-single-word="false"/>
      <style:text-properties officeooo:rsid="010bcca1" officeooo:paragraph-rsid="01197bdc"/>
    </style:style>
    <style:style style:name="P53" style:family="paragraph" style:parent-style-name="Standard">
      <style:text-properties officeooo:paragraph-rsid="010c0204"/>
    </style:style>
    <style:style style:name="P54" style:family="paragraph" style:parent-style-name="Standard">
      <style:text-properties officeooo:rsid="01109b9c" officeooo:paragraph-rsid="01197bdc"/>
    </style:style>
    <style:style style:name="P55" style:family="paragraph" style:parent-style-name="Standard">
      <style:paragraph-properties fo:line-height="150%"/>
      <style:text-properties officeooo:rsid="0113817c" officeooo:paragraph-rsid="0113e470"/>
    </style:style>
    <style:style style:name="P56" style:family="paragraph" style:parent-style-name="Standard">
      <style:paragraph-properties fo:line-height="150%"/>
      <style:text-properties officeooo:rsid="0113817c" officeooo:paragraph-rsid="01828411"/>
    </style:style>
    <style:style style:name="P57" style:family="paragraph" style:parent-style-name="Standard">
      <style:text-properties officeooo:paragraph-rsid="01197bdc"/>
    </style:style>
    <style:style style:name="P58" style:family="paragraph" style:parent-style-name="tfTitre_20_non_20_numéroté">
      <style:paragraph-properties fo:margin-top="0cm" fo:margin-bottom="0.199cm" style:contextual-spacing="false"/>
      <style:text-properties officeooo:paragraph-rsid="01197bdc"/>
    </style:style>
    <style:style style:name="P59" style:family="paragraph" style:parent-style-name="tfTitre_20_non_20_numéroté">
      <style:text-properties officeooo:paragraph-rsid="01197bdc"/>
    </style:style>
    <style:style style:name="P60" style:family="paragraph" style:parent-style-name="Standard">
      <style:text-properties officeooo:paragraph-rsid="011ab774"/>
    </style:style>
    <style:style style:name="P61" style:family="paragraph" style:parent-style-name="tfTitre_20_non_20_numéroté">
      <style:paragraph-properties fo:margin-top="0cm" fo:margin-bottom="0.199cm" style:contextual-spacing="false"/>
      <style:text-properties officeooo:paragraph-rsid="011ab774"/>
    </style:style>
    <style:style style:name="P62" style:family="paragraph" style:parent-style-name="Standard">
      <style:paragraph-properties fo:line-height="100%"/>
      <style:text-properties officeooo:paragraph-rsid="011c6b94"/>
    </style:style>
    <style:style style:name="P63" style:family="paragraph" style:parent-style-name="tfCodePython">
      <style:paragraph-properties fo:line-height="100%"/>
      <style:text-properties officeooo:paragraph-rsid="010c0204"/>
    </style:style>
    <style:style style:name="P64" style:family="paragraph" style:parent-style-name="tfCodePython">
      <style:paragraph-properties fo:line-height="100%"/>
      <style:text-properties officeooo:paragraph-rsid="01197bdc"/>
    </style:style>
    <style:style style:name="P65" style:family="paragraph" style:parent-style-name="tfCodePython">
      <style:paragraph-properties fo:line-height="100%"/>
      <style:text-properties officeooo:paragraph-rsid="01828411"/>
    </style:style>
    <style:style style:name="P66" style:family="paragraph" style:parent-style-name="tfCodePython">
      <loext:graphic-properties draw:fill-gradient-name="gradient" draw:fill-hatch-name="hatch"/>
      <style:paragraph-properties fo:line-height="100%"/>
      <style:text-properties officeooo:paragraph-rsid="0183d9b7"/>
    </style:style>
    <style:style style:name="P67" style:family="paragraph" style:parent-style-name="tfCodePython">
      <loext:graphic-properties draw:fill-gradient-name="gradient" draw:fill-hatch-name="hatch"/>
      <style:paragraph-properties fo:line-height="100%"/>
      <style:text-properties officeooo:paragraph-rsid="01656ac5"/>
    </style:style>
    <style:style style:name="P68" style:family="paragraph" style:parent-style-name="tfCodePython">
      <loext:graphic-properties draw:fill-gradient-name="gradient" draw:fill-hatch-name="hatch"/>
      <style:paragraph-properties fo:line-height="100%"/>
      <style:text-properties officeooo:paragraph-rsid="0178e97f"/>
    </style:style>
    <style:style style:name="P69" style:family="paragraph" style:parent-style-name="tfCodePython">
      <loext:graphic-properties draw:fill-gradient-name="gradient" draw:fill-hatch-name="hatch"/>
      <style:paragraph-properties fo:line-height="100%"/>
      <style:text-properties officeooo:paragraph-rsid="018711a7"/>
    </style:style>
    <style:style style:name="P70" style:family="paragraph" style:parent-style-name="tfCodePython">
      <loext:graphic-properties draw:fill-gradient-name="gradient" draw:fill-hatch-name="hatch"/>
      <style:paragraph-properties fo:line-height="100%"/>
      <style:text-properties officeooo:paragraph-rsid="018b8d4a"/>
    </style:style>
    <style:style style:name="P71" style:family="paragraph" style:parent-style-name="Standard">
      <style:text-properties officeooo:rsid="00f8e6b3" officeooo:paragraph-rsid="01021cfc"/>
    </style:style>
    <style:style style:name="P72" style:family="paragraph" style:parent-style-name="Standard">
      <style:text-properties officeooo:rsid="01080054" officeooo:paragraph-rsid="0108c040"/>
    </style:style>
    <style:style style:name="P73" style:family="paragraph" style:parent-style-name="Standard">
      <style:text-properties officeooo:paragraph-rsid="012207e6"/>
    </style:style>
    <style:style style:name="P74" style:family="paragraph" style:parent-style-name="Standard">
      <style:text-properties officeooo:paragraph-rsid="01241076"/>
    </style:style>
    <style:style style:name="P75" style:family="paragraph" style:parent-style-name="Standard">
      <style:text-properties officeooo:paragraph-rsid="012c674c"/>
    </style:style>
    <style:style style:name="P76" style:family="paragraph" style:parent-style-name="Standard">
      <style:text-properties officeooo:rsid="012c6b12" officeooo:paragraph-rsid="012c6b12"/>
    </style:style>
    <style:style style:name="P77" style:family="paragraph" style:parent-style-name="Standard">
      <style:text-properties officeooo:paragraph-rsid="013392e3"/>
    </style:style>
    <style:style style:name="P78" style:family="paragraph" style:parent-style-name="Standard">
      <style:paragraph-properties fo:text-align="center" style:justify-single-word="false"/>
      <style:text-properties officeooo:rsid="012ae4e5" officeooo:paragraph-rsid="013392e3"/>
    </style:style>
    <style:style style:name="P79" style:family="paragraph" style:parent-style-name="Table_20_Contents">
      <style:paragraph-properties fo:text-align="center" style:justify-single-word="false"/>
      <style:text-properties officeooo:rsid="012ae4e5" officeooo:paragraph-rsid="013392e3"/>
    </style:style>
    <style:style style:name="P80" style:family="paragraph" style:parent-style-name="Table_20_Contents">
      <style:paragraph-properties fo:text-align="center" style:justify-single-word="false"/>
      <style:text-properties officeooo:rsid="012ae4e5" officeooo:paragraph-rsid="012ae4e5"/>
    </style:style>
    <style:style style:name="P81" style:family="paragraph" style:parent-style-name="Standard">
      <style:text-properties officeooo:paragraph-rsid="014df8cc"/>
    </style:style>
    <style:style style:name="P82" style:family="paragraph" style:parent-style-name="Standard">
      <style:text-properties officeooo:rsid="0136d5ae" officeooo:paragraph-rsid="0136d5ae"/>
    </style:style>
    <style:style style:name="P83" style:family="paragraph" style:parent-style-name="Standard">
      <style:text-properties officeooo:rsid="013a391c" officeooo:paragraph-rsid="013a391c"/>
    </style:style>
    <style:style style:name="P84" style:family="paragraph" style:parent-style-name="tfTitre_20_non_20_numéroté">
      <style:text-properties officeooo:rsid="013a391c" officeooo:paragraph-rsid="013a391c"/>
    </style:style>
    <style:style style:name="P85" style:family="paragraph" style:parent-style-name="Standard">
      <style:paragraph-properties fo:text-align="center" style:justify-single-word="false"/>
      <style:text-properties officeooo:rsid="013bc2f9" officeooo:paragraph-rsid="013bc2f9"/>
    </style:style>
    <style:style style:name="P86" style:family="paragraph" style:parent-style-name="Standard">
      <style:paragraph-properties fo:text-align="center" style:justify-single-word="false"/>
      <style:text-properties officeooo:paragraph-rsid="013bc2f9"/>
    </style:style>
    <style:style style:name="P87" style:family="paragraph" style:parent-style-name="Standard">
      <style:paragraph-properties fo:text-align="center" style:justify-single-word="false"/>
      <style:text-properties officeooo:paragraph-rsid="01434b95"/>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1197bdc"/>
    </style:style>
    <style:style style:name="P90" style:family="paragraph" style:parent-style-name="Standard">
      <style:paragraph-properties fo:margin-top="0.3cm" fo:margin-bottom="0.3cm" style:contextual-spacing="false" fo:text-align="center" style:justify-single-word="false"/>
      <style:text-properties officeooo:paragraph-rsid="01275229"/>
    </style:style>
    <style:style style:name="P91" style:family="paragraph" style:parent-style-name="Table_20_Contents">
      <style:paragraph-properties fo:text-align="center" style:justify-single-word="false"/>
      <style:text-properties officeooo:paragraph-rsid="015de90d"/>
    </style:style>
    <style:style style:name="P92" style:family="paragraph" style:parent-style-name="Table_20_Contents">
      <style:paragraph-properties fo:text-align="center" style:justify-single-word="false"/>
      <style:text-properties officeooo:paragraph-rsid="016c4933"/>
    </style:style>
    <style:style style:name="P93" style:family="paragraph" style:parent-style-name="Standard">
      <style:paragraph-properties fo:text-align="center" style:justify-single-word="false"/>
      <style:text-properties officeooo:paragraph-rsid="01828411"/>
    </style:style>
    <style:style style:name="P94" style:family="paragraph" style:parent-style-name="Standard">
      <style:paragraph-properties fo:text-align="center" style:justify-single-word="false"/>
      <style:text-properties officeooo:paragraph-rsid="0185b94a"/>
    </style:style>
    <style:style style:name="P95" style:family="paragraph" style:parent-style-name="Standard">
      <style:text-properties officeooo:paragraph-rsid="01450e1b"/>
    </style:style>
    <style:style style:name="P96" style:family="paragraph" style:parent-style-name="Standard">
      <style:text-properties officeooo:paragraph-rsid="014b6e23"/>
    </style:style>
    <style:style style:name="P97" style:family="paragraph" style:parent-style-name="Standard">
      <style:text-properties officeooo:rsid="014df8cc" officeooo:paragraph-rsid="014df8cc"/>
    </style:style>
    <style:style style:name="P98" style:family="paragraph" style:parent-style-name="Standard">
      <style:paragraph-properties fo:margin-top="0cm" fo:margin-bottom="0.199cm" style:contextual-spacing="false"/>
      <style:text-properties officeooo:rsid="00ed5a4c" officeooo:paragraph-rsid="00ed5a4c"/>
    </style:style>
    <style:style style:name="P99" style:family="paragraph" style:parent-style-name="Table_20_Contents">
      <style:paragraph-properties fo:text-align="center" style:justify-single-word="false"/>
      <style:text-properties fo:font-size="8pt" officeooo:rsid="000a8b9b" officeooo:paragraph-rsid="00e52749" style:font-size-asian="8pt" style:font-size-complex="8pt"/>
    </style:style>
    <style:style style:name="P100" style:family="paragraph" style:parent-style-name="Standard">
      <style:text-properties fo:font-size="8pt" officeooo:rsid="000a8b9b" officeooo:paragraph-rsid="01656ac5" style:font-size-asian="7pt" style:font-size-complex="8pt"/>
    </style:style>
    <style:style style:name="P101" style:family="paragraph" style:parent-style-name="Standard">
      <style:text-properties fo:font-size="8pt" officeooo:paragraph-rsid="016c2032" style:font-size-asian="7pt" style:font-size-complex="8pt"/>
    </style:style>
    <style:style style:name="P102" style:family="paragraph" style:parent-style-name="Standard">
      <style:text-properties fo:font-size="8pt" officeooo:rsid="016c2032" officeooo:paragraph-rsid="016c2032" style:font-size-asian="7pt" style:font-size-complex="8pt"/>
    </style:style>
    <style:style style:name="P103" style:family="paragraph" style:parent-style-name="Standard">
      <style:text-properties fo:font-size="8pt" officeooo:rsid="016c2032" officeooo:paragraph-rsid="016e6ca8" style:font-size-asian="7pt" style:font-size-complex="8pt"/>
    </style:style>
    <style:style style:name="P104" style:family="paragraph" style:parent-style-name="Standard">
      <style:text-properties fo:font-size="8pt" officeooo:rsid="016e6ca8" officeooo:paragraph-rsid="0178e97f" style:font-size-asian="7pt" style:font-size-complex="8pt"/>
    </style:style>
    <style:style style:name="P105" style:family="paragraph" style:parent-style-name="Standard">
      <style:text-properties fo:font-size="8pt" officeooo:rsid="016e6ca8" officeooo:paragraph-rsid="018711a7" style:font-size-asian="7pt" style:font-size-complex="8pt"/>
    </style:style>
    <style:style style:name="P106" style:family="paragraph" style:parent-style-name="Table_20_Contents">
      <style:paragraph-properties fo:text-align="center" style:justify-single-word="false"/>
      <style:text-properties fo:color="#000000" loext:opacity="100%" fo:font-size="10pt" style:font-size-asian="10pt" style:font-size-complex="10pt"/>
    </style:style>
    <style:style style:name="P107" style:family="paragraph" style:parent-style-name="Table_20_Contents">
      <style:paragraph-properties fo:text-align="center" style:justify-single-word="false"/>
      <style:text-properties officeooo:rsid="0101243c" officeooo:paragraph-rsid="0101243c"/>
    </style:style>
    <style:style style:name="P108" style:family="paragraph" style:parent-style-name="Table_20_Contents">
      <style:paragraph-properties fo:text-align="center" style:justify-single-word="false"/>
      <style:text-properties officeooo:rsid="010af310" officeooo:paragraph-rsid="010af310"/>
    </style:style>
    <style:style style:name="P109" style:family="paragraph" style:parent-style-name="Table_20_Contents">
      <style:paragraph-properties fo:text-align="center" style:justify-single-word="false"/>
      <style:text-properties officeooo:rsid="010af310" officeooo:paragraph-rsid="01197bdc"/>
    </style:style>
    <style:style style:name="P110" style:family="paragraph" style:parent-style-name="Standard">
      <style:paragraph-properties fo:text-align="center" style:justify-single-word="false"/>
      <style:text-properties officeooo:rsid="010af310" officeooo:paragraph-rsid="0185b94a"/>
    </style:style>
    <style:style style:name="P111" style:family="paragraph" style:parent-style-name="Table_20_Contents">
      <style:paragraph-properties fo:text-align="center" style:justify-single-word="false"/>
      <style:text-properties officeooo:rsid="010af310" officeooo:paragraph-rsid="01828411"/>
    </style:style>
    <style:style style:name="P112" style:family="paragraph" style:parent-style-name="Table_20_Contents">
      <style:paragraph-properties fo:text-align="center" style:justify-single-word="false"/>
      <style:text-properties officeooo:rsid="0115fc8b" officeooo:paragraph-rsid="01197bdc"/>
    </style:style>
    <style:style style:name="P113" style:family="paragraph" style:parent-style-name="Table_20_Contents">
      <style:paragraph-properties fo:text-align="center" style:justify-single-word="false"/>
      <style:text-properties officeooo:rsid="0116de9b" officeooo:paragraph-rsid="01197bdc"/>
    </style:style>
    <style:style style:name="P114" style:family="paragraph" style:parent-style-name="Table_20_Contents">
      <style:paragraph-properties fo:text-align="center" style:justify-single-word="false"/>
      <style:text-properties officeooo:rsid="013e6458" officeooo:paragraph-rsid="013e6458"/>
    </style:style>
    <style:style style:name="P115" style:family="paragraph" style:parent-style-name="tfCodePython">
      <style:text-properties officeooo:paragraph-rsid="01384369"/>
    </style:style>
    <style:style style:name="P116" style:family="paragraph" style:parent-style-name="tfCodePython">
      <style:text-properties style:use-window-font-color="true" loext:opacity="0%" officeooo:paragraph-rsid="01384369"/>
    </style:style>
    <style:style style:name="P117" style:family="paragraph" style:parent-style-name="tfTitre_20_Chapitre">
      <style:text-properties officeooo:rsid="00bb8fd5"/>
    </style:style>
    <style:style style:name="P118" style:family="paragraph" style:parent-style-name="tfTitre_20_non_20_numéroté">
      <style:text-properties officeooo:paragraph-rsid="0130a08f"/>
    </style:style>
    <style:style style:name="P119" style:family="paragraph" style:parent-style-name="tfTitre_20_non_20_numéroté">
      <style:paragraph-properties fo:break-before="page"/>
    </style:style>
    <style:style style:name="P120" style:family="paragraph" style:parent-style-name="Standard">
      <style:text-properties officeooo:paragraph-rsid="01562924"/>
    </style:style>
    <style:style style:name="P121" style:family="paragraph" style:parent-style-name="Standard">
      <style:text-properties officeooo:paragraph-rsid="015a86f1"/>
    </style:style>
    <style:style style:name="P122" style:family="paragraph" style:parent-style-name="Standard">
      <style:text-properties officeooo:paragraph-rsid="0159902b"/>
    </style:style>
    <style:style style:name="P123" style:family="paragraph" style:parent-style-name="Standard">
      <style:text-properties officeooo:rsid="015ae689" officeooo:paragraph-rsid="015ae689"/>
    </style:style>
    <style:style style:name="P124" style:family="paragraph" style:parent-style-name="Standard">
      <style:text-properties officeooo:paragraph-rsid="0133c183"/>
    </style:style>
    <style:style style:name="P125" style:family="paragraph" style:parent-style-name="Standard">
      <style:text-properties officeooo:paragraph-rsid="01620d2c"/>
    </style:style>
    <style:style style:name="P126" style:family="paragraph" style:parent-style-name="Standard">
      <style:text-properties officeooo:rsid="0162f6f8" officeooo:paragraph-rsid="0162f6f8"/>
    </style:style>
    <style:style style:name="P127" style:family="paragraph" style:parent-style-name="Standard">
      <style:text-properties officeooo:rsid="01656ac5" officeooo:paragraph-rsid="01670c5f"/>
    </style:style>
    <style:style style:name="P128" style:family="paragraph" style:parent-style-name="Standard">
      <style:text-properties officeooo:rsid="01670c5f" officeooo:paragraph-rsid="01670c5f"/>
    </style:style>
    <style:style style:name="P129" style:family="paragraph" style:parent-style-name="Standard">
      <style:text-properties officeooo:paragraph-rsid="0168fd09"/>
    </style:style>
    <style:style style:name="P130" style:family="paragraph" style:parent-style-name="Standard">
      <style:text-properties officeooo:paragraph-rsid="01670c5f"/>
    </style:style>
    <style:style style:name="P131" style:family="paragraph" style:parent-style-name="Standard">
      <style:text-properties officeooo:paragraph-rsid="016a8de2"/>
    </style:style>
    <style:style style:name="P132" style:family="paragraph" style:parent-style-name="Table_20_Contents">
      <style:paragraph-properties fo:text-align="center" style:justify-single-word="false"/>
      <style:text-properties officeooo:rsid="016c2032" officeooo:paragraph-rsid="016c2032"/>
    </style:style>
    <style:style style:name="P133" style:family="paragraph" style:parent-style-name="Standard">
      <style:text-properties officeooo:paragraph-rsid="016c2032"/>
    </style:style>
    <style:style style:name="P134" style:family="paragraph" style:parent-style-name="Standard">
      <style:text-properties officeooo:paragraph-rsid="016f004b"/>
    </style:style>
    <style:style style:name="P135" style:family="paragraph" style:parent-style-name="Standard">
      <style:text-properties officeooo:rsid="017ad0f5" officeooo:paragraph-rsid="017ad0f5"/>
    </style:style>
    <style:style style:name="P136" style:family="paragraph" style:parent-style-name="Standard">
      <style:text-properties officeooo:rsid="017ad0f5" officeooo:paragraph-rsid="018711a7"/>
    </style:style>
    <style:style style:name="P137" style:family="paragraph" style:parent-style-name="Table_20_Contents">
      <style:text-properties officeooo:rsid="015de90d" officeooo:paragraph-rsid="015de90d"/>
    </style:style>
    <style:style style:name="P138" style:family="paragraph" style:parent-style-name="Table_20_Contents">
      <style:paragraph-properties fo:text-align="center" style:justify-single-word="false"/>
      <style:text-properties officeooo:rsid="015de90d" officeooo:paragraph-rsid="015de90d"/>
    </style:style>
    <style:style style:name="P139" style:family="paragraph" style:parent-style-name="Table_20_Contents">
      <style:text-properties officeooo:paragraph-rsid="015de90d"/>
    </style:style>
    <style:style style:name="P140" style:family="paragraph" style:parent-style-name="Table_20_Contents">
      <style:paragraph-properties fo:text-align="center" style:justify-single-word="false"/>
      <style:text-properties officeooo:rsid="0163c989" officeooo:paragraph-rsid="0163c989"/>
    </style:style>
    <style:style style:name="P141" style:family="paragraph" style:parent-style-name="Table_20_Contents">
      <style:paragraph-properties fo:text-align="center" style:justify-single-word="false"/>
      <style:text-properties officeooo:rsid="016c4933" officeooo:paragraph-rsid="016c4933"/>
    </style:style>
    <style:style style:name="P142" style:family="paragraph" style:parent-style-name="Table_20_Contents">
      <style:paragraph-properties fo:text-align="center" style:justify-single-word="false"/>
      <style:text-properties officeooo:rsid="016d12dd" officeooo:paragraph-rsid="016d12dd"/>
    </style:style>
    <style:style style:name="P143" style:family="paragraph" style:parent-style-name="Table_20_Contents">
      <style:paragraph-properties fo:text-align="center" style:justify-single-word="false"/>
      <style:text-properties officeooo:rsid="016fde28" officeooo:paragraph-rsid="016fde28"/>
    </style:style>
    <style:style style:name="P144" style:family="paragraph" style:parent-style-name="Table_20_Contents">
      <style:paragraph-properties fo:text-align="center" style:justify-single-word="false"/>
      <style:text-properties fo:font-size="12pt"/>
    </style:style>
    <style:style style:name="P145" style:family="paragraph" style:parent-style-name="Table_20_Contents">
      <style:paragraph-properties fo:text-align="center" style:justify-single-word="false"/>
      <style:text-properties officeooo:rsid="0172d9a0" officeooo:paragraph-rsid="0172d9a0"/>
    </style:style>
    <style:style style:name="P146" style:family="paragraph" style:parent-style-name="tfCodePython">
      <style:text-properties officeooo:paragraph-rsid="01656ac5"/>
    </style:style>
    <style:style style:name="P147" style:family="paragraph" style:parent-style-name="tfCodePython">
      <style:text-properties officeooo:paragraph-rsid="0178e97f"/>
    </style:style>
    <style:style style:name="P148" style:family="paragraph" style:parent-style-name="tfTitre_20_non_20_numéroté">
      <style:text-properties officeooo:rsid="01352d74" officeooo:paragraph-rsid="01352d74"/>
    </style:style>
    <style:style style:name="P149" style:family="paragraph" style:parent-style-name="tfTitre_20_non_20_numéroté">
      <style:paragraph-properties fo:margin-top="0cm" fo:margin-bottom="0cm" style:contextual-spacing="false"/>
    </style:style>
    <style:style style:name="P150" style:family="paragraph" style:parent-style-name="Standard">
      <style:text-properties officeooo:rsid="016c14a0" officeooo:paragraph-rsid="016c14a0"/>
    </style:style>
    <style:style style:name="P151" style:family="paragraph" style:parent-style-name="tfCodePython">
      <style:text-properties officeooo:paragraph-rsid="017ca3bb"/>
    </style:style>
    <style:style style:name="P152" style:family="paragraph" style:parent-style-name="Standard">
      <style:text-properties officeooo:rsid="00f2320d" officeooo:paragraph-rsid="0181d67d"/>
    </style:style>
    <style:style style:name="P153" style:family="paragraph" style:parent-style-name="Standard">
      <style:paragraph-properties fo:text-align="center" style:justify-single-word="false"/>
      <style:text-properties officeooo:rsid="0010e1a6" officeooo:paragraph-rsid="0181d67d"/>
    </style:style>
    <style:style style:name="P154" style:family="paragraph" style:parent-style-name="Standard">
      <style:paragraph-properties fo:text-align="center" style:justify-single-word="false"/>
      <style:text-properties officeooo:rsid="0010e1a6" officeooo:paragraph-rsid="0185b94a"/>
    </style:style>
    <style:style style:name="P155" style:family="paragraph" style:parent-style-name="Standard">
      <style:paragraph-properties fo:text-align="center" style:justify-single-word="false"/>
      <style:text-properties officeooo:rsid="00108e5e" officeooo:paragraph-rsid="0185b94a"/>
    </style:style>
    <style:style style:name="P156" style:family="paragraph" style:parent-style-name="Standard">
      <style:paragraph-properties fo:line-height="150%"/>
      <style:text-properties officeooo:rsid="00fac87b" officeooo:paragraph-rsid="0181d67d"/>
    </style:style>
    <style:style style:name="P157" style:family="paragraph" style:parent-style-name="Standard">
      <style:text-properties officeooo:paragraph-rsid="01828411"/>
    </style:style>
    <style:style style:name="P158" style:family="paragraph" style:parent-style-name="Standard">
      <style:paragraph-properties fo:line-height="150%"/>
      <style:text-properties officeooo:rsid="0113e470" officeooo:paragraph-rsid="01828411"/>
    </style:style>
    <style:style style:name="P159" style:family="paragraph" style:parent-style-name="Standard">
      <style:paragraph-properties fo:text-align="center" style:justify-single-word="false"/>
      <style:text-properties officeooo:rsid="01828411" officeooo:paragraph-rsid="01828411"/>
    </style:style>
    <style:style style:name="P160" style:family="paragraph" style:parent-style-name="Standard">
      <style:text-properties officeooo:paragraph-rsid="01849d50"/>
    </style:style>
    <style:style style:name="P161" style:family="paragraph" style:parent-style-name="Standard">
      <style:text-properties officeooo:paragraph-rsid="0185b94a"/>
    </style:style>
    <style:style style:name="P162" style:family="paragraph" style:parent-style-name="Standard">
      <style:text-properties officeooo:rsid="016e6ca8" officeooo:paragraph-rsid="018711a7"/>
    </style:style>
    <style:style style:name="P163" style:family="paragraph" style:parent-style-name="Standard">
      <style:text-properties officeooo:paragraph-rsid="018711a7"/>
    </style:style>
    <style:style style:name="P164" style:family="paragraph" style:parent-style-name="tfCodePython">
      <style:text-properties officeooo:paragraph-rsid="018711a7"/>
    </style:style>
    <style:style style:name="P165" style:family="paragraph" style:parent-style-name="tfCodePython">
      <style:text-properties officeooo:rsid="017ca3bb" officeooo:paragraph-rsid="017ca3bb"/>
    </style:style>
    <style:style style:name="P166" style:family="paragraph" style:parent-style-name="Standard" style:list-style-name="tfPuce">
      <style:text-properties officeooo:paragraph-rsid="00ee1bef"/>
    </style:style>
    <style:style style:name="P167" style:family="paragraph" style:parent-style-name="Standard" style:list-style-name="tfPuce">
      <style:text-properties officeooo:paragraph-rsid="0108c040"/>
    </style:style>
    <style:style style:name="P168" style:family="paragraph" style:parent-style-name="Standard" style:list-style-name="tfPuce">
      <style:text-properties officeooo:paragraph-rsid="013a391c"/>
    </style:style>
    <style:style style:name="P169" style:family="paragraph" style:parent-style-name="Standard" style:list-style-name="tfPuce">
      <style:text-properties officeooo:paragraph-rsid="0146b6ef"/>
    </style:style>
    <style:style style:name="P170" style:family="paragraph" style:parent-style-name="Standard" style:list-style-name="tfPuce">
      <style:text-properties officeooo:paragraph-rsid="014df8cc"/>
    </style:style>
    <style:style style:name="P171" style:family="paragraph" style:parent-style-name="Standard" style:list-style-name="tfPuce">
      <style:text-properties officeooo:paragraph-rsid="014c9187"/>
    </style:style>
    <style:style style:name="P172" style:family="paragraph" style:parent-style-name="Standard" style:list-style-name="tfPuce">
      <style:text-properties officeooo:paragraph-rsid="012207e6"/>
    </style:style>
    <style:style style:name="P173" style:family="paragraph" style:parent-style-name="Standard" style:list-style-name="tfPuce">
      <style:text-properties officeooo:paragraph-rsid="01562924"/>
    </style:style>
    <style:style style:name="P174" style:family="paragraph" style:parent-style-name="Standard" style:list-style-name="tfPuce">
      <style:text-properties officeooo:paragraph-rsid="015a86f1"/>
    </style:style>
    <style:style style:name="P175" style:family="paragraph" style:parent-style-name="Standard" style:list-style-name="tfPuce">
      <style:text-properties officeooo:rsid="013a391c" officeooo:paragraph-rsid="013a391c"/>
    </style:style>
    <style:style style:name="P176" style:family="paragraph" style:parent-style-name="Standard" style:list-style-name="tfPuce">
      <style:text-properties officeooo:rsid="013a391c" officeooo:paragraph-rsid="013f81b4"/>
    </style:style>
    <style:style style:name="P177" style:family="paragraph" style:parent-style-name="Standard" style:list-style-name="tfPuce">
      <style:text-properties officeooo:rsid="0136d5ae" officeooo:paragraph-rsid="0136d5ae"/>
    </style:style>
    <style:style style:name="P178" style:family="paragraph" style:parent-style-name="Standard" style:list-style-name="tfPuce">
      <style:text-properties officeooo:rsid="0133c183" officeooo:paragraph-rsid="0133c183"/>
    </style:style>
    <style:style style:name="P179" style:family="paragraph" style:parent-style-name="Standard" style:list-style-name="tfPuce">
      <style:text-properties officeooo:rsid="0146b6ef" officeooo:paragraph-rsid="0146b6ef"/>
    </style:style>
    <style:style style:name="P180" style:family="paragraph" style:parent-style-name="Standard" style:list-style-name="tfPuce">
      <style:text-properties officeooo:rsid="014df8cc" officeooo:paragraph-rsid="014df8cc"/>
    </style:style>
    <style:style style:name="P181" style:family="paragraph" style:parent-style-name="Standard" style:list-style-name="tfPuce">
      <style:text-properties officeooo:rsid="01562924" officeooo:paragraph-rsid="01562924"/>
    </style:style>
    <style:style style:name="P182" style:family="paragraph" style:parent-style-name="Standard" style:list-style-name="tfPuce">
      <style:text-properties officeooo:rsid="015ae689" officeooo:paragraph-rsid="015ae689"/>
    </style:style>
    <style:style style:name="P183" style:family="paragraph" style:parent-style-name="Standard">
      <style:text-properties officeooo:paragraph-rsid="0190efda"/>
    </style:style>
    <style:style style:name="P184" style:family="paragraph" style:parent-style-name="tfTitre_20_1_29_">
      <style:paragraph-properties fo:break-before="page"/>
      <style:text-properties officeooo:paragraph-rsid="00e52749"/>
    </style:style>
    <style:style style:name="P185" style:family="paragraph" style:parent-style-name="tfTitre_20_1_29_" style:list-style-name="tfNum_20_1_29_">
      <style:text-properties officeooo:paragraph-rsid="01197bdc"/>
    </style:style>
    <style:style style:name="P186" style:family="paragraph" style:parent-style-name="tfTitre_20_1_29_" style:list-style-name="tfNum_20_1_29_">
      <style:paragraph-properties fo:break-before="page"/>
      <style:text-properties officeooo:paragraph-rsid="01197bdc"/>
    </style:style>
    <style:style style:name="P187" style:family="paragraph" style:parent-style-name="tfTitre_20_1_29_" style:list-style-name="tfNum_20_1_29_" style:master-page-name="">
      <style:paragraph-properties fo:margin-left="0.499cm" fo:margin-right="0cm" fo:text-indent="-0.499cm" style:auto-text-indent="false" style:page-number="auto" fo:break-before="page" fo:padding="0cm" fo:border="none" style:shadow="none" style:writing-mode="page">
        <style:tab-stops/>
      </style:paragraph-properties>
    </style:style>
    <style:style style:name="P188" style:family="paragraph" style:parent-style-name="tfTitre_20_1_29_">
      <style:paragraph-properties fo:break-before="page"/>
      <style:text-properties officeooo:rsid="01670c5f" officeooo:paragraph-rsid="01670c5f"/>
    </style:style>
    <style:style style:name="P189" style:family="paragraph" style:parent-style-name="tfTitre_20_I_29_">
      <style:text-properties fo:font-variant="normal" fo:text-transform="none" style:font-name="Arial2" fo:font-size="18pt" fo:font-style="italic" fo:font-weight="bold" officeooo:rsid="00ee1bef" officeooo:paragraph-rsid="00ee1bef" style:font-size-asian="20pt" style:font-weight-asian="bold" style:font-size-complex="20pt" style:font-weight-complex="bold"/>
    </style:style>
    <style:style style:name="P190" style:family="paragraph" style:parent-style-name="tfTitre_20_I_29_">
      <style:paragraph-properties fo:break-before="page"/>
      <style:text-properties fo:font-variant="normal" fo:text-transform="none" style:font-name="Arial2" fo:font-size="18pt" fo:font-style="italic" fo:font-weight="bold" officeooo:rsid="00e25b00" officeooo:paragraph-rsid="00e25b00" style:font-size-asian="20pt" style:font-weight-asian="bold" style:font-size-complex="20pt" style:font-weight-complex="bold"/>
    </style:style>
    <style:style style:name="P191" style:family="paragraph" style:parent-style-name="tfTitre_20_I_29_">
      <style:paragraph-properties fo:break-before="page"/>
      <style:text-properties fo:font-variant="normal" fo:text-transform="none" style:font-name="Arial2" fo:font-size="18pt" fo:font-style="italic" fo:font-weight="bold" officeooo:rsid="012207e6" officeooo:paragraph-rsid="012207e6" style:font-size-asian="20pt" style:font-weight-asian="bold" style:font-size-complex="20pt" style:font-weight-complex="bold"/>
    </style:style>
    <style:style style:name="P192" style:family="paragraph" style:parent-style-name="tfTitre_20_I_29_">
      <style:paragraph-properties fo:break-before="page"/>
    </style:style>
    <style:style style:name="P193" style:family="paragraph" style:parent-style-name="tfTitre_20_a_29_">
      <style:text-properties officeooo:paragraph-rsid="01656ac5"/>
    </style:style>
    <style:style style:name="P194" style:family="paragraph" style:parent-style-name="tfTitre_20_a_29_">
      <style:text-properties officeooo:rsid="01656ac5" officeooo:paragraph-rsid="01656ac5"/>
    </style:style>
    <style:style style:name="P195" style:family="paragraph" style:parent-style-name="tfTitre_20_a_29_">
      <style:text-properties officeooo:rsid="016a8de2" officeooo:paragraph-rsid="016a8de2"/>
    </style:style>
    <style:style style:name="P196" style:family="paragraph" style:parent-style-name="tfTitre_20_a_29_">
      <style:text-properties officeooo:paragraph-rsid="016e6ca8"/>
    </style:style>
    <style:style style:name="P197" style:family="paragraph" style:parent-style-name="tfTitre_20_a_29_" style:list-style-name="">
      <style:text-properties officeooo:paragraph-rsid="0178e97f"/>
    </style:style>
    <style:style style:name="P198" style:family="paragraph" style:parent-style-name="tfTitre_20_a_29_">
      <style:text-properties officeooo:paragraph-rsid="0172d9a0"/>
    </style:style>
    <style:style style:name="P199" style:family="paragraph">
      <style:paragraph-properties fo:text-align="start"/>
      <style:text-properties style:text-line-through-style="none" style:text-line-through-type="none" style:font-name="Courier New1" fo:font-size="10pt" fo:font-style="normal" style:text-underline-style="none" fo:font-weight="bold"/>
    </style:style>
    <style:style style:name="P200" style:family="paragraph">
      <style:paragraph-properties fo:text-align="center"/>
      <style:text-properties style:text-line-through-style="none" style:text-line-through-type="none" style:font-name="Arial3" fo:font-size="12pt" fo:font-style="normal" style:text-underline-style="none"/>
    </style:style>
    <style:style style:name="P201" style:family="paragraph">
      <style:paragraph-properties fo:text-align="center"/>
      <style:text-properties style:text-line-through-style="none" style:text-line-through-type="none" style:font-name="Times New Roman2" fo:font-size="12pt" fo:font-style="normal" style:text-underline-style="none"/>
    </style:style>
    <style:style style:name="P20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cm" fo:margin-right="0cm" fo:margin-top="0cm" fo:margin-bottom="0cm" fo:line-height="100%" fo:text-indent="0cm" style:writing-mode="lr-tb"/>
    </style:style>
    <style:style style:name="P204"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P20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style:paragraph-properties fo:margin-left="0cm" fo:margin-right="0cm" fo:margin-top="0cm" fo:margin-bottom="0cm" fo:line-height="100%" fo:text-indent="0cm"/>
    </style:style>
    <style:style style:name="P214"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a75fe" style:font-weight-asian="bold" style:font-weight-complex="bold"/>
    </style:style>
    <style:style style:name="T3" style:family="text">
      <style:text-properties fo:font-weight="bold" officeooo:rsid="00ee1bef" style:font-weight-asian="bold" style:font-weight-complex="bold"/>
    </style:style>
    <style:style style:name="T4" style:family="text">
      <style:text-properties fo:font-weight="bold" officeooo:rsid="0105b43c" style:font-weight-asian="bold" style:font-weight-complex="bold"/>
    </style:style>
    <style:style style:name="T5" style:family="text">
      <style:text-properties fo:font-weight="bold" officeooo:rsid="010af310" style:font-weight-asian="bold" style:font-weight-complex="bold"/>
    </style:style>
    <style:style style:name="T6" style:family="text">
      <style:text-properties fo:font-weight="bold" officeooo:rsid="01397f64" style:font-weight-asian="bold" style:font-weight-complex="bold"/>
    </style:style>
    <style:style style:name="T7" style:family="text">
      <style:text-properties fo:font-weight="bold" officeooo:rsid="01241076" style:font-weight-asian="bold" style:font-weight-complex="bold"/>
    </style:style>
    <style:style style:name="T8" style:family="text">
      <style:text-properties fo:font-weight="bold" officeooo:rsid="0130a08f" style:font-weight-asian="bold" style:font-weight-complex="bold"/>
    </style:style>
    <style:style style:name="T9" style:family="text">
      <style:text-properties fo:font-weight="bold" officeooo:rsid="01275229" style:font-weight-asian="bold" style:font-weight-complex="bold"/>
    </style:style>
    <style:style style:name="T10" style:family="text">
      <style:text-properties fo:font-weight="bold" officeooo:rsid="015a86f1" style:font-weight-asian="bold" style:font-weight-complex="bold"/>
    </style:style>
    <style:style style:name="T11" style:family="text">
      <style:text-properties officeooo:rsid="00c04205"/>
    </style:style>
    <style:style style:name="T12" style:family="text">
      <style:text-properties officeooo:rsid="00c08bbc"/>
    </style:style>
    <style:style style:name="T13" style:family="text">
      <style:text-properties officeooo:rsid="00c17862"/>
    </style:style>
    <style:style style:name="T14" style:family="text">
      <style:text-properties officeooo:rsid="00c28ed8"/>
    </style:style>
    <style:style style:name="T15" style:family="text">
      <style:text-properties officeooo:rsid="00c4a58d"/>
    </style:style>
    <style:style style:name="T16" style:family="text">
      <style:text-properties fo:font-style="italic" style:font-style-asian="italic" style:font-style-complex="italic"/>
    </style:style>
    <style:style style:name="T17" style:family="text">
      <style:text-properties fo:font-style="italic" officeooo:rsid="00c17862" style:font-style-asian="italic" style:font-style-complex="italic"/>
    </style:style>
    <style:style style:name="T18" style:family="text">
      <style:text-properties fo:font-style="italic" officeooo:rsid="0113817c" style:font-style-asian="italic" style:font-style-complex="italic"/>
    </style:style>
    <style:style style:name="T19" style:family="text">
      <style:text-properties officeooo:rsid="00c50bf5"/>
    </style:style>
    <style:style style:name="T20" style:family="text">
      <style:text-properties officeooo:rsid="00ca06d0"/>
    </style:style>
    <style:style style:name="T21" style:family="text">
      <style:text-properties officeooo:rsid="00cc571f"/>
    </style:style>
    <style:style style:name="T22" style:family="text">
      <style:text-properties style:font-name="Courier New2" fo:font-size="10pt" fo:font-weight="bold" officeooo:rsid="00e843df"/>
    </style:style>
    <style:style style:name="T23" style:family="text">
      <style:text-properties style:font-name="Courier New2" fo:font-size="10pt" fo:font-weight="bold" officeooo:rsid="00ef81e0"/>
    </style:style>
    <style:style style:name="T24" style:family="text">
      <style:text-properties style:font-name="Courier New2" fo:font-size="10pt" fo:font-weight="bold" officeooo:rsid="01021cfc"/>
    </style:style>
    <style:style style:name="T25" style:family="text">
      <style:text-properties style:font-name="Courier New2" fo:font-size="10pt" fo:font-weight="bold" officeooo:rsid="011782d3"/>
    </style:style>
    <style:style style:name="T26" style:family="text">
      <style:text-properties style:font-name="Courier New2" fo:font-size="10pt" fo:font-weight="bold" officeooo:rsid="01197bdc"/>
    </style:style>
    <style:style style:name="T27" style:family="text">
      <style:text-properties style:font-name="Courier New2" fo:font-size="10pt" fo:font-weight="bold" officeooo:rsid="01670c5f"/>
    </style:style>
    <style:style style:name="T28" style:family="text">
      <style:text-properties officeooo:rsid="00d433d7"/>
    </style:style>
    <style:style style:name="T29" style:family="text">
      <style:text-properties officeooo:rsid="00d787a1"/>
    </style:style>
    <style:style style:name="T30" style:family="text">
      <style:text-properties officeooo:rsid="00dd6096"/>
    </style:style>
    <style:style style:name="T31" style:family="text">
      <style:text-properties officeooo:rsid="00df2344"/>
    </style:style>
    <style:style style:name="T32" style:family="text">
      <style:text-properties style:font-name="Times New Roman1" fo:font-size="12pt" fo:font-weight="normal" style:font-size-asian="12pt" style:font-weight-asian="normal" style:font-size-complex="12pt" style:font-weight-complex="normal"/>
    </style:style>
    <style:style style:name="T33" style:family="text">
      <style:text-properties style:font-name="Times New Roman1" fo:font-size="12pt" fo:font-weight="normal" officeooo:rsid="0190efda" style:font-size-asian="12pt" style:font-weight-asian="normal" style:font-size-complex="12pt" style:font-weight-complex="normal"/>
    </style:style>
    <style:style style:name="T34" style:family="text">
      <style:text-properties style:font-name="Times New Roman1" fo:font-size="12pt" fo:font-style="normal" fo:font-weight="normal" officeooo:rsid="01656ac5" style:font-size-asian="10.5pt" style:font-style-asian="normal" style:font-weight-asian="normal" style:font-size-complex="12pt" style:font-style-complex="normal" style:font-weight-complex="normal"/>
    </style:style>
    <style:style style:name="T35" style:family="text">
      <style:text-properties style:font-name="Times New Roman1" fo:font-style="normal" fo:font-weight="normal" officeooo:rsid="00f2320d" style:font-style-asian="normal" style:font-weight-asian="normal" style:font-style-complex="normal" style:font-weight-complex="normal"/>
    </style:style>
    <style:style style:name="T36" style:family="text">
      <style:text-properties style:font-name="Times New Roman1" fo:font-style="normal" fo:font-weight="normal" officeooo:rsid="00e25b00" style:font-style-asian="normal" style:font-weight-asian="normal" style:font-style-complex="normal" style:font-weight-complex="normal"/>
    </style:style>
    <style:style style:name="T37" style:family="text">
      <style:text-properties officeooo:rsid="00e25b00"/>
    </style:style>
    <style:style style:name="T38" style:family="text">
      <style:text-properties officeooo:rsid="00e38838"/>
    </style:style>
    <style:style style:name="T39" style:family="text">
      <style:text-properties officeooo:rsid="00e52749"/>
    </style:style>
    <style:style style:name="T40" style:family="text">
      <style:text-properties officeooo:rsid="000ec792"/>
    </style:style>
    <style:style style:name="T41" style:family="text">
      <style:text-properties officeooo:rsid="00e5ece8"/>
    </style:style>
    <style:style style:name="T42" style:family="text">
      <style:text-properties officeooo:rsid="00108e5e"/>
    </style:style>
    <style:style style:name="T43" style:family="text">
      <style:text-properties officeooo:rsid="00e7246b"/>
    </style:style>
    <style:style style:name="T44" style:family="text">
      <style:text-properties officeooo:rsid="00e843df"/>
    </style:style>
    <style:style style:name="T45" style:family="text">
      <style:text-properties officeooo:rsid="000a8b9b"/>
    </style:style>
    <style:style style:name="T46" style:family="text">
      <style:text-properties officeooo:rsid="00e8ea60"/>
    </style:style>
    <style:style style:name="T47" style:family="text">
      <style:text-properties officeooo:rsid="00ea75fe"/>
    </style:style>
    <style:style style:name="T48" style:family="text">
      <style:text-properties officeooo:rsid="00ead93a"/>
    </style:style>
    <style:style style:name="T49" style:family="text">
      <style:text-properties officeooo:rsid="00ed665c"/>
    </style:style>
    <style:style style:name="T50" style:family="text">
      <style:text-properties officeooo:rsid="00ee1bef"/>
    </style:style>
    <style:style style:name="T51" style:family="text">
      <style:text-properties officeooo:rsid="00ef81e0"/>
    </style:style>
    <style:style style:name="T52" style:family="text">
      <style:text-properties officeooo:rsid="00f1462f"/>
    </style:style>
    <style:style style:name="T53" style:family="text">
      <style:text-properties officeooo:rsid="00f2320d"/>
    </style:style>
    <style:style style:name="T54" style:family="text">
      <style:text-properties officeooo:rsid="00f3ca78"/>
    </style:style>
    <style:style style:name="T55" style:family="text">
      <style:text-properties officeooo:rsid="00f731bd"/>
    </style:style>
    <style:style style:name="T56" style:family="text">
      <style:text-properties officeooo:rsid="00f8e6b3"/>
    </style:style>
    <style:style style:name="T57" style:family="text">
      <style:text-properties officeooo:rsid="00f9fde5"/>
    </style:style>
    <style:style style:name="T58" style:family="text">
      <style:text-properties officeooo:rsid="00fac87b"/>
    </style:style>
    <style:style style:name="T59" style:family="text">
      <style:text-properties officeooo:rsid="00fc1f1c"/>
    </style:style>
    <style:style style:name="T60" style:family="text">
      <style:text-properties officeooo:rsid="0101a686"/>
    </style:style>
    <style:style style:name="T61" style:family="text">
      <style:text-properties officeooo:rsid="0101fecf"/>
    </style:style>
    <style:style style:name="T62" style:family="text">
      <style:text-properties fo:color="#ff8000" loext:opacity="100%"/>
    </style:style>
    <style:style style:name="T63" style:family="text">
      <style:text-properties style:use-window-font-color="true" loext:opacity="0%"/>
    </style:style>
    <style:style style:name="T64" style:family="text">
      <style:text-properties officeooo:rsid="01021cfc"/>
    </style:style>
    <style:style style:name="T65" style:family="text">
      <style:text-properties officeooo:rsid="0103ad19"/>
    </style:style>
    <style:style style:name="T66" style:family="text">
      <style:text-properties fo:color="#b2b2b2" loext:opacity="100%" officeooo:rsid="0103ad19"/>
    </style:style>
    <style:style style:name="T67" style:family="text">
      <style:text-properties officeooo:rsid="0104919a"/>
    </style:style>
    <style:style style:name="T68" style:family="text">
      <style:text-properties officeooo:rsid="0105b43c"/>
    </style:style>
    <style:style style:name="T69" style:family="text">
      <style:text-properties officeooo:rsid="01063929"/>
    </style:style>
    <style:style style:name="T70" style:family="text">
      <style:text-properties officeooo:rsid="0107906d"/>
    </style:style>
    <style:style style:name="T71" style:family="text">
      <style:text-properties officeooo:rsid="01080054"/>
    </style:style>
    <style:style style:name="T72" style:family="text">
      <style:text-properties officeooo:rsid="01080ee9"/>
    </style:style>
    <style:style style:name="T73" style:family="text">
      <style:text-properties style:text-underline-style="solid" style:text-underline-width="auto" style:text-underline-color="font-color"/>
    </style:style>
    <style:style style:name="T74" style:family="text">
      <style:text-properties style:font-name="Times New Roman" officeooo:rsid="0113e470" style:font-name-asian="Times New Roman" style:font-name-complex="Times New Roman"/>
    </style:style>
    <style:style style:name="T75" style:family="text">
      <style:text-properties style:font-name="Times New Roman" officeooo:rsid="0131fd0d"/>
    </style:style>
    <style:style style:name="T76" style:family="text">
      <style:text-properties style:font-name="Times New Roman" officeooo:rsid="0132b550"/>
    </style:style>
    <style:style style:name="T77" style:family="text">
      <style:text-properties style:font-name="Times New Roman" officeooo:rsid="013bc2f9"/>
    </style:style>
    <style:style style:name="T78" style:family="text">
      <style:text-properties style:font-name="Times New Roman" officeooo:rsid="013e6458"/>
    </style:style>
    <style:style style:name="T79" style:family="text">
      <style:text-properties style:font-name="Times New Roman" officeooo:rsid="01434b95"/>
    </style:style>
    <style:style style:name="T80" style:family="text">
      <style:text-properties style:font-name="Courier New" officeooo:rsid="0108a492" style:font-name-asian="Courier New" style:font-name-complex="Courier New"/>
    </style:style>
    <style:style style:name="T81" style:family="text">
      <style:text-properties style:font-name="Courier New" fo:font-size="10pt" fo:font-weight="bold" style:font-weight-asian="bold" style:font-weight-complex="bold"/>
    </style:style>
    <style:style style:name="T82" style:family="text">
      <style:text-properties officeooo:rsid="0108c040"/>
    </style:style>
    <style:style style:name="T83" style:family="text">
      <style:text-properties officeooo:rsid="010af310"/>
    </style:style>
    <style:style style:name="T84" style:family="text">
      <style:text-properties officeooo:rsid="010bcca1"/>
    </style:style>
    <style:style style:name="T85" style:family="text">
      <style:text-properties officeooo:rsid="010d5ebc"/>
    </style:style>
    <style:style style:name="T86" style:family="text">
      <style:text-properties officeooo:rsid="0113817c"/>
    </style:style>
    <style:style style:name="T87" style:family="text">
      <style:text-properties officeooo:rsid="0113e470"/>
    </style:style>
    <style:style style:name="T88" style:family="text">
      <style:text-properties officeooo:rsid="01152d75"/>
    </style:style>
    <style:style style:name="T89" style:family="text">
      <style:text-properties officeooo:rsid="0115fc8b"/>
    </style:style>
    <style:style style:name="T90" style:family="text">
      <style:text-properties officeooo:rsid="01164b14"/>
    </style:style>
    <style:style style:name="T91" style:family="text">
      <style:text-properties officeooo:rsid="0116de9b"/>
    </style:style>
    <style:style style:name="T92" style:family="text">
      <style:text-properties officeooo:rsid="01197bdc"/>
    </style:style>
    <style:style style:name="T93" style:family="text">
      <style:text-properties officeooo:rsid="011ab774"/>
    </style:style>
    <style:style style:name="T94" style:family="text">
      <style:text-properties officeooo:rsid="011c6b94"/>
    </style:style>
    <style:style style:name="T95" style:family="text">
      <style:text-properties officeooo:rsid="011cb2f3"/>
    </style:style>
    <style:style style:name="T96" style:family="text">
      <style:text-properties officeooo:rsid="0120bd91"/>
    </style:style>
    <style:style style:name="T97" style:family="text">
      <style:text-properties officeooo:rsid="01241076"/>
    </style:style>
    <style:style style:name="T98" style:family="text">
      <style:text-properties officeooo:rsid="01249ca4"/>
    </style:style>
    <style:style style:name="T99" style:family="text">
      <style:text-properties officeooo:rsid="01275229"/>
    </style:style>
    <style:style style:name="T100" style:family="text">
      <style:text-properties officeooo:rsid="0128f635"/>
    </style:style>
    <style:style style:name="T101" style:family="text">
      <style:text-properties officeooo:rsid="012ae4e5"/>
    </style:style>
    <style:style style:name="T102" style:family="text">
      <style:text-properties officeooo:rsid="012c674c"/>
    </style:style>
    <style:style style:name="T103" style:family="text">
      <style:text-properties officeooo:rsid="012c6b12"/>
    </style:style>
    <style:style style:name="T104" style:family="text">
      <style:text-properties officeooo:rsid="012d1749"/>
    </style:style>
    <style:style style:name="T105" style:family="text">
      <style:text-properties officeooo:rsid="012ef41d"/>
    </style:style>
    <style:style style:name="T106" style:family="text">
      <style:text-properties officeooo:rsid="0130a08f"/>
    </style:style>
    <style:style style:name="T107" style:family="text">
      <style:text-properties officeooo:rsid="0131fd0d"/>
    </style:style>
    <style:style style:name="T108" style:family="text">
      <style:text-properties officeooo:rsid="0133c183"/>
    </style:style>
    <style:style style:name="T109" style:family="text">
      <style:text-properties officeooo:rsid="01352d74"/>
    </style:style>
    <style:style style:name="T110" style:family="text">
      <style:text-properties officeooo:rsid="0136d5ae"/>
    </style:style>
    <style:style style:name="T111" style:family="text">
      <style:text-properties fo:font-variant="normal" fo:text-transform="none" style:font-name="Arial2" fo:font-size="18pt" fo:font-style="italic" fo:font-weight="bold" officeooo:rsid="0139ba6a" style:font-size-asian="20pt" style:font-weight-asian="bold" style:font-size-complex="20pt" style:font-weight-complex="bold"/>
    </style:style>
    <style:style style:name="T112" style:family="text">
      <style:text-properties fo:font-variant="normal" fo:text-transform="none" style:font-name="Arial" fo:font-size="12pt" fo:font-style="italic" fo:font-weight="bold" officeooo:rsid="013f81b4" style:font-size-asian="14pt" style:font-style-asian="italic" style:font-weight-asian="bold" style:font-size-complex="14pt" style:font-style-complex="italic" style:font-weight-complex="bold"/>
    </style:style>
    <style:style style:name="T113" style:family="text">
      <style:text-properties fo:font-variant="normal" fo:text-transform="none" style:font-name="Arial" fo:font-size="12pt" fo:font-style="italic" fo:font-weight="bold" officeooo:rsid="01670c5f" style:font-size-asian="14pt" style:font-style-asian="italic" style:font-weight-asian="bold" style:font-size-complex="14pt" style:font-style-complex="italic" style:font-weight-complex="bold"/>
    </style:style>
    <style:style style:name="T114" style:family="text">
      <style:text-properties fo:font-variant="normal" fo:text-transform="none" style:font-name="Arial" fo:font-size="12pt" fo:font-style="italic" fo:font-weight="bold" officeooo:rsid="016e6ca8" style:font-size-asian="14pt" style:font-style-asian="italic" style:font-weight-asian="bold" style:font-size-complex="14pt" style:font-style-complex="italic" style:font-weight-complex="bold"/>
    </style:style>
    <style:style style:name="T115" style:family="text">
      <style:text-properties fo:font-variant="normal" fo:text-transform="none" style:font-name="Arial" fo:font-size="12pt" fo:font-style="italic" fo:font-weight="bold" officeooo:rsid="0172d9a0" style:font-size-asian="14pt" style:font-style-asian="italic" style:font-weight-asian="bold" style:font-size-complex="14pt" style:font-style-complex="italic" style:font-weight-complex="bold"/>
    </style:style>
    <style:style style:name="T116" style:family="text">
      <style:text-properties fo:font-variant="normal" fo:text-transform="none" style:font-name="Arial" fo:font-size="12pt" fo:font-style="italic" fo:font-weight="bold" officeooo:rsid="017ad0f5" style:font-size-asian="14pt" style:font-style-asian="italic" style:font-weight-asian="bold" style:font-size-complex="14pt" style:font-style-complex="italic" style:font-weight-complex="bold"/>
    </style:style>
    <style:style style:name="T117" style:family="text">
      <style:text-properties officeooo:rsid="01384369"/>
    </style:style>
    <style:style style:name="T118" style:family="text">
      <style:text-properties officeooo:rsid="01397f64"/>
    </style:style>
    <style:style style:name="T119" style:family="text">
      <style:text-properties officeooo:rsid="013a391c"/>
    </style:style>
    <style:style style:name="T120" style:family="text">
      <style:text-properties officeooo:rsid="013bc2f9"/>
    </style:style>
    <style:style style:name="T121" style:family="text">
      <style:text-properties officeooo:rsid="013d4718"/>
    </style:style>
    <style:style style:name="T122" style:family="text">
      <style:text-properties officeooo:rsid="013f81b4"/>
    </style:style>
    <style:style style:name="T123" style:family="text">
      <style:text-properties officeooo:rsid="0141bff6"/>
    </style:style>
    <style:style style:name="T124" style:family="text">
      <style:text-properties officeooo:rsid="01434b95"/>
    </style:style>
    <style:style style:name="T125" style:family="text">
      <style:text-properties officeooo:rsid="01450e1b"/>
    </style:style>
    <style:style style:name="T126" style:family="text">
      <style:text-properties officeooo:rsid="0146b6ef"/>
    </style:style>
    <style:style style:name="T127" style:family="text">
      <style:text-properties officeooo:rsid="0147b586"/>
    </style:style>
    <style:style style:name="T128" style:family="text">
      <style:text-properties officeooo:rsid="014990ee"/>
    </style:style>
    <style:style style:name="T129" style:family="text">
      <style:text-properties officeooo:rsid="014b0790"/>
    </style:style>
    <style:style style:name="T130" style:family="text">
      <style:text-properties officeooo:rsid="014b6e23"/>
    </style:style>
    <style:style style:name="T131" style:family="text">
      <style:text-properties officeooo:rsid="014c9187"/>
    </style:style>
    <style:style style:name="T132" style:family="text">
      <style:text-properties officeooo:rsid="014df8cc"/>
    </style:style>
    <style:style style:name="T133" style:family="text">
      <style:text-properties officeooo:rsid="014f6d0e"/>
    </style:style>
    <style:style style:name="T134" style:family="text">
      <style:text-properties officeooo:rsid="01536b43"/>
    </style:style>
    <style:style style:name="T135" style:family="text">
      <style:text-properties officeooo:rsid="01562924"/>
    </style:style>
    <style:style style:name="T136" style:family="text">
      <style:text-properties officeooo:rsid="0157e455"/>
    </style:style>
    <style:style style:name="T137" style:family="text">
      <style:text-properties officeooo:rsid="0159902b"/>
    </style:style>
    <style:style style:name="T138" style:family="text">
      <style:text-properties officeooo:rsid="0159aec1"/>
    </style:style>
    <style:style style:name="T139" style:family="text">
      <style:text-properties officeooo:rsid="015a86f1"/>
    </style:style>
    <style:style style:name="T140" style:family="text">
      <style:text-properties officeooo:rsid="015ae689"/>
    </style:style>
    <style:style style:name="T141" style:family="text">
      <style:text-properties officeooo:rsid="015c3842"/>
    </style:style>
    <style:style style:name="T142" style:family="text">
      <style:text-properties officeooo:rsid="015d2a93"/>
    </style:style>
    <style:style style:name="T143" style:family="text">
      <style:text-properties officeooo:rsid="015de90d"/>
    </style:style>
    <style:style style:name="T144" style:family="text">
      <style:text-properties officeooo:rsid="015e926d"/>
    </style:style>
    <style:style style:name="T145" style:family="text">
      <style:text-properties officeooo:rsid="01620d2c"/>
    </style:style>
    <style:style style:name="T146" style:family="text">
      <style:text-properties officeooo:rsid="0162c067"/>
    </style:style>
    <style:style style:name="T147" style:family="text">
      <style:text-properties officeooo:rsid="0162f6f8"/>
    </style:style>
    <style:style style:name="T148" style:family="text">
      <style:text-properties officeooo:rsid="0163c989"/>
    </style:style>
    <style:style style:name="T149" style:family="text">
      <style:text-properties officeooo:rsid="01656ac5"/>
    </style:style>
    <style:style style:name="T150" style:family="text">
      <style:text-properties fo:font-size="12pt"/>
    </style:style>
    <style:style style:name="T151" style:family="text">
      <style:text-properties fo:font-size="12pt" officeooo:rsid="016fe473"/>
    </style:style>
    <style:style style:name="T152" style:family="text">
      <style:text-properties officeooo:rsid="01670c5f"/>
    </style:style>
    <style:style style:name="T153" style:family="text">
      <style:text-properties officeooo:rsid="0168fd09"/>
    </style:style>
    <style:style style:name="T154" style:family="text">
      <style:text-properties officeooo:rsid="016a8de2"/>
    </style:style>
    <style:style style:name="T155" style:family="text">
      <style:text-properties officeooo:rsid="016c14a0"/>
    </style:style>
    <style:style style:name="T156" style:family="text">
      <style:text-properties officeooo:rsid="016c2032"/>
    </style:style>
    <style:style style:name="T157" style:family="text">
      <style:text-properties officeooo:rsid="016c4933"/>
    </style:style>
    <style:style style:name="T158" style:family="text">
      <style:text-properties officeooo:rsid="016d12dd"/>
    </style:style>
    <style:style style:name="T159" style:family="text">
      <style:text-properties officeooo:rsid="016e6ca8"/>
    </style:style>
    <style:style style:name="T160" style:family="text">
      <style:text-properties officeooo:rsid="016f004b"/>
    </style:style>
    <style:style style:name="T161" style:family="text">
      <style:text-properties officeooo:rsid="016fde28"/>
    </style:style>
    <style:style style:name="T162" style:family="text">
      <style:text-properties officeooo:rsid="016fe473"/>
    </style:style>
    <style:style style:name="T163" style:family="text">
      <style:text-properties officeooo:rsid="01708942"/>
    </style:style>
    <style:style style:name="T164" style:family="text">
      <style:text-properties officeooo:rsid="0172d9a0"/>
    </style:style>
    <style:style style:name="T165" style:family="text">
      <style:text-properties officeooo:rsid="0174e68a"/>
    </style:style>
    <style:style style:name="T166" style:family="text">
      <style:text-properties officeooo:rsid="0175f1c0"/>
    </style:style>
    <style:style style:name="T167" style:family="text">
      <style:text-properties fo:font-size="10pt" fo:font-style="italic" fo:font-weight="bold" officeooo:rsid="00e25b00" style:font-size-asian="10pt" style:font-style-asian="italic" style:font-weight-asian="bold" style:font-size-complex="10pt" style:font-style-complex="italic" style:font-weight-complex="bold"/>
    </style:style>
    <style:style style:name="T168" style:family="text">
      <style:text-properties fo:font-size="10pt" fo:font-style="italic" fo:font-weight="bold" officeooo:rsid="00f2320d" style:font-size-asian="10pt" style:font-style-asian="italic" style:font-weight-asian="bold" style:font-size-complex="10pt" style:font-style-complex="italic" style:font-weight-complex="bold"/>
    </style:style>
    <style:style style:name="T169" style:family="text">
      <style:text-properties officeooo:rsid="017ad0f5"/>
    </style:style>
    <style:style style:name="T170" style:family="text">
      <style:text-properties officeooo:rsid="017ca3bb"/>
    </style:style>
    <style:style style:name="T171" style:family="text">
      <style:text-properties style:font-name="Arial" fo:font-size="12pt" fo:font-style="italic" fo:font-weight="bold" officeooo:rsid="01656ac5" style:font-size-asian="10.5pt" style:font-style-asian="italic" style:font-weight-asian="bold" style:font-size-complex="12pt" style:font-style-complex="italic" style:font-weight-complex="bold"/>
    </style:style>
    <style:style style:name="T172" style:family="text">
      <style:text-properties officeooo:rsid="017e3524"/>
    </style:style>
    <style:style style:name="T173" style:family="text">
      <style:text-properties officeooo:rsid="018021e2"/>
    </style:style>
    <style:style style:name="T174" style:family="text">
      <style:text-properties officeooo:rsid="0183d9b7"/>
    </style:style>
    <style:style style:name="T175" style:family="text">
      <style:text-properties officeooo:rsid="01849d50"/>
    </style:style>
    <style:style style:name="T176" style:family="text">
      <style:text-properties fo:font-size="8pt" style:font-size-asian="7pt" style:font-size-complex="8pt"/>
    </style:style>
    <style:style style:name="T177" style:family="text">
      <style:text-properties officeooo:rsid="018b8d4a"/>
    </style:style>
    <style:style style:name="T178" style:family="text">
      <style:text-properties officeooo:rsid="018c6438"/>
    </style:style>
    <style:style style:name="T179" style:family="text">
      <style:text-properties officeooo:rsid="018f3c70"/>
    </style:style>
    <style:style style:name="T180" style:family="text">
      <style:text-properties officeooo:rsid="0190efda"/>
    </style:style>
    <style:style style:name="T181" style:family="text">
      <style:text-properties style:font-name="Courier New"/>
    </style:style>
    <style:style style:name="T182" style:family="text">
      <style:text-properties style:font-name="Courier New" officeooo:rsid="0190efda"/>
    </style:style>
    <style:style style:name="T183" style:family="text">
      <style:text-properties style:font-name="Courier New" officeooo:rsid="00cc571f"/>
    </style:style>
    <style:style style:name="T184" style:family="text">
      <style:text-properties style:font-name="Courier New" fo:font-size="12pt" fo:font-weight="normal" style:font-size-asian="12pt" style:font-weight-asian="normal" style:font-size-complex="12pt" style:font-weight-complex="normal"/>
    </style:style>
    <style:style style:name="T185" style:family="text">
      <style:text-properties style:font-name="Courier New" fo:font-size="12pt" fo:font-weight="normal" officeooo:rsid="0190efda" style:font-size-asian="12pt" style:font-weight-asian="normal" style:font-size-complex="12pt" style:font-weight-complex="normal"/>
    </style:style>
    <style:style style:name="T186" style:family="text">
      <style:text-properties style:font-name="Courier New" fo:font-size="12pt" fo:font-weight="bold" style:font-size-asian="12pt" style:font-weight-asian="bold" style:font-size-complex="12pt" style:font-weight-complex="bold"/>
    </style:style>
    <style:style style:name="T187" style:family="text">
      <style:text-properties style:font-name="Courier New" fo:font-size="12pt" fo:font-weight="bold" officeooo:rsid="0190efda" style:font-size-asian="12pt" style:font-weight-asian="bold" style:font-size-complex="12pt" style:font-weight-complex="bold"/>
    </style:style>
    <style:style style:name="T188" style:family="text">
      <style:text-properties style:font-name="Courier New" fo:font-weight="bold" style:font-weight-asian="bold" style:font-weight-complex="bold"/>
    </style:style>
    <style:style style:name="T189" style:family="text">
      <style:text-properties style:font-name="Courier New" fo:font-weight="bold" officeooo:rsid="0190efda" style:font-weight-asian="bold" style:font-weight-complex="bold"/>
    </style:style>
    <style:style style:name="T190" style:family="text">
      <style:text-properties style:font-name="Courier New" fo:font-weight="bold" officeooo:rsid="00cc571f" style:font-weight-asian="bold" style:font-weight-complex="bold"/>
    </style:style>
    <style:style style:name="T191" style:family="text">
      <style:text-properties style:font-name="Courier New" fo:font-size="10pt" fo:font-weight="bold" style:font-size-asian="10pt" style:font-weight-asian="bold" style:font-size-complex="10pt" style:font-weight-complex="bold"/>
    </style:style>
    <style:style style:name="T192" style:family="text">
      <style:text-properties style:font-name="Courier New" fo:font-size="10pt" fo:font-weight="bold" officeooo:rsid="0190efda" style:font-size-asian="10pt" style:font-weight-asian="bold" style:font-size-complex="10pt" style:font-weight-complex="bold"/>
    </style:style>
    <style:style style:name="T193" style:family="text">
      <style:text-properties style:font-name="Courier New" fo:font-size="10pt" fo:font-weight="bold" officeooo:rsid="00cc571f" style:font-size-asian="10pt" style:font-weight-asian="bold" style:font-size-complex="10pt" style:font-weight-complex="bold"/>
    </style:style>
    <style:style style:name="T194" style:family="text">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draw:textarea-vertical-align="middle" fo:border="solid" loext:decorative="false"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286cm" fo:padding-top="0cm" fo:padding-bottom="0cm" fo:padding-left="0cm" fo:padding-right="0cm"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843cm" fo:padding-top="0cm" fo:padding-bottom="0cm" fo:padding-left="0cm" fo:padding-right="0cm" draw:shadow="hidden" draw:shadow-offset-x="0.199cm" draw:shadow-offset-y="0.199cm" draw:shadow-color="#808080" loext:decorative="false" style:run-through="foreground"/>
      <style:paragraph-properties style:writing-mode="lr-tb"/>
    </style:style>
    <style:style style:name="gr6"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none" draw:fill-color="#ffffff"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7"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8" style:family="graphic">
      <style:graphic-properties draw:stroke="solid" draw:stroke-dash="Dashed_20__28_var_29__20_4" svg:stroke-width="0.041cm" svg:stroke-color="#000000" draw:marker-start="" draw:marker-start-width="0.25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loext:decorative="false" style:run-through="foreground"/>
    </style:style>
    <style:style style:name="gr9" style:family="graphic">
      <style:graphic-properties draw:stroke="solid" draw:stroke-dash="Dashed_20__28_var_29__20_4" svg:stroke-width="0.041cm" svg:stroke-color="#000000" draw:marker-start="Arrow" draw:marker-start-width="0.19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loext:decorative="false" style:run-through="foreground"/>
    </style:style>
    <style:style style:name="gr10" style:family="graphic">
      <style:graphic-properties draw:stroke="solid" draw:stroke-dash="Dashed_20__28_var_29__20_4" svg:stroke-width="0.041cm" svg:stroke-color="#000000" draw:marker-start="" draw:marker-start-width="0.259cm" draw:marker-start-center="false" draw:marker-end="Arrow" draw:marker-end-width="0.19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loext:decorative="false" style:run-through="foreground"/>
    </style:style>
    <style:style style:name="gr11" style:family="graphic">
      <style:graphic-properties draw:stroke="none" draw:stroke-dash="Dashed_20__28_var_29__20_4" svg:stroke-width="0cm" svg:stroke-color="#b3b3b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2" style:family="graphic">
      <style:graphic-properties draw:stroke="solid" draw:stroke-dash="Dashed_20__28_var_29__20_4" svg:stroke-width="0cm" svg:stroke-color="#1c5ced" draw:marker-start="" draw:marker-start-width="0.199cm" draw:marker-start-center="false" draw:marker-end="" draw:marker-end-width="0.199cm" draw:marker-end-center="false" draw:stroke-linejoin="round" svg:stroke-linecap="butt" draw:fill="none" draw:fill-color="#1c5ced"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3"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4"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5" style:family="graphic">
      <style:graphic-properties draw:stroke="solid" draw:stroke-dash="Dashed_20__28_var_29__20_4" svg:stroke-width="0cm" svg:stroke-color="#00a933" draw:marker-start="" draw:marker-start-width="0.199cm" draw:marker-start-center="false" draw:marker-end="" draw:marker-end-width="0.199cm" draw:marker-end-center="false" draw:stroke-linejoin="round" svg:stroke-linecap="butt" draw:fill="none" draw:fill-color="#00a933"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6"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7"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8" style:family="graphic">
      <style:graphic-properties draw:stroke="solid" draw:stroke-dash="Dashed_20__28_var_29__20_4" svg:stroke-width="0cm" svg:stroke-color="#ff0000" draw:marker-start="" draw:marker-start-width="0.199cm" draw:marker-start-center="false" draw:marker-end="" draw:marker-end-width="0.199cm" draw:marker-end-center="false" draw:stroke-linejoin="round" svg:stroke-linecap="butt" draw:fill="none" draw:fill-color="#ff0000"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9"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201cm" fo:padding-top="0cm" fo:padding-bottom="0cm" fo:padding-left="0cm" fo:padding-right="0cm" draw:shadow="hidden" draw:shadow-offset-x="0.199cm" draw:shadow-offset-y="0.199cm" draw:shadow-color="#808080" loext:decorative="false" style:run-through="foreground"/>
      <style:paragraph-properties style:writing-mode="lr-tb"/>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199cm" fo:padding-top="0cm" fo:padding-bottom="0cm" fo:padding-left="0cm" fo:padding-right="0cm" draw:shadow="hidden" draw:shadow-offset-x="0.199cm" draw:shadow-offset-y="0.199cm" draw:shadow-color="#808080" loext:decorative="false" style:run-through="foreground"/>
      <style:paragraph-properties style:writing-mode="lr-tb"/>
    </style:style>
    <style:style style:name="gr22"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23"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055cm" fo:padding-top="0cm" fo:padding-bottom="0cm" fo:padding-left="0cm" fo:padding-right="0cm" draw:shadow="hidden" draw:shadow-offset-x="0.199cm" draw:shadow-offset-y="0.199cm" draw:shadow-color="#808080" loext:decorative="false"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542cm" fo:padding-top="0cm" fo:padding-bottom="0cm" fo:padding-left="0cm" fo:padding-right="0cm"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312cm" fo:padding-top="0cm" fo:padding-bottom="0cm" fo:padding-left="0cm" fo:padding-right="0cm" draw:shadow="hidden" draw:shadow-offset-x="0.199cm" draw:shadow-offset-y="0.199cm" draw:shadow-color="#808080" loext:decorative="false" style:run-through="foreground"/>
      <style:paragraph-properties style:writing-mode="lr-tb"/>
    </style:style>
    <style:style style:name="gr27" style:family="graphic">
      <style:graphic-properties loext:decorative="false" style:run-through="foreground"/>
    </style:style>
    <style:style style:name="gr28" style:family="graphic">
      <style:graphic-properties draw:stroke="solid" svg:stroke-width="0.06cm" svg:stroke-color="#ff8000" draw:marker-start="" draw:marker-start-width="0.289cm" draw:marker-start-center="false" draw:marker-end="" draw:marker-end-width="0.289cm" draw:marker-end-center="false" draw:fill="solid" draw:fill-color="#729fcf" draw:textarea-horizontal-align="justify" draw:textarea-vertical-align="middle" fo:padding-top="0.155cm" fo:padding-bottom="0.155cm" fo:padding-left="0.28cm" fo:padding-right="0.28cm" draw:shadow="hidden" draw:shadow-offset-x="0.199cm" draw:shadow-offset-y="0.199cm" draw:shadow-color="#808080" loext:decorative="false" style:run-through="foreground"/>
    </style:style>
    <style:style style:name="gr29" style:family="graphic">
      <style:graphic-properties svg:stroke-width="0.03cm" draw:marker-start-width="0.397cm" draw:marker-end-width="0.397cm" draw:fill="none" draw:textarea-vertical-align="middle" draw:auto-grow-height="false" fo:min-height="10.146cm" fo:min-width="0.109cm" fo:padding-top="0.014cm" fo:padding-bottom="0.014cm" fo:padding-left="0.014cm" fo:padding-right="0.014cm"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30" style:family="graphic">
      <style:graphic-properties svg:stroke-width="0.03cm" draw:marker-start-width="0.397cm" draw:marker-end-width="0.397cm" draw:fill="none" draw:textarea-vertical-align="middle" draw:auto-grow-height="false" fo:min-height="7.516cm" fo:min-width="0.109cm" fo:padding-top="0.014cm" fo:padding-bottom="0.014cm" fo:padding-left="0.014cm" fo:padding-right="0.014cm"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31" style:family="graphic">
      <style:graphic-properties svg:stroke-width="0.03cm" draw:marker-start-width="0.397cm" draw:marker-end-width="0.397cm" draw:fill="none" draw:textarea-vertical-align="middle" draw:auto-grow-height="false" fo:min-height="7.475cm" fo:min-width="0.138cm" fo:padding-top="0.014cm" fo:padding-bottom="0.014cm" fo:padding-left="0.014cm" fo:padding-right="0.014cm"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32" style:family="graphic">
      <style:graphic-properties svg:stroke-width="0.03cm" draw:marker-start-width="0.397cm" draw:marker-end-width="0.397cm" draw:fill="none" draw:textarea-vertical-align="middle" draw:auto-grow-height="false" fo:min-height="10.194cm" fo:min-width="0.138cm" fo:padding-top="0.014cm" fo:padding-bottom="0.014cm" fo:padding-left="0.014cm" fo:padding-right="0.014cm" loext:decorative="false" style:run-through="foreground" style:wrap="none"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0" form:id="control8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algorithmes classiques</text:p>
      <text:p text:style-name="Standard"/>
      <text:list xml:id="list592822640" text:style-name="tfNum_20_I_29_">
        <text:list-item>
          <text:p text:style-name="P189">Complexité d’un algorithme</text:p>
        </text:list-item>
      </text:list>
      <text:p text:style-name="tfTitre_20_non_20_numéroté">Définition :</text:p>
      <text:p text:style-name="P17"><text:span text:style-name="T47">On appelle </text:span><text:span text:style-name="T2">complexité</text:span><text:span text:style-name="T47"> d’un algorithme la façon dont le nombre </text:span><text:span text:style-name="T13">d’</text:span><text:span text:style-name="T17">actions élémentaires</text:span><text:span text:style-name="T13"> </text:span><text:span text:style-name="T28">effectuées</text:span><text:span text:style-name="T13"> par ce</text:span><text:span text:style-name="T28">t</text:span><text:span text:style-name="T13"> algorithme </text:span><text:span text:style-name="T30">évolue </text:span><text:span text:style-name="T15">en fonction de la taille des données traitées. </text:span><text:span text:style-name="T96">(On entend par action élémentaire : les affectations, comparaisons,…)</text:span></text:p>
      <text:p text:style-name="P17"/>
      <text:p text:style-name="P98"><text:span text:style-name="T1">Ex :</text:span> recherche d’un minimum <text:span text:style-name="T49">dans une liste</text:span></text:p>
      <text:p text:style-name="tfCodePython">def minimum(liste):</text:p>
      <text:p text:style-name="tfCodePython"><text:s text:c="4"/>min = liste[0]</text:p>
      <text:p text:style-name="tfCodePython"><text:s text:c="4"/>for item in liste:</text:p>
      <text:p text:style-name="tfCodePython"><text:s text:c="8"/>if <text:span text:style-name="T62">item &lt; min</text:span>:</text:p>
      <text:p text:style-name="tfCodePython"><text:s text:c="12"/>min = item</text:p>
      <text:p text:style-name="tfCodePython"><text:s text:c="4"/>return min</text:p>
      <text:p text:style-name="P17"/>
      <text:p text:style-name="P31"><text:span text:style-name="T50">Pour trouver le minimum, </text:span><text:span text:style-name="T61">l’action élémentaire répétée un grand nombre de fois est la comparaison </text:span><text:span text:style-name="code_20_python"><text:span text:style-name="T62">item &lt; min</text:span></text:span><text:span text:style-name="T61">.</text:span></text:p>
      <text:p text:style-name="P31"><text:span text:style-name="T61">L</text:span><text:span text:style-name="T50">a fonction a fait autant de comparaisons qu’il y a d’éléments dans la liste. On dit que cet algorithme a une complexité </text:span><text:span text:style-name="T3">linéaire</text:span><text:span text:style-name="T50"> : Si la liste est 10 fois plus grande, </text:span><text:span text:style-name="T96">l’algorithme</text:span><text:span text:style-name="T50"> mettra environ 10 fois plus de temps </text:span><text:span text:style-name="T60">à s’exécuter</text:span><text:span text:style-name="T50">.</text:span></text:p>
      <text:p text:style-name="Standard"/>
      <text:p text:style-name="Standard"/>
      <text:p text:style-name="P4">Vérification expérimentale :</text:p>
      <text:p text:style-name="P2"><text:span text:style-name="T29">En multipliant ci-dessous </text:span><text:span text:style-name="code_20_python"><text:span text:style-name="T62">taille_liste</text:span></text:span><text:span text:style-name="T29"> par 10,</text:span><text:span text:style-name="T30"> 100 ou 1000</text:span><text:span text:style-name="T29">, </text:span><text:span text:style-name="T30">comment évolue</text:span><text:span text:style-name="T29"> la durée d</text:span><text:span text:style-name="T50">u script</text:span><text:span text:style-name="T29"> ?</text:span></text:p>
      <text:p text:style-name="P116">import random, time</text:p>
      <text:p text:style-name="P116"/>
      <text:p text:style-name="P115"><text:span text:style-name="T62">taille_liste</text:span> = 10**5</text:p>
      <text:p text:style-name="P3">liste = [random.randint(0,100) for i in range(<text:span text:style-name="T63">taille_liste</text:span>)]</text:p>
      <text:p text:style-name="P3"/>
      <text:p text:style-name="P3">d<text:span text:style-name="T51">ébut</text:span> = time.time()</text:p>
      <text:p text:style-name="P3">a = minimum(liste)</text:p>
      <text:p text:style-name="P3"><text:span text:style-name="T23">fin</text:span> = time.time()</text:p>
      <text:p text:style-name="P3"/>
      <text:p text:style-name="P3">print(f"n = {taille_liste}, <text:s/>durée = {<text:span text:style-name="T23">fin - début</text:span>} secondes")</text:p>
      <text:p text:style-name="P1"/>
      <text:p text:style-name="P1"/>
      <text:p text:style-name="P4">Remarques :</text:p>
      <text:list xml:id="list1898137384" text:style-name="tfPuce">
        <text:list-item>
          <text:p text:style-name="P166"><text:span text:style-name="T15">On</text:span><text:span text:style-name="T14"> </text:span><text:span text:style-name="T15">distingue parfois la</text:span><text:span text:style-name="T14"> complexité « en temps » et </text:span><text:span text:style-name="T15">la</text:span><text:span text:style-name="T14"> complexité « en mémoire ». Nous </text:span><text:span text:style-name="T31">ne </text:span><text:span text:style-name="T48">considérerons </text:span><text:span text:style-name="T117">cette année </text:span><text:span text:style-name="T48">que la </text:span><text:span text:style-name="T173">complexité en temps</text:span><text:span text:style-name="T14">.</text:span></text:p>
        </text:list-item>
        <text:list-item>
          <text:p text:style-name="P166"><text:span text:style-name="T30">Quand on cherche à déterminer la complexité d’un algorithme, on ne cherche pas à compter précisément le nombre </text:span>d’actions élémentaires e<text:span text:style-name="T28">ffectuées : </text:span><text:span text:style-name="T30">un simple ordre de grandeur suffit.</text:span></text:p>
        </text:list-item>
        <text:list-item>
          <text:p text:style-name="P166"><text:span text:style-name="T52">La</text:span> complexité <text:span text:style-name="T52">d’un algorithme peut être </text:span><text:span text:style-name="T117">notamment</text:span> :<text:line-break/>- constante (ne dépend pas de <text:span text:style-name="T53">la taille</text:span> <text:span text:style-name="T16">n</text:span> <text:span text:style-name="T53">des données traitées)</text:span><text:line-break/>- linéaire (proportionnelle à <text:span text:style-name="T16">n</text:span>, par exemple <text:span text:style-name="T60">lors d’une </text:span>boucle simple)<text:line-break/>- quadratique (proportionnelle à <text:span text:style-name="T16">n</text:span>², par ex<text:span text:style-name="T52">emple</text:span> <text:span text:style-name="T60">s’il y a </text:span>2 boucles imbriquées)</text:p>
        </text:list-item>
        <text:list-item>
          <text:p text:style-name="P166"><text:span text:style-name="T20">Une vidéo remarquable sur la question : </text:span><text:a xlink:type="simple" xlink:href="https://www.youtube.com/watch?v=AgtOCNCejQ8" text:style-name="Internet_20_link" text:visited-style-name="Visited_20_Internet_20_Link">https://www.youtube.com/watch?v=AgtOCNCejQ8</text:a> </text:p>
        </text:list-item>
      </text:list>
      <text:p text:style-name="P1"/>
      <text:list xml:id="list1907123816116" text:continue-list="list592822640" text:style-name="tfNum_20_I_29_">
        <text:list-item>
          <text:p text:style-name="P190">Recherche d’une valeur dans une liste</text:p>
        </text:list-item>
      </text:list>
      <text:list text:style-name="tfNum_20_1_29_">
        <text:list-item>
          <text:p text:style-name="tfTitre_20_1_29_">Cas d’<text:span text:style-name="T38">une</text:span> liste non triée : <text:span text:style-name="T39">Recherche par « balayage »</text:span></text:p>
        </text:list-item>
      </text:list>
      <text:p text:style-name="P183"><text:span text:style-name="T11">On veut </text:span><text:span text:style-name="T19">écrire </text:span><text:span text:style-name="T11">un</text:span><text:span text:style-name="T38">e fonction </text:span><text:span text:style-name="code_20_python">recherche_balayage</text:span><text:span text:style-name="T11"> </text:span><text:span text:style-name="T15">déterminant si</text:span><text:span text:style-name="T11"> une valeur </text:span><text:span text:style-name="T15">est </text:span><text:span text:style-name="T11">dans une liste </text:span><text:span text:style-name="T64">ou non</text:span><text:span text:style-name="T11">.</text:span></text:p>
      <text:p text:style-name="P183"><text:span text:style-name="T21">Bien sûr, nous nous interdisons d’utiliser l’</text:span><text:span text:style-name="T180">expression</text:span><text:span text:style-name="T21"> « </text:span><text:span text:style-name="T192">valeur</text:span><text:span text:style-name="T193"> </text:span><text:span text:style-name="code_20_python"><text:span text:style-name="T191">in </text:span></text:span><text:span text:style-name="code_20_python"><text:span text:style-name="T192">liste </text:span></text:span><text:span text:style-name="code_20_python"><text:span text:style-name="T32">»</text:span></text:span><text:span text:style-name="T21"> qui ferait le travail à notre place ;-)</text:span></text:p>
      <text:p text:style-name="Standard"/>
      <text:p text:style-name="tfTitre_20_non_20_numéroté">Principe :</text:p>
      <text:p text:style-name="P15"><text:span text:style-name="T37">Cette fonction va balayer la liste de gauche à droite à la recherche de la valeur demandée et s’arrêter dès que cette dernière est trouvée. </text:span><text:span text:style-name="T46">A</text:span><text:span text:style-name="T37"> la fin du balayage, </text:span><text:span text:style-name="T46">si </text:span><text:span text:style-name="T37">la valeur demandée n’a pas été trouvée, alors cette valeur n’est pas dans la liste.</text:span></text:p>
      <text:p text:style-name="P5"/>
      <text:p text:style-name="tfTitre_20_non_20_numéroté"><text:span text:style-name="T37">Cod</text:span><text:span text:style-name="T53">e </text:span><text:span text:style-name="T35">(à co</text:span><text:span text:style-name="T36">mpléter</text:span><text:span text:style-name="T35">)</text:span><text:span text:style-name="T12"> :</text:span></text:p>
      <text:p text:style-name="P37">def <text:span text:style-name="T30">re</text:span>cherche_<text:span text:style-name="T37">balayage</text:span>(valeur, liste):</text:p>
      <text:p text:style-name="P41"><text:s text:c="4"/>for <draw:control text:anchor-type="as-char" draw:z-index="9" draw:name="Contrôle 1" draw:style-name="gr1" draw:text-style-name="P199" svg:width="5.901cm" svg:height="0.701cm" draw:control="control1"/></text:p>
      <text:p text:style-name="P37"><text:s text:c="8"/>if valeur == item:</text:p>
      <text:p text:style-name="P41"><text:s text:c="12"/>return <draw:control text:anchor-type="as-char" draw:z-index="10" draw:name="Contrôle 2" draw:style-name="gr1" draw:text-style-name="P199" svg:width="2.26cm" svg:height="0.701cm" draw:control="control2"/></text:p>
      <text:p text:style-name="P41"><text:s text:c="4"/>return <draw:control text:anchor-type="as-char" draw:z-index="15" draw:name="Contrôle 3" draw:style-name="gr1" draw:text-style-name="P199" svg:width="2.26cm" svg:height="0.701cm" draw:control="control7"/></text:p>
      <text:p text:style-name="tfCodePython"/>
      <text:p text:style-name="tfCodePython">liste = [3, 9, 5, 17, 12, 0, -4]</text:p>
      <text:p text:style-name="P16">assert <text:span text:style-name="T30">re</text:span>cherche_<text:span text:style-name="T37">balayage</text:span>(9, liste)</text:p>
      <text:p text:style-name="P16">assert <text:span text:style-name="T30">re</text:span>cherche_<text:span text:style-name="T37">balayage</text:span>(-4, liste)</text:p>
      <text:p text:style-name="P16">assert not <text:span text:style-name="T30">re</text:span>cherche_<text:span text:style-name="T37">balayage</text:span>(10, liste)</text:p>
      <text:p text:style-name="Standard"/>
      <text:p text:style-name="tfTitre_20_non_20_numéroté">Complexité :</text:p>
      <text:p text:style-name="P152">Quelle est la complexité de cet algorithme « <text:span text:style-name="T64">dans le pire des cas »</text:span> ? <text:s/><draw:control text:anchor-type="as-char" draw:z-index="11" draw:name="Contrôle 4" draw:style-name="gr1" draw:text-style-name="P201" svg:width="3.211cm" svg:height="0.701cm" draw:control="control3"/></text:p>
      <text:p text:style-name="Standard"/>
      <text:list xml:id="list1905870345442" text:continue-numbering="true" text:style-name="tfNum_20_1_29_">
        <text:list-item>
          <text:p text:style-name="P184">Cas d’<text:span text:style-name="T38">une</text:span> liste triée : <text:span text:style-name="T39">Recherche par dichotomie</text:span></text:p>
        </text:list-item>
      </text:list>
      <text:p text:style-name="P18">Si la liste est triée, on peut résoudre le même problème de façon plus astucieuse.</text:p>
      <text:p text:style-name="P7"/>
      <text:p text:style-name="P7"><text:span text:style-name="T43">Exemple : </text:span><text:span text:style-name="T42">Le nombre 15 appartient-il </text:span><text:span text:style-name="T41">à la liste</text:span><text:span text:style-name="T42"> trié</text:span><text:span text:style-name="T41">e</text:span><text:span text:style-name="T42"> ci-dessous ?</text:span></text:p>
      <table:table table:name="Tableau3" table:style-name="Tableau3">
        <table:table-column table:style-name="Tableau3.A"/>
        <table:table-column table:style-name="Tableau3.B"/>
        <table:table-column table:style-name="Tableau3.A" table:number-columns-repeated="2"/>
        <table:table-column table:style-name="Tableau3.B"/>
        <table:table-column table:style-name="Tableau3.F"/>
        <table:table-column table:style-name="Tableau3.A"/>
        <table:table-column table:style-name="Tableau3.B"/>
        <table:table-column table:style-name="Tableau3.F"/>
        <table:table-column table:style-name="Tableau3.A"/>
        <table:table-column table:style-name="Tableau3.B"/>
        <table:table-column table:style-name="Tableau3.L"/>
        <table:table-row>
          <table:table-cell table:style-name="Tableau3.A1" office:value-type="string">
            <text:p text:style-name="P12">item</text:p>
          </table:table-cell>
          <table:table-cell table:style-name="Tableau3.A1" office:value-type="string">
            <text:p text:style-name="P12">2</text:p>
          </table:table-cell>
          <table:table-cell table:style-name="Tableau3.A1" office:value-type="string">
            <text:p text:style-name="P12">3</text:p>
          </table:table-cell>
          <table:table-cell table:style-name="Tableau3.A1" office:value-type="string">
            <text:p text:style-name="P12">5</text:p>
          </table:table-cell>
          <table:table-cell table:style-name="Tableau3.A1" office:value-type="string">
            <text:p text:style-name="P12">5</text:p>
          </table:table-cell>
          <table:table-cell table:style-name="Tableau3.A1" office:value-type="string">
            <text:p text:style-name="P12">9</text:p>
          </table:table-cell>
          <table:table-cell table:style-name="Tableau3.A1" office:value-type="string">
            <text:p text:style-name="P12">11</text:p>
          </table:table-cell>
          <table:table-cell table:style-name="Tableau3.A1" office:value-type="string">
            <text:p text:style-name="P12">13</text:p>
          </table:table-cell>
          <table:table-cell table:style-name="Tableau3.A1" office:value-type="string">
            <text:p text:style-name="P12">14</text:p>
          </table:table-cell>
          <table:table-cell table:style-name="Tableau3.A1" office:value-type="string">
            <text:p text:style-name="P12">17</text:p>
          </table:table-cell>
          <table:table-cell table:style-name="Tableau3.A1" office:value-type="string">
            <text:p text:style-name="P12">19</text:p>
          </table:table-cell>
          <table:table-cell table:style-name="Tableau3.L1" office:value-type="string">
            <text:p text:style-name="P12">20</text:p>
          </table:table-cell>
        </table:table-row>
        <table:table-row>
          <table:table-cell table:style-name="Tableau3.A2" office:value-type="string">
            <text:p text:style-name="P99">indice</text:p>
          </table:table-cell>
          <table:table-cell table:style-name="Tableau3.A2" office:value-type="string">
            <text:p text:style-name="P99">0</text:p>
          </table:table-cell>
          <table:table-cell table:style-name="Tableau3.A2" office:value-type="string">
            <text:p text:style-name="P99">1</text:p>
          </table:table-cell>
          <table:table-cell table:style-name="Tableau3.A2" office:value-type="string">
            <text:p text:style-name="P99">2</text:p>
          </table:table-cell>
          <table:table-cell table:style-name="Tableau3.A2" office:value-type="string">
            <text:p text:style-name="P99">3</text:p>
          </table:table-cell>
          <table:table-cell table:style-name="Tableau3.A2" office:value-type="string">
            <text:p text:style-name="P99">4</text:p>
          </table:table-cell>
          <table:table-cell table:style-name="Tableau3.A2" office:value-type="string">
            <text:p text:style-name="P99">5</text:p>
          </table:table-cell>
          <table:table-cell table:style-name="Tableau3.A2" office:value-type="string">
            <text:p text:style-name="P99">6</text:p>
          </table:table-cell>
          <table:table-cell table:style-name="Tableau3.A2" office:value-type="string">
            <text:p text:style-name="P99">7</text:p>
          </table:table-cell>
          <table:table-cell table:style-name="Tableau3.A2" office:value-type="string">
            <text:p text:style-name="P99">8</text:p>
          </table:table-cell>
          <table:table-cell table:style-name="Tableau3.A2" office:value-type="string">
            <text:p text:style-name="P99">9</text:p>
          </table:table-cell>
          <table:table-cell table:style-name="Tableau3.L2" office:value-type="string">
            <text:p text:style-name="P99">10</text:p>
          </table:table-cell>
        </table:table-row>
      </table:table>
      <text:p text:style-name="P7"/>
      <text:p text:style-name="P8">Principe :</text:p>
      <text:p text:style-name="P13"><text:span text:style-name="T44">On va </text:span><text:span text:style-name="T39">divis</text:span><text:span text:style-name="T44">er</text:span><text:span text:style-name="T39"> par deux la </text:span><text:span text:style-name="T44">plage de</text:span><text:span text:style-name="T39"> recherche à chaque étape </text:span><text:span text:style-name="T44">en comparant 15 avec le terme qui est au milieu de cette plage</text:span><text:span text:style-name="T39">.</text:span></text:p>
      <table:table table:name="Tableau8" table:style-name="Tableau8">
        <table:table-column table:style-name="Tableau8.A"/>
        <table:table-column table:style-name="Tableau8.B" table:number-columns-repeated="2"/>
        <table:table-column table:style-name="Tableau8.D"/>
        <table:table-column table:style-name="Tableau8.B"/>
        <table:table-column table:style-name="Tableau8.D"/>
        <table:table-row>
          <table:table-cell table:style-name="Tableau8.A1" table:number-rows-spanned="2" office:value-type="string">
            <text:p text:style-name="P29"/>
          </table:table-cell>
          <table:table-cell table:style-name="Tableau8.B1" table:number-columns-spanned="5" office:value-type="string">
            <text:p text:style-name="P107">Étapes</text:p>
          </table:table-cell>
          <table:covered-table-cell/>
          <table:covered-table-cell/>
          <table:covered-table-cell/>
          <table:covered-table-cell/>
        </table:table-row>
        <table:table-row>
          <table:covered-table-cell table:style-name="Tableau8.A1"/>
          <table:table-cell table:style-name="Tableau8.B2" office:value-type="string">
            <text:p text:style-name="P30">1</text:p>
          </table:table-cell>
          <table:table-cell table:style-name="Tableau8.B2" office:value-type="string">
            <text:p text:style-name="P30">2</text:p>
          </table:table-cell>
          <table:table-cell table:style-name="Tableau8.B2" office:value-type="string">
            <text:p text:style-name="P30">3</text:p>
          </table:table-cell>
          <table:table-cell table:style-name="Tableau8.B2" office:value-type="string">
            <text:p text:style-name="P30">4</text:p>
          </table:table-cell>
          <table:table-cell table:style-name="Tableau8.F2" office:value-type="string">
            <text:p text:style-name="P30">5</text:p>
          </table:table-cell>
        </table:table-row>
        <table:table-row>
          <table:table-cell table:style-name="Tableau8.B2" office:value-type="string">
            <text:p text:style-name="P23"><text:span text:style-name="T40">Indice </text:span><text:span text:style-name="T44">du </text:span><text:span text:style-name="T45">début </text:span><text:span text:style-name="T41">de </text:span><text:span text:style-name="T44">plage</text:span><text:span text:style-name="T41"> :</text:span><text:span text:style-name="T37"><text:tab/></text:span><text:span text:style-name="code_20_python">a =</text:span></text:p>
          </table:table-cell>
          <table:table-cell table:style-name="Tableau8.B2" office:value-type="string">
            <text:p text:style-name="P28">0</text:p>
          </table:table-cell>
          <table:table-cell table:style-name="Tableau8.B2" office:value-type="string">
            <text:p text:style-name="P153"><draw:control text:anchor-type="as-char" draw:z-index="12" draw:name="Contrôle 5" draw:style-name="gr1" draw:text-style-name="P201" svg:width="1.484cm" svg:height="0.6cm" draw:control="control4"/></text:p>
          </table:table-cell>
          <table:table-cell table:style-name="Tableau8.B2" office:value-type="string">
            <text:p text:style-name="P154"><draw:control text:anchor-type="as-char" draw:z-index="47" draw:name="Contrôle 9" draw:style-name="gr1" draw:text-style-name="P201" svg:width="1.484cm" svg:height="0.6cm" draw:control="control39"/></text:p>
          </table:table-cell>
          <table:table-cell table:style-name="Tableau8.B2" office:value-type="string">
            <text:p text:style-name="P155"><draw:control text:anchor-type="as-char" draw:z-index="51" draw:name="Contrôle 13" draw:style-name="gr1" draw:text-style-name="P201" svg:width="1.484cm" svg:height="0.6cm" draw:control="control43"/></text:p>
          </table:table-cell>
          <table:table-cell table:style-name="Tableau8.F2" office:value-type="string">
            <text:p text:style-name="P94"><draw:control text:anchor-type="as-char" draw:z-index="55" draw:name="Contrôle 17" draw:style-name="gr1" draw:text-style-name="P201" svg:width="1.484cm" svg:height="0.6cm" draw:control="control47"/></text:p>
          </table:table-cell>
        </table:table-row>
        <table:table-row>
          <table:table-cell table:style-name="Tableau8.B2" office:value-type="string">
            <text:p text:style-name="P11"><text:span text:style-name="T40">Indice </text:span><text:span text:style-name="T44">de </text:span>fin :<text:span text:style-name="T37"><text:tab/></text:span><text:span text:style-name="code_20_python">b =</text:span></text:p>
          </table:table-cell>
          <table:table-cell table:style-name="Tableau8.B2" office:value-type="string">
            <text:p text:style-name="P28">10</text:p>
          </table:table-cell>
          <table:table-cell table:style-name="Tableau8.B2" office:value-type="string">
            <text:p text:style-name="P154"><draw:control text:anchor-type="as-char" draw:z-index="44" draw:name="Contrôle 6" draw:style-name="gr1" draw:text-style-name="P201" svg:width="1.484cm" svg:height="0.6cm" draw:control="control36"/></text:p>
          </table:table-cell>
          <table:table-cell table:style-name="Tableau8.B2" office:value-type="string">
            <text:p text:style-name="P154"><draw:control text:anchor-type="as-char" draw:z-index="48" draw:name="Contrôle 10" draw:style-name="gr1" draw:text-style-name="P201" svg:width="1.484cm" svg:height="0.6cm" draw:control="control40"/></text:p>
          </table:table-cell>
          <table:table-cell table:style-name="Tableau8.B2" office:value-type="string">
            <text:p text:style-name="P155"><draw:control text:anchor-type="as-char" draw:z-index="52" draw:name="Contrôle 14" draw:style-name="gr1" draw:text-style-name="P201" svg:width="1.484cm" svg:height="0.6cm" draw:control="control44"/></text:p>
          </table:table-cell>
          <table:table-cell table:style-name="Tableau8.F2" office:value-type="string">
            <text:p text:style-name="P94"><draw:control text:anchor-type="as-char" draw:z-index="56" draw:name="Contrôle 18" draw:style-name="gr1" draw:text-style-name="P201" svg:width="1.484cm" svg:height="0.6cm" draw:control="control48"/></text:p>
          </table:table-cell>
        </table:table-row>
        <table:table-row>
          <table:table-cell table:style-name="Tableau8.B2" office:value-type="string">
            <text:p text:style-name="P11"><text:span text:style-name="T40">Indice </text:span><text:span text:style-name="T44">du </text:span>milieu :<text:span text:style-name="T37"><text:tab/></text:span><text:span text:style-name="code_20_python">i =</text:span></text:p>
          </table:table-cell>
          <table:table-cell table:style-name="Tableau8.B2" office:value-type="string">
            <text:p text:style-name="P28">5</text:p>
          </table:table-cell>
          <table:table-cell table:style-name="Tableau8.B2" office:value-type="string">
            <text:p text:style-name="P154"><draw:control text:anchor-type="as-char" draw:z-index="45" draw:name="Contrôle 7" draw:style-name="gr1" draw:text-style-name="P201" svg:width="1.484cm" svg:height="0.6cm" draw:control="control37"/></text:p>
          </table:table-cell>
          <table:table-cell table:style-name="Tableau8.B2" office:value-type="string">
            <text:p text:style-name="P154"><draw:control text:anchor-type="as-char" draw:z-index="49" draw:name="Contrôle 11" draw:style-name="gr1" draw:text-style-name="P201" svg:width="1.484cm" svg:height="0.6cm" draw:control="control41"/></text:p>
          </table:table-cell>
          <table:table-cell table:style-name="Tableau8.B2" office:value-type="string">
            <text:p text:style-name="P155"><draw:control text:anchor-type="as-char" draw:z-index="53" draw:name="Contrôle 15" draw:style-name="gr1" draw:text-style-name="P201" svg:width="1.484cm" svg:height="0.6cm" draw:control="control45"/></text:p>
          </table:table-cell>
          <table:table-cell table:style-name="Tableau8.F2" office:value-type="string">
            <text:p text:style-name="P94"><draw:control text:anchor-type="as-char" draw:z-index="57" draw:name="Contrôle 19" draw:style-name="gr1" draw:text-style-name="P201" svg:width="1.484cm" svg:height="0.6cm" draw:control="control49"/></text:p>
          </table:table-cell>
        </table:table-row>
        <table:table-row>
          <table:table-cell table:style-name="Tableau8.B2" office:value-type="string">
            <text:p text:style-name="P27">On compare 15 avec :</text:p>
          </table:table-cell>
          <table:table-cell table:style-name="Tableau8.B2" office:value-type="string">
            <text:p text:style-name="P28">11</text:p>
          </table:table-cell>
          <table:table-cell table:style-name="Tableau8.B2" office:value-type="string">
            <text:p text:style-name="P154"><draw:control text:anchor-type="as-char" draw:z-index="46" draw:name="Contrôle 8" draw:style-name="gr1" draw:text-style-name="P201" svg:width="1.484cm" svg:height="0.6cm" draw:control="control38"/></text:p>
          </table:table-cell>
          <table:table-cell table:style-name="Tableau8.B2" office:value-type="string">
            <text:p text:style-name="P154"><draw:control text:anchor-type="as-char" draw:z-index="50" draw:name="Contrôle 12" draw:style-name="gr1" draw:text-style-name="P201" svg:width="1.484cm" svg:height="0.6cm" draw:control="control42"/></text:p>
          </table:table-cell>
          <table:table-cell table:style-name="Tableau8.B2" office:value-type="string">
            <text:p text:style-name="P155"><draw:control text:anchor-type="as-char" draw:z-index="54" draw:name="Contrôle 16" draw:style-name="gr1" draw:text-style-name="P201" svg:width="1.484cm" svg:height="0.6cm" draw:control="control46"/></text:p>
          </table:table-cell>
          <table:table-cell table:style-name="Tableau8.F2" office:value-type="string">
            <text:p text:style-name="P94"><draw:control text:anchor-type="as-char" draw:z-index="58" draw:name="Contrôle 20" draw:style-name="gr1" draw:text-style-name="P201" svg:width="1.484cm" svg:height="0.6cm" draw:control="control50"/></text:p>
          </table:table-cell>
        </table:table-row>
      </table:table>
      <text:p text:style-name="P9"/>
      <text:p text:style-name="P6"/>
      <text:p text:style-name="P20"><text:span text:style-name="T37">Cod</text:span><text:span text:style-name="T53">e </text:span><text:span text:style-name="T35">(à co</text:span><text:span text:style-name="T36">mpléter</text:span><text:span text:style-name="T35">)</text:span><text:span text:style-name="T12"> :</text:span></text:p>
      <text:p text:style-name="P14">def <text:span text:style-name="T30">re</text:span>cherche_<text:span text:style-name="T22">dichotomie</text:span>(valeur, liste):</text:p>
      <text:p text:style-name="P41"><text:s text:c="4"/>a = <draw:control text:anchor-type="as-char" draw:z-index="13" draw:name="Contrôle 21" draw:style-name="gr1" draw:text-style-name="P199" svg:width="3.5cm" svg:height="0.701cm" draw:control="control5"/></text:p>
      <text:p text:style-name="P41"><text:s text:c="4"/>b = <draw:control text:anchor-type="as-char" draw:z-index="16" draw:name="Contrôle 22" draw:style-name="gr1" draw:text-style-name="P199" svg:width="3.5cm" svg:height="0.701cm" draw:control="control8"/></text:p>
      <text:p text:style-name="P38"><text:s text:c="4"/>while a &lt;= b:</text:p>
      <text:p text:style-name="P38"><text:s text:c="8"/><text:span text:style-name="T24">i</text:span> = (a+b)//2</text:p>
      <text:p text:style-name="P38"><text:s text:c="8"/>if valeur == liste[<text:span text:style-name="T24">i</text:span>]:</text:p>
      <text:p text:style-name="P41"><text:s text:c="12"/><draw:control text:anchor-type="as-char" draw:z-index="14" draw:name="Contrôle 23" draw:style-name="gr1" draw:text-style-name="P199" svg:width="5.901cm" svg:height="0.701cm" draw:control="control6"/></text:p>
      <text:p text:style-name="P38"><text:s text:c="8"/>elif valeur &gt; liste[<text:span text:style-name="T24">i</text:span>]:</text:p>
      <text:p text:style-name="P41"><text:s text:c="12"/><draw:control text:anchor-type="as-char" draw:z-index="17" draw:name="Contrôle 24" draw:style-name="gr1" draw:text-style-name="P199" svg:width="5.901cm" svg:height="0.701cm" draw:control="control9"/></text:p>
      <text:p text:style-name="P38"><text:s text:c="8"/>else:</text:p>
      <text:p text:style-name="P41"><text:s text:c="12"/><draw:control text:anchor-type="as-char" draw:z-index="18" draw:name="Contrôle 25" draw:style-name="gr1" draw:text-style-name="P199" svg:width="5.901cm" svg:height="0.701cm" draw:control="control10"/></text:p>
      <text:p text:style-name="P14"><text:s text:c="4"/>return False</text:p>
      <text:p text:style-name="P14"/>
      <text:p text:style-name="P14">liste = [2,3,5,5,9,11,13,14,17,19,20]</text:p>
      <text:p text:style-name="P14">assert <text:span text:style-name="T44">not </text:span><text:span text:style-name="T30">re</text:span>cherche_<text:span text:style-name="T22">dichotomie</text:span>(<text:span text:style-name="T22">15</text:span>, liste)</text:p>
      <text:p text:style-name="P14">assert <text:span text:style-name="T30">re</text:span>cherche_<text:span text:style-name="T22">dichotomie</text:span>(<text:span text:style-name="T22">11</text:span>, liste)</text:p>
      <text:p text:style-name="P14">assert <text:span text:style-name="T30">re</text:span>cherche_<text:span text:style-name="T22">dichotomie</text:span>(<text:span text:style-name="T22">20</text:span>, liste)</text:p>
      <text:p text:style-name="P10"/>
      <text:p text:style-name="P21"/>
      <text:p text:style-name="P22">Complexité :</text:p>
      <text:p text:style-name="P19"><text:span text:style-name="T54">L</text:span><text:span text:style-name="T53">a complexité de cet algorithme </text:span><text:span text:style-name="T54">est meilleure que celle de l’algorithme par balayage. </text:span><text:span text:style-name="T64">En effet, m</text:span><text:span text:style-name="T55">ême s’</text:span><text:span text:style-name="T54">il y a plus d’actions élémentaires par passage dans la boucle, il y a beaucoup </text:span><text:span text:style-name="T117">beaucoup </text:span><text:span text:style-name="T54">moins de passages dans la boucle !</text:span></text:p>
      <text:p text:style-name="P19"/>
      <text:p text:style-name="P32"><text:span text:style-name="T56">Observ</text:span><text:span text:style-name="T64">ons</text:span><text:span text:style-name="T56"> le tableau ci-dessous :</text:span></text:p>
      <text:p text:style-name="P71">D’une colonne à la suivante, on a multiplié par 10 la taille de la liste de départ. </text:p>
      <text:p text:style-name="P32"><text:span text:style-name="T57">D’une ligne à la suivante, on </text:span><text:span text:style-name="T59">a </text:span><text:span text:style-name="T57">divis</text:span><text:span text:style-name="T59">é</text:span><text:span text:style-name="T57"> par deux la taille de la liste comme le fait la dichotomi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office:value-type="string">
            <text:p text:style-name="P25">100</text:p>
          </table:table-cell>
          <table:table-cell table:style-name="Tableau1.A1" office:value-type="string">
            <text:p text:style-name="P25">1000</text:p>
          </table:table-cell>
          <table:table-cell table:style-name="Tableau1.A1" office:value-type="string">
            <text:p text:style-name="P25">10000</text:p>
          </table:table-cell>
          <table:table-cell table:style-name="Tableau1.A1" office:value-type="string">
            <text:p text:style-name="P25">100000</text:p>
          </table:table-cell>
          <table:table-cell table:style-name="Tableau1.A1" office:value-type="string">
            <text:p text:style-name="P25">1000000</text:p>
          </table:table-cell>
          <table:table-cell table:style-name="Tableau1.A1" office:value-type="string">
            <text:p text:style-name="P25">10000000</text:p>
          </table:table-cell>
          <table:table-cell table:style-name="Tableau1.A1" office:value-type="string">
            <text:p text:style-name="P25">100000000</text:p>
          </table:table-cell>
          <table:table-cell table:style-name="Tableau1.A1" office:value-type="string">
            <text:p text:style-name="P25">1000000000</text:p>
          </table:table-cell>
          <table:table-cell table:style-name="Tableau1.A1" office:value-type="string">
            <text:p text:style-name="P25">10000000000</text:p>
          </table:table-cell>
          <table:table-cell table:style-name="Tableau1.J1" office:value-type="string">
            <text:p text:style-name="P25">100000000000</text:p>
          </table:table-cell>
        </table:table-row>
        <table:table-row table:style-name="Tableau1.1">
          <table:table-cell table:style-name="Tableau1.A2" office:value-type="string">
            <text:p text:style-name="P25">50</text:p>
          </table:table-cell>
          <table:table-cell table:style-name="Tableau1.A2" office:value-type="string">
            <text:p text:style-name="P25">500</text:p>
          </table:table-cell>
          <table:table-cell table:style-name="Tableau1.A2" office:value-type="string">
            <text:p text:style-name="P25">5000</text:p>
          </table:table-cell>
          <table:table-cell table:style-name="Tableau1.A2" office:value-type="string">
            <text:p text:style-name="P25">50000</text:p>
          </table:table-cell>
          <table:table-cell table:style-name="Tableau1.A2" office:value-type="string">
            <text:p text:style-name="P25">500000</text:p>
          </table:table-cell>
          <table:table-cell table:style-name="Tableau1.A2" office:value-type="string">
            <text:p text:style-name="P25">5000000</text:p>
          </table:table-cell>
          <table:table-cell table:style-name="Tableau1.A2" office:value-type="string">
            <text:p text:style-name="P25">50000000</text:p>
          </table:table-cell>
          <table:table-cell table:style-name="Tableau1.A2" office:value-type="string">
            <text:p text:style-name="P25">500000000</text:p>
          </table:table-cell>
          <table:table-cell table:style-name="Tableau1.A2" office:value-type="string">
            <text:p text:style-name="P25">5000000000</text:p>
          </table:table-cell>
          <table:table-cell table:style-name="Tableau1.J2" office:value-type="string">
            <text:p text:style-name="P25">50000000000</text:p>
          </table:table-cell>
        </table:table-row>
        <table:table-row table:style-name="Tableau1.1">
          <table:table-cell table:style-name="Tableau1.A2" office:value-type="string">
            <text:p text:style-name="P25">25</text:p>
          </table:table-cell>
          <table:table-cell table:style-name="Tableau1.A2" office:value-type="string">
            <text:p text:style-name="P25">250</text:p>
          </table:table-cell>
          <table:table-cell table:style-name="Tableau1.A2" office:value-type="string">
            <text:p text:style-name="P25">2500</text:p>
          </table:table-cell>
          <table:table-cell table:style-name="Tableau1.A2" office:value-type="string">
            <text:p text:style-name="P25">25000</text:p>
          </table:table-cell>
          <table:table-cell table:style-name="Tableau1.A2" office:value-type="string">
            <text:p text:style-name="P25">250000</text:p>
          </table:table-cell>
          <table:table-cell table:style-name="Tableau1.A2" office:value-type="string">
            <text:p text:style-name="P25">2500000</text:p>
          </table:table-cell>
          <table:table-cell table:style-name="Tableau1.A2" office:value-type="string">
            <text:p text:style-name="P25">25000000</text:p>
          </table:table-cell>
          <table:table-cell table:style-name="Tableau1.A2" office:value-type="string">
            <text:p text:style-name="P25">250000000</text:p>
          </table:table-cell>
          <table:table-cell table:style-name="Tableau1.A2" office:value-type="string">
            <text:p text:style-name="P25">2500000000</text:p>
          </table:table-cell>
          <table:table-cell table:style-name="Tableau1.J2" office:value-type="string">
            <text:p text:style-name="P25">25000000000</text:p>
          </table:table-cell>
        </table:table-row>
        <table:table-row table:style-name="Tableau1.1">
          <table:table-cell table:style-name="Tableau1.A2" office:value-type="string">
            <text:p text:style-name="P25">12</text:p>
          </table:table-cell>
          <table:table-cell table:style-name="Tableau1.A2" office:value-type="string">
            <text:p text:style-name="P25">125</text:p>
          </table:table-cell>
          <table:table-cell table:style-name="Tableau1.A2" office:value-type="string">
            <text:p text:style-name="P25">1250</text:p>
          </table:table-cell>
          <table:table-cell table:style-name="Tableau1.A2" office:value-type="string">
            <text:p text:style-name="P25">12500</text:p>
          </table:table-cell>
          <table:table-cell table:style-name="Tableau1.A2" office:value-type="string">
            <text:p text:style-name="P25">125000</text:p>
          </table:table-cell>
          <table:table-cell table:style-name="Tableau1.A2" office:value-type="string">
            <text:p text:style-name="P25">1250000</text:p>
          </table:table-cell>
          <table:table-cell table:style-name="Tableau1.A2" office:value-type="string">
            <text:p text:style-name="P25">12500000</text:p>
          </table:table-cell>
          <table:table-cell table:style-name="Tableau1.A2" office:value-type="string">
            <text:p text:style-name="P25">125000000</text:p>
          </table:table-cell>
          <table:table-cell table:style-name="Tableau1.A2" office:value-type="string">
            <text:p text:style-name="P25">1250000000</text:p>
          </table:table-cell>
          <table:table-cell table:style-name="Tableau1.J2" office:value-type="string">
            <text:p text:style-name="P25">12500000000</text:p>
          </table:table-cell>
        </table:table-row>
        <table:table-row table:style-name="Tableau1.1">
          <table:table-cell table:style-name="Tableau1.A2" office:value-type="string">
            <text:p text:style-name="P25">6</text:p>
          </table:table-cell>
          <table:table-cell table:style-name="Tableau1.A2" office:value-type="string">
            <text:p text:style-name="P25">62</text:p>
          </table:table-cell>
          <table:table-cell table:style-name="Tableau1.A2" office:value-type="string">
            <text:p text:style-name="P25">625</text:p>
          </table:table-cell>
          <table:table-cell table:style-name="Tableau1.A2" office:value-type="string">
            <text:p text:style-name="P25">6250</text:p>
          </table:table-cell>
          <table:table-cell table:style-name="Tableau1.A2" office:value-type="string">
            <text:p text:style-name="P25">62500</text:p>
          </table:table-cell>
          <table:table-cell table:style-name="Tableau1.A2" office:value-type="string">
            <text:p text:style-name="P25">625000</text:p>
          </table:table-cell>
          <table:table-cell table:style-name="Tableau1.A2" office:value-type="string">
            <text:p text:style-name="P25">6250000</text:p>
          </table:table-cell>
          <table:table-cell table:style-name="Tableau1.A2" office:value-type="string">
            <text:p text:style-name="P25">62500000</text:p>
          </table:table-cell>
          <table:table-cell table:style-name="Tableau1.A2" office:value-type="string">
            <text:p text:style-name="P25">625000000</text:p>
          </table:table-cell>
          <table:table-cell table:style-name="Tableau1.J2" office:value-type="string">
            <text:p text:style-name="P25">6250000000</text:p>
          </table:table-cell>
        </table:table-row>
        <table:table-row table:style-name="Tableau1.1">
          <table:table-cell table:style-name="Tableau1.A2" office:value-type="string">
            <text:p text:style-name="P25">3</text:p>
          </table:table-cell>
          <table:table-cell table:style-name="Tableau1.A2" office:value-type="string">
            <text:p text:style-name="P25">31</text:p>
          </table:table-cell>
          <table:table-cell table:style-name="Tableau1.A2" office:value-type="string">
            <text:p text:style-name="P25">312</text:p>
          </table:table-cell>
          <table:table-cell table:style-name="Tableau1.A2" office:value-type="string">
            <text:p text:style-name="P25">3125</text:p>
          </table:table-cell>
          <table:table-cell table:style-name="Tableau1.A2" office:value-type="string">
            <text:p text:style-name="P25">31250</text:p>
          </table:table-cell>
          <table:table-cell table:style-name="Tableau1.A2" office:value-type="string">
            <text:p text:style-name="P25">312500</text:p>
          </table:table-cell>
          <table:table-cell table:style-name="Tableau1.A2" office:value-type="string">
            <text:p text:style-name="P25">3125000</text:p>
          </table:table-cell>
          <table:table-cell table:style-name="Tableau1.A2" office:value-type="string">
            <text:p text:style-name="P25">31250000</text:p>
          </table:table-cell>
          <table:table-cell table:style-name="Tableau1.A2" office:value-type="string">
            <text:p text:style-name="P25">312500000</text:p>
          </table:table-cell>
          <table:table-cell table:style-name="Tableau1.J2" office:value-type="string">
            <text:p text:style-name="P25">3125000000</text:p>
          </table:table-cell>
        </table:table-row>
        <table:table-row table:style-name="Tableau1.1">
          <table:table-cell table:style-name="Tableau1.A2" office:value-type="string">
            <text:p text:style-name="P25">1</text:p>
          </table:table-cell>
          <table:table-cell table:style-name="Tableau1.A2" office:value-type="string">
            <text:p text:style-name="P25">15</text:p>
          </table:table-cell>
          <table:table-cell table:style-name="Tableau1.A2" office:value-type="string">
            <text:p text:style-name="P25">156</text:p>
          </table:table-cell>
          <table:table-cell table:style-name="Tableau1.A2" office:value-type="string">
            <text:p text:style-name="P25">1562</text:p>
          </table:table-cell>
          <table:table-cell table:style-name="Tableau1.A2" office:value-type="string">
            <text:p text:style-name="P25">15625</text:p>
          </table:table-cell>
          <table:table-cell table:style-name="Tableau1.A2" office:value-type="string">
            <text:p text:style-name="P25">156250</text:p>
          </table:table-cell>
          <table:table-cell table:style-name="Tableau1.A2" office:value-type="string">
            <text:p text:style-name="P25">1562500</text:p>
          </table:table-cell>
          <table:table-cell table:style-name="Tableau1.A2" office:value-type="string">
            <text:p text:style-name="P25">15625000</text:p>
          </table:table-cell>
          <table:table-cell table:style-name="Tableau1.A2" office:value-type="string">
            <text:p text:style-name="P25">156250000</text:p>
          </table:table-cell>
          <table:table-cell table:style-name="Tableau1.J2" office:value-type="string">
            <text:p text:style-name="P25">1562500000</text:p>
          </table:table-cell>
        </table:table-row>
        <table:table-row table:style-name="Tableau1.1">
          <table:table-cell table:style-name="Tableau1.A2" office:value-type="string">
            <text:p text:style-name="P25"/>
          </table:table-cell>
          <table:table-cell table:style-name="Tableau1.A2" office:value-type="string">
            <text:p text:style-name="P25">7</text:p>
          </table:table-cell>
          <table:table-cell table:style-name="Tableau1.A2" office:value-type="string">
            <text:p text:style-name="P25">78</text:p>
          </table:table-cell>
          <table:table-cell table:style-name="Tableau1.A2" office:value-type="string">
            <text:p text:style-name="P25">781</text:p>
          </table:table-cell>
          <table:table-cell table:style-name="Tableau1.A2" office:value-type="string">
            <text:p text:style-name="P25">7812</text:p>
          </table:table-cell>
          <table:table-cell table:style-name="Tableau1.A2" office:value-type="string">
            <text:p text:style-name="P25">78125</text:p>
          </table:table-cell>
          <table:table-cell table:style-name="Tableau1.A2" office:value-type="string">
            <text:p text:style-name="P25">781250</text:p>
          </table:table-cell>
          <table:table-cell table:style-name="Tableau1.A2" office:value-type="string">
            <text:p text:style-name="P25">7812500</text:p>
          </table:table-cell>
          <table:table-cell table:style-name="Tableau1.A2" office:value-type="string">
            <text:p text:style-name="P25">78125000</text:p>
          </table:table-cell>
          <table:table-cell table:style-name="Tableau1.J2" office:value-type="string">
            <text:p text:style-name="P25">781250000</text:p>
          </table:table-cell>
        </table:table-row>
        <table:table-row table:style-name="Tableau1.1">
          <table:table-cell table:style-name="Tableau1.A2" office:value-type="string">
            <text:p text:style-name="P25"/>
          </table:table-cell>
          <table:table-cell table:style-name="Tableau1.A2" office:value-type="string">
            <text:p text:style-name="P25">3</text:p>
          </table:table-cell>
          <table:table-cell table:style-name="Tableau1.A2" office:value-type="string">
            <text:p text:style-name="P25">39</text:p>
          </table:table-cell>
          <table:table-cell table:style-name="Tableau1.A2" office:value-type="string">
            <text:p text:style-name="P25">390</text:p>
          </table:table-cell>
          <table:table-cell table:style-name="Tableau1.A2" office:value-type="string">
            <text:p text:style-name="P25">3906</text:p>
          </table:table-cell>
          <table:table-cell table:style-name="Tableau1.A2" office:value-type="string">
            <text:p text:style-name="P25">39062</text:p>
          </table:table-cell>
          <table:table-cell table:style-name="Tableau1.A2" office:value-type="string">
            <text:p text:style-name="P25">390625</text:p>
          </table:table-cell>
          <table:table-cell table:style-name="Tableau1.A2" office:value-type="string">
            <text:p text:style-name="P25">3906250</text:p>
          </table:table-cell>
          <table:table-cell table:style-name="Tableau1.A2" office:value-type="string">
            <text:p text:style-name="P25">39062500</text:p>
          </table:table-cell>
          <table:table-cell table:style-name="Tableau1.J2" office:value-type="string">
            <text:p text:style-name="P25">390625000</text:p>
          </table:table-cell>
        </table:table-row>
        <table:table-row table:style-name="Tableau1.1">
          <table:table-cell table:style-name="Tableau1.A2" office:value-type="string">
            <text:p text:style-name="P25"/>
          </table:table-cell>
          <table:table-cell table:style-name="Tableau1.A2" office:value-type="string">
            <text:p text:style-name="P25">1</text:p>
          </table:table-cell>
          <table:table-cell table:style-name="Tableau1.A2" office:value-type="string">
            <text:p text:style-name="P25">19</text:p>
          </table:table-cell>
          <table:table-cell table:style-name="Tableau1.A2" office:value-type="string">
            <text:p text:style-name="P25">195</text:p>
          </table:table-cell>
          <table:table-cell table:style-name="Tableau1.A2" office:value-type="string">
            <text:p text:style-name="P25">1953</text:p>
          </table:table-cell>
          <table:table-cell table:style-name="Tableau1.A2" office:value-type="string">
            <text:p text:style-name="P25">19531</text:p>
          </table:table-cell>
          <table:table-cell table:style-name="Tableau1.A2" office:value-type="string">
            <text:p text:style-name="P25">195312</text:p>
          </table:table-cell>
          <table:table-cell table:style-name="Tableau1.A2" office:value-type="string">
            <text:p text:style-name="P25">1953125</text:p>
          </table:table-cell>
          <table:table-cell table:style-name="Tableau1.A2" office:value-type="string">
            <text:p text:style-name="P25">19531250</text:p>
          </table:table-cell>
          <table:table-cell table:style-name="Tableau1.J2" office:value-type="string">
            <text:p text:style-name="P25">195312500</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9</text:p>
          </table:table-cell>
          <table:table-cell table:style-name="Tableau1.A2" office:value-type="string">
            <text:p text:style-name="P25">97</text:p>
          </table:table-cell>
          <table:table-cell table:style-name="Tableau1.A2" office:value-type="string">
            <text:p text:style-name="P25">976</text:p>
          </table:table-cell>
          <table:table-cell table:style-name="Tableau1.A2" office:value-type="string">
            <text:p text:style-name="P25">9765</text:p>
          </table:table-cell>
          <table:table-cell table:style-name="Tableau1.A2" office:value-type="string">
            <text:p text:style-name="P25">97656</text:p>
          </table:table-cell>
          <table:table-cell table:style-name="Tableau1.A2" office:value-type="string">
            <text:p text:style-name="P25">976562</text:p>
          </table:table-cell>
          <table:table-cell table:style-name="Tableau1.A2" office:value-type="string">
            <text:p text:style-name="P25">9765625</text:p>
          </table:table-cell>
          <table:table-cell table:style-name="Tableau1.J2" office:value-type="string">
            <text:p text:style-name="P25">97656250</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4</text:p>
          </table:table-cell>
          <table:table-cell table:style-name="Tableau1.A2" office:value-type="string">
            <text:p text:style-name="P25">48</text:p>
          </table:table-cell>
          <table:table-cell table:style-name="Tableau1.A2" office:value-type="string">
            <text:p text:style-name="P25">488</text:p>
          </table:table-cell>
          <table:table-cell table:style-name="Tableau1.A2" office:value-type="string">
            <text:p text:style-name="P25">4882</text:p>
          </table:table-cell>
          <table:table-cell table:style-name="Tableau1.A2" office:value-type="string">
            <text:p text:style-name="P25">48828</text:p>
          </table:table-cell>
          <table:table-cell table:style-name="Tableau1.A2" office:value-type="string">
            <text:p text:style-name="P25">488281</text:p>
          </table:table-cell>
          <table:table-cell table:style-name="Tableau1.A2" office:value-type="string">
            <text:p text:style-name="P25">4882812</text:p>
          </table:table-cell>
          <table:table-cell table:style-name="Tableau1.J2" office:value-type="string">
            <text:p text:style-name="P25">48828125</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2</text:p>
          </table:table-cell>
          <table:table-cell table:style-name="Tableau1.A2" office:value-type="string">
            <text:p text:style-name="P25">24</text:p>
          </table:table-cell>
          <table:table-cell table:style-name="Tableau1.A2" office:value-type="string">
            <text:p text:style-name="P25">244</text:p>
          </table:table-cell>
          <table:table-cell table:style-name="Tableau1.A2" office:value-type="string">
            <text:p text:style-name="P25">2441</text:p>
          </table:table-cell>
          <table:table-cell table:style-name="Tableau1.A2" office:value-type="string">
            <text:p text:style-name="P25">24414</text:p>
          </table:table-cell>
          <table:table-cell table:style-name="Tableau1.A2" office:value-type="string">
            <text:p text:style-name="P25">244140</text:p>
          </table:table-cell>
          <table:table-cell table:style-name="Tableau1.A2" office:value-type="string">
            <text:p text:style-name="P25">2441406</text:p>
          </table:table-cell>
          <table:table-cell table:style-name="Tableau1.J2" office:value-type="string">
            <text:p text:style-name="P25">24414062</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1</text:p>
          </table:table-cell>
          <table:table-cell table:style-name="Tableau1.A2" office:value-type="string">
            <text:p text:style-name="P25">12</text:p>
          </table:table-cell>
          <table:table-cell table:style-name="Tableau1.A2" office:value-type="string">
            <text:p text:style-name="P25">122</text:p>
          </table:table-cell>
          <table:table-cell table:style-name="Tableau1.A2" office:value-type="string">
            <text:p text:style-name="P25">1220</text:p>
          </table:table-cell>
          <table:table-cell table:style-name="Tableau1.A2" office:value-type="string">
            <text:p text:style-name="P25">12207</text:p>
          </table:table-cell>
          <table:table-cell table:style-name="Tableau1.A2" office:value-type="string">
            <text:p text:style-name="P25">122070</text:p>
          </table:table-cell>
          <table:table-cell table:style-name="Tableau1.A2" office:value-type="string">
            <text:p text:style-name="P25">1220703</text:p>
          </table:table-cell>
          <table:table-cell table:style-name="Tableau1.J2" office:value-type="string">
            <text:p text:style-name="P25">12207031</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6</text:p>
          </table:table-cell>
          <table:table-cell table:style-name="Tableau1.A2" office:value-type="string">
            <text:p text:style-name="P25">61</text:p>
          </table:table-cell>
          <table:table-cell table:style-name="Tableau1.A2" office:value-type="string">
            <text:p text:style-name="P25">610</text:p>
          </table:table-cell>
          <table:table-cell table:style-name="Tableau1.A2" office:value-type="string">
            <text:p text:style-name="P25">6103</text:p>
          </table:table-cell>
          <table:table-cell table:style-name="Tableau1.A2" office:value-type="string">
            <text:p text:style-name="P25">61035</text:p>
          </table:table-cell>
          <table:table-cell table:style-name="Tableau1.A2" office:value-type="string">
            <text:p text:style-name="P25">610351</text:p>
          </table:table-cell>
          <table:table-cell table:style-name="Tableau1.J2" office:value-type="string">
            <text:p text:style-name="P25">6103515</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3</text:p>
          </table:table-cell>
          <table:table-cell table:style-name="Tableau1.A2" office:value-type="string">
            <text:p text:style-name="P25">30</text:p>
          </table:table-cell>
          <table:table-cell table:style-name="Tableau1.A2" office:value-type="string">
            <text:p text:style-name="P25">305</text:p>
          </table:table-cell>
          <table:table-cell table:style-name="Tableau1.A2" office:value-type="string">
            <text:p text:style-name="P25">3051</text:p>
          </table:table-cell>
          <table:table-cell table:style-name="Tableau1.A2" office:value-type="string">
            <text:p text:style-name="P25">30517</text:p>
          </table:table-cell>
          <table:table-cell table:style-name="Tableau1.A2" office:value-type="string">
            <text:p text:style-name="P25">305175</text:p>
          </table:table-cell>
          <table:table-cell table:style-name="Tableau1.J2" office:value-type="string">
            <text:p text:style-name="P25">3051757</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1</text:p>
          </table:table-cell>
          <table:table-cell table:style-name="Tableau1.A2" office:value-type="string">
            <text:p text:style-name="P25">15</text:p>
          </table:table-cell>
          <table:table-cell table:style-name="Tableau1.A2" office:value-type="string">
            <text:p text:style-name="P25">152</text:p>
          </table:table-cell>
          <table:table-cell table:style-name="Tableau1.A2" office:value-type="string">
            <text:p text:style-name="P25">1525</text:p>
          </table:table-cell>
          <table:table-cell table:style-name="Tableau1.A2" office:value-type="string">
            <text:p text:style-name="P25">15258</text:p>
          </table:table-cell>
          <table:table-cell table:style-name="Tableau1.A2" office:value-type="string">
            <text:p text:style-name="P25">152587</text:p>
          </table:table-cell>
          <table:table-cell table:style-name="Tableau1.J2" office:value-type="string">
            <text:p text:style-name="P25">1525878</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7</text:p>
          </table:table-cell>
          <table:table-cell table:style-name="Tableau1.A2" office:value-type="string">
            <text:p text:style-name="P25">76</text:p>
          </table:table-cell>
          <table:table-cell table:style-name="Tableau1.A2" office:value-type="string">
            <text:p text:style-name="P25">762</text:p>
          </table:table-cell>
          <table:table-cell table:style-name="Tableau1.A2" office:value-type="string">
            <text:p text:style-name="P25">7629</text:p>
          </table:table-cell>
          <table:table-cell table:style-name="Tableau1.A2" office:value-type="string">
            <text:p text:style-name="P25">76293</text:p>
          </table:table-cell>
          <table:table-cell table:style-name="Tableau1.J2" office:value-type="string">
            <text:p text:style-name="P25">762939</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3</text:p>
          </table:table-cell>
          <table:table-cell table:style-name="Tableau1.A2" office:value-type="string">
            <text:p text:style-name="P25">38</text:p>
          </table:table-cell>
          <table:table-cell table:style-name="Tableau1.A2" office:value-type="string">
            <text:p text:style-name="P25">381</text:p>
          </table:table-cell>
          <table:table-cell table:style-name="Tableau1.A2" office:value-type="string">
            <text:p text:style-name="P25">3814</text:p>
          </table:table-cell>
          <table:table-cell table:style-name="Tableau1.A2" office:value-type="string">
            <text:p text:style-name="P25">38146</text:p>
          </table:table-cell>
          <table:table-cell table:style-name="Tableau1.J2" office:value-type="string">
            <text:p text:style-name="P25">381469</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1</text:p>
          </table:table-cell>
          <table:table-cell table:style-name="Tableau1.A2" office:value-type="string">
            <text:p text:style-name="P25">19</text:p>
          </table:table-cell>
          <table:table-cell table:style-name="Tableau1.A2" office:value-type="string">
            <text:p text:style-name="P25">190</text:p>
          </table:table-cell>
          <table:table-cell table:style-name="Tableau1.A2" office:value-type="string">
            <text:p text:style-name="P25">1907</text:p>
          </table:table-cell>
          <table:table-cell table:style-name="Tableau1.A2" office:value-type="string">
            <text:p text:style-name="P25">19073</text:p>
          </table:table-cell>
          <table:table-cell table:style-name="Tableau1.J2" office:value-type="string">
            <text:p text:style-name="P25">190734</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9</text:p>
          </table:table-cell>
          <table:table-cell table:style-name="Tableau1.A2" office:value-type="string">
            <text:p text:style-name="P25">95</text:p>
          </table:table-cell>
          <table:table-cell table:style-name="Tableau1.A2" office:value-type="string">
            <text:p text:style-name="P25">953</text:p>
          </table:table-cell>
          <table:table-cell table:style-name="Tableau1.A2" office:value-type="string">
            <text:p text:style-name="P25">9536</text:p>
          </table:table-cell>
          <table:table-cell table:style-name="Tableau1.J2" office:value-type="string">
            <text:p text:style-name="P25">95367</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4</text:p>
          </table:table-cell>
          <table:table-cell table:style-name="Tableau1.A2" office:value-type="string">
            <text:p text:style-name="P25">47</text:p>
          </table:table-cell>
          <table:table-cell table:style-name="Tableau1.A2" office:value-type="string">
            <text:p text:style-name="P25">476</text:p>
          </table:table-cell>
          <table:table-cell table:style-name="Tableau1.A2" office:value-type="string">
            <text:p text:style-name="P25">4768</text:p>
          </table:table-cell>
          <table:table-cell table:style-name="Tableau1.J2" office:value-type="string">
            <text:p text:style-name="P25">47683</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2</text:p>
          </table:table-cell>
          <table:table-cell table:style-name="Tableau1.A2" office:value-type="string">
            <text:p text:style-name="P25">23</text:p>
          </table:table-cell>
          <table:table-cell table:style-name="Tableau1.A2" office:value-type="string">
            <text:p text:style-name="P25">238</text:p>
          </table:table-cell>
          <table:table-cell table:style-name="Tableau1.A2" office:value-type="string">
            <text:p text:style-name="P25">2384</text:p>
          </table:table-cell>
          <table:table-cell table:style-name="Tableau1.J2" office:value-type="string">
            <text:p text:style-name="P25">23841</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1</text:p>
          </table:table-cell>
          <table:table-cell table:style-name="Tableau1.A2" office:value-type="string">
            <text:p text:style-name="P25">11</text:p>
          </table:table-cell>
          <table:table-cell table:style-name="Tableau1.A2" office:value-type="string">
            <text:p text:style-name="P25">119</text:p>
          </table:table-cell>
          <table:table-cell table:style-name="Tableau1.A2" office:value-type="string">
            <text:p text:style-name="P25">1192</text:p>
          </table:table-cell>
          <table:table-cell table:style-name="Tableau1.J2" office:value-type="string">
            <text:p text:style-name="P25">11920</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5</text:p>
          </table:table-cell>
          <table:table-cell table:style-name="Tableau1.A2" office:value-type="string">
            <text:p text:style-name="P25">59</text:p>
          </table:table-cell>
          <table:table-cell table:style-name="Tableau1.A2" office:value-type="string">
            <text:p text:style-name="P25">596</text:p>
          </table:table-cell>
          <table:table-cell table:style-name="Tableau1.J2" office:value-type="string">
            <text:p text:style-name="P25">5960</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2</text:p>
          </table:table-cell>
          <table:table-cell table:style-name="Tableau1.A2" office:value-type="string">
            <text:p text:style-name="P25">29</text:p>
          </table:table-cell>
          <table:table-cell table:style-name="Tableau1.A2" office:value-type="string">
            <text:p text:style-name="P25">298</text:p>
          </table:table-cell>
          <table:table-cell table:style-name="Tableau1.J2" office:value-type="string">
            <text:p text:style-name="P25">2980</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1</text:p>
          </table:table-cell>
          <table:table-cell table:style-name="Tableau1.A2" office:value-type="string">
            <text:p text:style-name="P25">14</text:p>
          </table:table-cell>
          <table:table-cell table:style-name="Tableau1.A2" office:value-type="string">
            <text:p text:style-name="P25">149</text:p>
          </table:table-cell>
          <table:table-cell table:style-name="Tableau1.J2" office:value-type="string">
            <text:p text:style-name="P25">1490</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7</text:p>
          </table:table-cell>
          <table:table-cell table:style-name="Tableau1.A2" office:value-type="string">
            <text:p text:style-name="P25">74</text:p>
          </table:table-cell>
          <table:table-cell table:style-name="Tableau1.J2" office:value-type="string">
            <text:p text:style-name="P25">745</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3</text:p>
          </table:table-cell>
          <table:table-cell table:style-name="Tableau1.A2" office:value-type="string">
            <text:p text:style-name="P25">37</text:p>
          </table:table-cell>
          <table:table-cell table:style-name="Tableau1.J2" office:value-type="string">
            <text:p text:style-name="P25">372</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1</text:p>
          </table:table-cell>
          <table:table-cell table:style-name="Tableau1.A2" office:value-type="string">
            <text:p text:style-name="P25">18</text:p>
          </table:table-cell>
          <table:table-cell table:style-name="Tableau1.J2" office:value-type="string">
            <text:p text:style-name="P25">186</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9</text:p>
          </table:table-cell>
          <table:table-cell table:style-name="Tableau1.J2" office:value-type="string">
            <text:p text:style-name="P25">93</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4</text:p>
          </table:table-cell>
          <table:table-cell table:style-name="Tableau1.J2" office:value-type="string">
            <text:p text:style-name="P25">46</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2</text:p>
          </table:table-cell>
          <table:table-cell table:style-name="Tableau1.J2" office:value-type="string">
            <text:p text:style-name="P25">23</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1</text:p>
          </table:table-cell>
          <table:table-cell table:style-name="Tableau1.J2" office:value-type="string">
            <text:p text:style-name="P25">11</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J2" office:value-type="string">
            <text:p text:style-name="P25">5</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J2" office:value-type="string">
            <text:p text:style-name="P25">2</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J2" office:value-type="string">
            <text:p text:style-name="P25">1</text:p>
          </table:table-cell>
        </table:table-row>
        <table:table-row table:style-name="Tableau1.1">
          <table:table-cell table:style-name="Tableau1.A1" office:value-type="string">
            <text:p text:style-name="P25">6</text:p>
          </table:table-cell>
          <table:table-cell table:style-name="Tableau1.A1" office:value-type="string">
            <text:p text:style-name="P24">9</text:p>
          </table:table-cell>
          <table:table-cell table:style-name="Tableau1.A1" office:value-type="string">
            <text:p text:style-name="P24">13</text:p>
          </table:table-cell>
          <table:table-cell table:style-name="Tableau1.A1" office:value-type="string">
            <text:p text:style-name="P24">16</text:p>
          </table:table-cell>
          <table:table-cell table:style-name="Tableau1.A1" office:value-type="string">
            <text:p text:style-name="P24">19</text:p>
          </table:table-cell>
          <table:table-cell table:style-name="Tableau1.F38" office:value-type="float" office:value="23">
            <text:p text:style-name="P106">23</text:p>
          </table:table-cell>
          <table:table-cell table:style-name="Tableau1.F38" office:value-type="float" office:value="26">
            <text:p text:style-name="P106">26</text:p>
          </table:table-cell>
          <table:table-cell table:style-name="Tableau1.F38" office:value-type="float" office:value="29">
            <text:p text:style-name="P106">29</text:p>
          </table:table-cell>
          <table:table-cell table:style-name="Tableau1.F38" office:value-type="float" office:value="33">
            <text:p text:style-name="P106">33</text:p>
          </table:table-cell>
          <table:table-cell table:style-name="Tableau1.J38" office:value-type="float" office:value="36">
            <text:p text:style-name="P106">36</text:p>
          </table:table-cell>
        </table:table-row>
      </table:table>
      <text:p text:style-name="P33"><text:span text:style-name="T58">En dernière ligne, on a précisé le nombre</text:span><text:span text:style-name="T57"> d’étapes qui ont été nécessaires </text:span><text:span text:style-name="T59">pour atteindre 1</text:span><text:span text:style-name="T57">.</text:span></text:p>
      <text:p text:style-name="P40"><text:span text:style-name="T64">On </text:span><text:span text:style-name="T57">remarque </text:span><text:span text:style-name="T64">que quand on multiplie par 10 la taille de la liste, </text:span><text:span text:style-name="T65">il faut </text:span><text:span text:style-name="T66"><draw:control text:anchor-type="as-char" draw:z-index="19" draw:name="Contrôle 26" draw:style-name="gr1" draw:text-style-name="P201" svg:width="3.691cm" svg:height="0.701cm" draw:control="control11"/></text:span><text:span text:style-name="T65"><text:s/>au</text:span><text:span text:style-name="T64"> nombre d’étapes.</text:span></text:p>
      <text:p text:style-name="P34"><text:span text:style-name="T65">Trouverez-vous</text:span><text:span text:style-name="T57"> sur internet le nom de la fonction mathématique </text:span><text:span text:style-name="T65">célèbre qui permet de faire ce genre de choses ?</text:span></text:p>
      <text:p text:style-name="P156">On retiendra que la complexité de la recherche par dichotomie est <text:span text:style-name="T66"><draw:control text:anchor-type="as-char" draw:z-index="20" draw:name="Contrôle 27" draw:style-name="gr1" draw:text-style-name="P201" svg:width="3.691cm" svg:height="0.701cm" draw:control="control12"/></text:span></text:p>
      <text:p text:style-name="P119">Terminaison :</text:p>
      <text:p text:style-name="P43"><text:span text:style-name="T67">Dans cet algorithme, nous avons utilisé une boucle </text:span><text:span text:style-name="code_20_python">while</text:span><text:span text:style-name="T67">. Or il y a toujours un risque que ce genre de boucle soit infinie ! </text:span><text:span text:style-name="T68">On appelle </text:span><text:span text:style-name="T4">prouver la terminaison</text:span><text:span text:style-name="T68"> d’</text:span><text:span text:style-name="T69">un </text:span><text:span text:style-name="T68">algorithme le fait de prouver que l’exécution de l’algorithme va s’arrêter </text:span><text:span text:style-name="T72">quelles que soient les entrées</text:span><text:span text:style-name="T68">.</text:span></text:p>
      <text:p text:style-name="P43"/>
      <text:p text:style-name="P43"><text:span text:style-name="T72">Pour cela, nous allons</text:span> <text:span text:style-name="T72">montrer que </text:span><text:span text:style-name="code_20_python">b – a</text:span><text:span text:style-name="T72"> est un </text:span><text:span text:style-name="T1">variant de boucle</text:span>, c'est-à-dire un entier <text:span text:style-name="T82">positif</text:span> qui décroît <text:span text:style-name="T73">strictement</text:span> à chaque itération.</text:p>
      <text:p text:style-name="P44"/>
      <text:p text:style-name="Standard"><text:span text:style-name="T68">Ici l’algorithme s’arrête quand </text:span><text:span text:style-name="T82">le variant de boucle</text:span><text:span text:style-name="T68"> </text:span><text:span text:style-name="code_20_python">b – a</text:span> devient strictement négatif.</text:p>
      <text:p text:style-name="P45"><text:span text:style-name="T70">A chaque itération, on entre dans la boucle </text:span><text:span text:style-name="T72">uniquement </text:span><text:span text:style-name="T70">si </text:span><text:span text:style-name="code_20_python">a </text:span><text:span text:style-name="code_20_python"><text:span text:style-name="T80">≤</text:span></text:span><text:span text:style-name="code_20_python"> b</text:span>, </text:p>
      <text:p text:style-name="P46"><text:span text:style-name="T70">puis, après modification de i, on obtient : </text:span><text:span text:style-name="code_20_python">a </text:span><text:span text:style-name="code_20_python"><text:span text:style-name="T80">≤</text:span></text:span><text:span text:style-name="code_20_python"> i </text:span><text:span text:style-name="code_20_python"><text:span text:style-name="T80">≤</text:span></text:span><text:span text:style-name="code_20_python"> b</text:span><text:span text:style-name="T70">.</text:span></text:p>
      <text:p text:style-name="P72">En fin de boucle :</text:p>
      <text:list xml:id="list1905859808218" text:continue-list="list1898137384" text:style-name="tfPuce">
        <text:list-item>
          <text:p text:style-name="P167"><text:span text:style-name="T71">soit </text:span><text:span text:style-name="code_20_python">a = i + 1</text:span><text:span text:style-name="T71">. <text:line-break/></text:span><text:span text:style-name="T82">Donc </text:span><text:span text:style-name="code_20_python">a</text:span><text:span text:style-name="T82"> est incrémenté d’au moins 1 et le variant de boucle est décrémenté d’au moins 1</text:span></text:p>
        </text:list-item>
        <text:list-item>
          <text:p text:style-name="P167"><text:span text:style-name="T71">soit </text:span><text:span text:style-name="code_20_python">b = i – 1</text:span><text:span text:style-name="T71">.<text:line-break/></text:span><text:span text:style-name="T82">Donc </text:span><text:span text:style-name="code_20_python"><text:span text:style-name="T81">b</text:span></text:span><text:span text:style-name="T82"> est décrémenté d’au moins 1 et le variant de boucle est aussi décrémenté d’au moins 1</text:span></text:p>
        </text:list-item>
      </text:list>
      <text:p text:style-name="P47">Bilan, à chaque itération le variant de boucle décroît d’au moins 1. Il finira donc bien par devenir négatif.</text:p>
      <text:p text:style-name="P26"/>
      <text:list xml:id="list1906615380083" text:continue-list="list1907123816116" text:style-name="tfNum_20_I_29_">
        <text:list-item>
          <text:p text:style-name="P192"><text:span text:style-name="T104">Algorithmes de </text:span>Tri</text:p>
        </text:list-item>
      </text:list>
      <text:list text:continue-list="list1905870345442" text:style-name="tfNum_20_1_29_">
        <text:list-item text:start-value="1">
          <text:p text:style-name="P185">Tri par sélection</text:p>
        </text:list-item>
      </text:list>
      <text:p text:style-name="P59">Principe :</text:p>
      <text:p text:style-name="P57"><text:span text:style-name="T83">A chaque étape d’</text:span><text:span text:style-name="T118">un</text:span><text:span text:style-name="T83"> </text:span><text:span text:style-name="T5">tri </text:span><text:span text:style-name="T6">par sélection</text:span><text:span text:style-name="T83">, la partie gauche de la liste </text:span><text:span text:style-name="T89">est</text:span><text:span text:style-name="T83"> déjà trié</text:span><text:span text:style-name="T89">e</text:span><text:span text:style-name="T83">. </text:span><text:span text:style-name="T89">On parcourt alors la partie droite à la recherche du minimum</text:span><text:span text:style-name="T83"> </text:span><text:span text:style-name="T91">que l’</text:span><text:span text:style-name="T83">on </text:span><text:span text:style-name="T90">échange avec le premier terme de </text:span><text:span text:style-name="T91">cette</text:span><text:span text:style-name="T90"> partie </text:span><text:span text:style-name="T91">droite</text:span><text:span text:style-name="T90">.</text:span></text:p>
      <text:p text:style-name="P57"/>
      <text:p text:style-name="P57"><text:span text:style-name="T84">Exemple </text:span><text:span text:style-name="T86">d’étape de tri</text:span><text:span text:style-name="T84"> :</text:span></text:p>
      <table:table table:name="Tableau4" table:style-name="Tableau4">
        <table:table-column table:style-name="Tableau4.A"/>
        <table:table-column table:style-name="Tableau4.B"/>
        <table:table-column table:style-name="Tableau4.C"/>
        <table:table-column table:style-name="Tableau4.D"/>
        <table:table-column table:style-name="Tableau4.A"/>
        <table:table-column table:style-name="Tableau4.F"/>
        <table:table-column table:style-name="Tableau4.G"/>
        <table:table-row>
          <table:table-cell table:style-name="Tableau4.A1" table:number-columns-spanned="3" office:value-type="string">
            <text:p text:style-name="P89"><text:span text:style-name="T84">partie </text:span><text:span text:style-name="T88">déjà </text:span><text:span text:style-name="T84">triée</text:span></text:p>
            <text:p text:style-name="P52"><draw:custom-shape text:anchor-type="as-char" draw:z-index="2" draw:name="Forme1_1" draw:style-name="gr30" draw:text-style-name="P214" svg:width="0.378cm" svg:height="7.958cm" draw:transform="rotate (-1.5707963267949) translate (7.95690277777778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cell table:style-name="Tableau4.A1" table:number-columns-spanned="4" office:value-type="string">
            <text:p text:style-name="P89"><text:span text:style-name="T84">partie à </text:span><text:span text:style-name="T88">trier</text:span></text:p>
            <text:p text:style-name="P52"><draw:custom-shape text:anchor-type="as-char" draw:z-index="3" draw:name="Forme1_2" draw:style-name="gr29" draw:text-style-name="P214" svg:width="0.378cm" svg:height="10.732cm" draw:transform="rotate (-1.5707963267949) translate (10.7315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row>
        <table:table-row>
          <table:table-cell table:style-name="Tableau4.A2" office:value-type="string">
            <text:p text:style-name="P109">2</text:p>
          </table:table-cell>
          <table:table-cell table:style-name="Tableau4.A2" office:value-type="string">
            <text:p text:style-name="P109">7</text:p>
          </table:table-cell>
          <table:table-cell table:style-name="Tableau4.A2" office:value-type="string">
            <text:p text:style-name="P109">9</text:p>
          </table:table-cell>
          <table:table-cell table:style-name="Tableau4.A2" office:value-type="string">
            <text:p text:style-name="P113">15</text:p>
          </table:table-cell>
          <table:table-cell table:style-name="Tableau4.A2" office:value-type="string">
            <text:p text:style-name="P112">21</text:p>
          </table:table-cell>
          <table:table-cell table:style-name="Tableau4.A2" office:value-type="string">
            <text:p text:style-name="P89"><text:span text:style-name="T89">1</text:span><text:span text:style-name="T91">1</text:span></text:p>
          </table:table-cell>
          <table:table-cell table:style-name="Tableau4.G2" office:value-type="string">
            <text:p text:style-name="P89"><text:span text:style-name="T83">1</text:span><text:span text:style-name="T91">3</text:span></text:p>
          </table:table-cell>
        </table:table-row>
      </table:table>
      <text:p text:style-name="P57"/>
      <text:p text:style-name="P57"/>
      <table:table table:name="Tableau10" table:style-name="Tableau10">
        <table:table-column table:style-name="Tableau10.A" table:number-columns-repeated="6"/>
        <table:table-column table:style-name="Tableau10.G"/>
        <table:table-row>
          <table:table-cell table:style-name="Tableau10.A1" office:value-type="string">
            <text:p text:style-name="P109">2</text:p>
          </table:table-cell>
          <table:table-cell table:style-name="Tableau10.A1" office:value-type="string">
            <text:p text:style-name="P109">7</text:p>
          </table:table-cell>
          <table:table-cell table:style-name="Tableau10.A1" office:value-type="string">
            <text:p text:style-name="P109">9</text:p>
          </table:table-cell>
          <table:table-cell table:style-name="Tableau10.A1" office:value-type="string">
            <text:p text:style-name="P157"><draw:control text:anchor-type="as-char" draw:z-index="21" draw:name="Contrôle 28" draw:style-name="gr1" draw:text-style-name="P201" svg:width="2.604cm" svg:height="0.6cm" draw:control="control13"/></text:p>
          </table:table-cell>
          <table:table-cell table:style-name="Tableau10.A1" office:value-type="string">
            <text:p text:style-name="P161"><draw:control text:anchor-type="as-char" draw:z-index="59" draw:name="Contrôle 29" draw:style-name="gr1" draw:text-style-name="P201" svg:width="2.604cm" svg:height="0.6cm" draw:control="control51"/></text:p>
          </table:table-cell>
          <table:table-cell table:style-name="Tableau10.A1" office:value-type="string">
            <text:p text:style-name="P161"><draw:control text:anchor-type="as-char" draw:z-index="60" draw:name="Contrôle 30" draw:style-name="gr1" draw:text-style-name="P201" svg:width="2.604cm" svg:height="0.6cm" draw:control="control52"/></text:p>
          </table:table-cell>
          <table:table-cell table:style-name="Tableau10.G1" office:value-type="string">
            <text:p text:style-name="P161"><draw:control text:anchor-type="as-char" draw:z-index="61" draw:name="Contrôle 31" draw:style-name="gr1" draw:text-style-name="P201" svg:width="2.604cm" svg:height="0.6cm" draw:control="control53"/></text:p>
          </table:table-cell>
        </table:table-row>
      </table:table>
      <text:p text:style-name="P57"/>
      <text:p text:style-name="P57"/>
      <text:p text:style-name="P57"/>
      <text:p text:style-name="P54">La même chose avec une animation visuelle : <text:a xlink:type="simple" xlink:href="https://visualgo.net/en/sorting" text:style-name="Internet_20_link" text:visited-style-name="Visited_20_Internet_20_Link">https://visualgo.net/en/sorting</text:a> </text:p>
      <text:p text:style-name="P57"/>
      <text:p text:style-name="P57"/>
      <text:p text:style-name="P58"><text:span text:style-name="T37">Cod</text:span><text:span text:style-name="T53">e </text:span><text:span text:style-name="T35">(à co</text:span><text:span text:style-name="T36">mpléter</text:span><text:span text:style-name="T35">)</text:span><text:span text:style-name="T12"> :</text:span></text:p>
      <text:p text:style-name="P64">def tri_selection(liste):</text:p>
      <text:p text:style-name="P64"><text:s text:c="4"/># Dans la partie restant à trier :</text:p>
      <text:p text:style-name="P64"><text:s text:c="4"/># <text:s text:c="2"/>i désigne l'indice du premier terme</text:p>
      <text:p text:style-name="P36"><text:s text:c="4"/># <text:s text:c="2"/>imin désigne l'indice du <text:span text:style-name="T25">minimum</text:span></text:p>
      <text:p text:style-name="P42"><text:s text:c="4"/>for i in range<draw:control text:anchor-type="as-char" draw:z-index="28" draw:name="Contrôle 34" draw:style-name="gr1" draw:text-style-name="P199" svg:width="5.19cm" svg:height="0.701cm" draw:control="control20"/></text:p>
      <text:p text:style-name="P42"><text:s text:c="8"/>imin = <draw:control text:anchor-type="as-char" draw:z-index="24" draw:name="Contrôle 35" draw:style-name="gr1" draw:text-style-name="P199" svg:width="2.251cm" svg:height="0.701cm" draw:control="control16"/></text:p>
      <text:p text:style-name="P42"><text:s text:c="8"/>for j in range<draw:control text:anchor-type="as-char" draw:z-index="27" draw:name="Contrôle 36" draw:style-name="gr1" draw:text-style-name="P199" svg:width="5.19cm" svg:height="0.701cm" draw:control="control19"/></text:p>
      <text:p text:style-name="P36"><text:s text:c="12"/>if liste[j] &lt; liste[imin]:</text:p>
      <text:p text:style-name="P42"><text:s text:c="16"/>imin = <draw:control text:anchor-type="as-char" draw:z-index="25" draw:name="Contrôle 37" draw:style-name="gr1" draw:text-style-name="P199" svg:width="2.251cm" svg:height="0.701cm" draw:control="control17"/></text:p>
      <text:p text:style-name="P36"><text:s text:c="8"/># <text:span text:style-name="T26">On permute</text:span> le <text:span text:style-name="T26">minimum</text:span> de la partie à trier avec le premier <text:span text:style-name="T92">terme</text:span></text:p>
      <text:p text:style-name="P65"><text:s text:c="8"/>liste[i], liste[imin] <text:span text:style-name="T92">=</text:span><text:span text:style-name="T92"><draw:control text:anchor-type="as-char" draw:z-index="26" draw:name="Contrôle 38" draw:style-name="gr1" draw:text-style-name="P199" svg:width="5.19cm" svg:height="0.701cm" draw:control="control18"/></text:span></text:p>
      <text:p text:style-name="P64"/>
      <text:p text:style-name="P64">from random import randint</text:p>
      <text:p text:style-name="P64">for i in range(10):</text:p>
      <text:p text:style-name="P64"><text:s text:c="4"/>l = [randint(-10, 10) for i in range(10)]</text:p>
      <text:p text:style-name="P64"><text:s text:c="4"/>tri_selection(l)</text:p>
      <text:p text:style-name="P64"><text:s text:c="4"/>assert l == sorted(l)</text:p>
      <text:p text:style-name="P57"/>
      <text:p text:style-name="P57"/>
      <text:p text:style-name="P59">Complexité :</text:p>
      <text:p text:style-name="P35"><text:span text:style-name="T86">Si </text:span><text:span text:style-name="T18">n</text:span><text:span text:style-name="T86"> est la taille de la liste, le nombre de fois où on exécute la boucle </text:span><text:span text:style-name="T92">intérieure</text:span><text:span text:style-name="T86"> est :</text:span></text:p>
      <text:p text:style-name="P56"><text:span text:style-name="T87">(</text:span><text:span text:style-name="T16">n</text:span> <text:span text:style-name="T74">− </text:span><text:span text:style-name="T87">1) </text:span>+ … <text:span text:style-name="T92">+ 4 + 3 + 2 + 1 </text:span><text:span text:style-name="T87">= </text:span><text:span text:style-name="T87"><draw:control text:anchor-type="as-char" draw:z-index="22" draw:name="Contrôle 32" draw:style-name="gr1" draw:text-style-name="P201" svg:width="4.511cm" svg:height="0.701cm" draw:control="control14"/></text:span></text:p>
      <text:p text:style-name="P158">La complexité est donc <draw:control text:anchor-type="as-char" draw:z-index="23" draw:name="Contrôle 33" draw:style-name="gr1" draw:text-style-name="P201" svg:width="4.511cm" svg:height="0.701cm" draw:control="control15"/></text:p>
      <text:list xml:id="list1906915305982" text:continue-numbering="true" text:style-name="tfNum_20_1_29_">
        <text:list-item>
          <text:p text:style-name="P186">Tri par insertion</text:p>
        </text:list-item>
      </text:list>
      <text:p text:style-name="P49">Principe :</text:p>
      <text:p text:style-name="P48"><text:span text:style-name="T83">A chaque étape d’u</text:span><text:span text:style-name="T118">n</text:span><text:span text:style-name="T83"> </text:span><text:span text:style-name="T5">tri </text:span><text:span text:style-name="T6">par insertion</text:span><text:span text:style-name="T83">, la partie gauche de la liste </text:span><text:span text:style-name="T95">est</text:span><text:span text:style-name="T83"> déjà trié</text:span><text:span text:style-name="T95">e</text:span><text:span text:style-name="T83"> et on cherche à y insérer au bon endroit le premier nombre de la partie droite. </text:span><text:span text:style-name="T84">On sauvegarde donc ce nombre à insérer et on le compare successivement à chacun des nombres de la partie triée en commençant par les plus grands. Si le nombre de la partie triée est plus grand, on le décale d’une case à droite, sinon on écrase </text:span><text:span text:style-name="T85">l</text:span><text:span text:style-name="T84">e nombre </text:span><text:span text:style-name="T85">de droite </text:span><text:span text:style-name="T84">par le nombre à insérer.</text:span></text:p>
      <text:p text:style-name="P48"/>
      <text:p text:style-name="P53"><text:span text:style-name="T84">Exemple </text:span><text:span text:style-name="T86">d’étape de tri</text:span><text:span text:style-name="T84"> :</text:span></text:p>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F"/>
        <table:table-column table:style-name="Tableau2.G"/>
        <table:table-row>
          <table:table-cell table:style-name="Tableau2.A1" table:number-columns-spanned="4" office:value-type="string">
            <text:p text:style-name="P51">partie triée</text:p>
            <text:p text:style-name="P50"><draw:custom-shape text:anchor-type="as-char" draw:z-index="0" draw:name="Forme1" draw:style-name="gr32" draw:text-style-name="P214" svg:width="0.378cm" svg:height="10.755cm" draw:transform="rotate (-1.5707963267949) translate (10.7544305555556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cell table:style-name="Tableau2.A1" table:number-columns-spanned="3" office:value-type="string">
            <text:p text:style-name="P51">partie à insérer</text:p>
            <text:p text:style-name="P50"><draw:custom-shape text:anchor-type="as-char" draw:z-index="1" draw:name="Forme1_0" draw:style-name="gr31" draw:text-style-name="P214" svg:width="0.378cm" svg:height="7.885cm" draw:transform="rotate (-1.5707963267949) translate (7.88458333333333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row>
        <table:table-row>
          <table:table-cell table:style-name="Tableau2.A2" office:value-type="string">
            <text:p text:style-name="P108">2</text:p>
          </table:table-cell>
          <table:table-cell table:style-name="Tableau2.A2" office:value-type="string">
            <text:p text:style-name="P108">7</text:p>
          </table:table-cell>
          <table:table-cell table:style-name="Tableau2.A2" office:value-type="string">
            <text:p text:style-name="P108">9</text:p>
          </table:table-cell>
          <table:table-cell table:style-name="Tableau2.A2" office:value-type="string">
            <text:p text:style-name="P108">9</text:p>
          </table:table-cell>
          <table:table-cell table:style-name="Tableau2.A2" office:value-type="string">
            <text:p text:style-name="P108">5</text:p>
          </table:table-cell>
          <table:table-cell table:style-name="Tableau2.A2" office:value-type="string">
            <text:p text:style-name="P108">4</text:p>
          </table:table-cell>
          <table:table-cell table:style-name="Tableau2.G2" office:value-type="string">
            <text:p text:style-name="P108">11</text:p>
          </table:table-cell>
        </table:table-row>
      </table:table>
      <text:p text:style-name="P60"/>
      <text:p text:style-name="P157"/>
      <table:table table:name="Tableau11" table:style-name="Tableau11">
        <table:table-column table:style-name="Tableau11.A" table:number-columns-repeated="6"/>
        <table:table-column table:style-name="Tableau11.G"/>
        <table:table-row>
          <table:table-cell table:style-name="Tableau11.A1" office:value-type="string">
            <text:p text:style-name="P111">2</text:p>
          </table:table-cell>
          <table:table-cell table:style-name="Tableau11.A1" office:value-type="string">
            <text:p text:style-name="P110"><draw:control text:anchor-type="as-char" draw:z-index="62" draw:name="Contrôle 44" draw:style-name="gr1" draw:text-style-name="P201" svg:width="2.604cm" svg:height="0.6cm" draw:control="control54"/></text:p>
          </table:table-cell>
          <table:table-cell table:style-name="Tableau11.A1" office:value-type="string">
            <text:p text:style-name="P110"><draw:control text:anchor-type="as-char" draw:z-index="63" draw:name="Contrôle 43" draw:style-name="gr1" draw:text-style-name="P201" svg:width="2.604cm" svg:height="0.6cm" draw:control="control55"/></text:p>
          </table:table-cell>
          <table:table-cell table:style-name="Tableau11.A1" office:value-type="string">
            <text:p text:style-name="P161"><draw:control text:anchor-type="as-char" draw:z-index="64" draw:name="Contrôle 39" draw:style-name="gr1" draw:text-style-name="P201" svg:width="2.604cm" svg:height="0.6cm" draw:control="control56"/></text:p>
          </table:table-cell>
          <table:table-cell table:style-name="Tableau11.A1" office:value-type="string">
            <text:p text:style-name="P161"><draw:control text:anchor-type="as-char" draw:z-index="65" draw:name="Contrôle 40" draw:style-name="gr1" draw:text-style-name="P201" svg:width="2.604cm" svg:height="0.6cm" draw:control="control57"/></text:p>
          </table:table-cell>
          <table:table-cell table:style-name="Tableau11.A1" office:value-type="string">
            <text:p text:style-name="P159">4</text:p>
          </table:table-cell>
          <table:table-cell table:style-name="Tableau11.G1" office:value-type="string">
            <text:p text:style-name="P159">11</text:p>
          </table:table-cell>
        </table:table-row>
      </table:table>
      <text:p text:style-name="P157"/>
      <text:p text:style-name="P157"/>
      <text:p text:style-name="P60"/>
      <text:p text:style-name="P61"><text:span text:style-name="T37">Cod</text:span><text:span text:style-name="T53">e </text:span><text:span text:style-name="T35">(à co</text:span><text:span text:style-name="T36">mpléter</text:span><text:span text:style-name="T35">)</text:span><text:span text:style-name="T12"> :</text:span></text:p>
      <text:p text:style-name="P63">def tri_insertion(liste):</text:p>
      <text:p text:style-name="P63"><text:s text:c="4"/># i désigne l'indice du terme à insérer (=le plus à gauche de la partie non triée)</text:p>
      <text:p text:style-name="P39"><text:s text:c="4"/># j désigne l’indice du terme de la partie triée auquel on le compare</text:p>
      <text:p text:style-name="P42"><text:s text:c="4"/>for i in <draw:control text:anchor-type="as-char" draw:z-index="29" draw:name="Contrôle 41" draw:style-name="gr1" draw:text-style-name="P199" svg:width="5.19cm" svg:height="0.701cm" draw:control="control21"/></text:p>
      <text:p text:style-name="P42"><text:s text:c="8"/>terme_à_insérer = <draw:control text:anchor-type="as-char" draw:z-index="30" draw:name="Contrôle 42" draw:style-name="gr1" draw:text-style-name="P199" svg:width="5.19cm" svg:height="0.701cm" draw:control="control22"/></text:p>
      <text:p text:style-name="P42"><text:s text:c="8"/>j = <draw:control text:anchor-type="as-char" draw:z-index="31" draw:name="Contrôle 45" draw:style-name="gr1" draw:text-style-name="P199" svg:width="5.19cm" svg:height="0.701cm" draw:control="control23"/></text:p>
      <text:p text:style-name="P42"><text:s text:c="8"/>while j &gt;= 0 and <draw:control text:anchor-type="as-char" draw:z-index="32" draw:name="Contrôle 46" draw:style-name="gr1" draw:text-style-name="P199" svg:width="5.19cm" svg:height="0.701cm" draw:control="control24"/></text:p>
      <text:p text:style-name="P42"><text:s text:c="12"/>liste[j+1] = <draw:control text:anchor-type="as-char" draw:z-index="33" draw:name="Contrôle 47" draw:style-name="gr1" draw:text-style-name="P199" svg:width="5.19cm" svg:height="0.701cm" draw:control="control25"/></text:p>
      <text:p text:style-name="P39"><text:s text:c="12"/>j -= 1</text:p>
      <text:p text:style-name="P65"><text:s text:c="8"/>liste[j+1] = <draw:control text:anchor-type="as-char" draw:z-index="34" draw:name="Contrôle 48" draw:style-name="gr1" draw:text-style-name="P199" svg:width="5.19cm" svg:height="0.701cm" draw:control="control26"/></text:p>
      <text:p text:style-name="P63"/>
      <text:p text:style-name="P63">from random import randint</text:p>
      <text:p text:style-name="P63">for i in range(10):</text:p>
      <text:p text:style-name="P63"><text:s text:c="4"/>l = [randint(-10, 10) for i in range(10)]</text:p>
      <text:p text:style-name="P63"><text:s text:c="4"/>tri_insertion(l)</text:p>
      <text:p text:style-name="P63"><text:s text:c="4"/>assert l == sorted(l)</text:p>
      <text:p text:style-name="P48"/>
      <text:p text:style-name="tfTitre_20_non_20_numéroté">Complexité :</text:p>
      <text:p text:style-name="P55">Si <text:span text:style-name="T16">n</text:span> est la taille de la liste, le nombre de fois où on exécute la boucle while est <text:span text:style-name="T87">dans le pire des cas</text:span> :</text:p>
      <text:p text:style-name="P56">1 + 2 + 3 + 4 + … + <text:span text:style-name="T87">(</text:span><text:span text:style-name="T16">n</text:span> <text:span text:style-name="T74">− </text:span><text:span text:style-name="T87">1) = </text:span><text:span text:style-name="T65"><text:s/></text:span><text:span text:style-name="T66"><draw:control text:anchor-type="as-char" draw:z-index="35" draw:name="Contrôle 49" draw:style-name="gr1" draw:text-style-name="P201" svg:width="4.511cm" svg:height="0.701cm" draw:control="control27"/></text:span><text:span text:style-name="T65"><text:s text:c="5"/></text:span><text:span text:style-name="T87">La complexité est donc </text:span><text:span text:style-name="T87"><draw:control text:anchor-type="as-char" draw:z-index="36" draw:name="Contrôle 50" draw:style-name="gr1" draw:text-style-name="P201" svg:width="4.511cm" svg:height="0.701cm" draw:control="control28"/></text:span></text:p>
      <text:p text:style-name="tfTitre_20_non_20_numéroté">Terminaison :</text:p>
      <text:p text:style-name="P62"><text:span text:style-name="T93">Il y a une boucle </text:span><text:span text:style-name="code_20_python">while</text:span><text:span text:style-name="T93">. Choisissons </text:span><text:span text:style-name="code_20_python">j</text:span><text:span text:style-name="T94"> </text:span><text:span text:style-name="T93">comme variant de boucle </text:span><text:span text:style-name="T94">(</text:span><text:span text:style-name="T93">première condition du </text:span><text:span text:style-name="code_20_python">while</text:span><text:span text:style-name="T94">)</text:span><text:span text:style-name="T93">. </text:span><text:span text:style-name="T94">A l’intérieur de la boucle, </text:span><text:span text:style-name="code_20_python">j</text:span><text:span text:style-name="T94"> est décrémenté donc ce variant</text:span><text:span text:style-name="T82"> finira donc bien par devenir négatif </text:span><text:span text:style-name="T94">même si la deuxième condition du </text:span><text:span text:style-name="code_20_python">while</text:span><text:span text:style-name="T94"> reste toujours vraie.</text:span></text:p>
      <text:list xml:id="list1907523340233" text:continue-list="list1906615380083" text:style-name="tfNum_20_I_29_">
        <text:list-item>
          <text:p text:style-name="P192"><text:span text:style-name="T111">Algorithme d</text:span>es k plus proches voisins</text:p>
        </text:list-item>
      </text:list>
      <text:p text:style-name="P118">L’<text:span text:style-name="T106">exemple d</text:span>es Iris de Fisher</text:p>
      <text:p text:style-name="P74"><text:span text:style-name="T97">L’algorithme des </text:span><text:span text:style-name="T7">k plus proches voisins</text:span><text:span text:style-name="T97"> </text:span><text:span text:style-name="T109">appelé aussi</text:span><text:span text:style-name="T106"> </text:span><text:span text:style-name="T8">knn</text:span><text:span text:style-name="T106"> </text:span><text:span text:style-name="T98">(</text:span><text:span text:style-name="T110">k</text:span><text:span text:style-name="T98"> </text:span><text:span text:style-name="T110">n</text:span><text:span text:style-name="T98">earest </text:span><text:span text:style-name="T110">n</text:span><text:span text:style-name="T98">eighbors) </text:span><text:span text:style-name="T97">est un algorithme de classification très simple </text:span><text:span text:style-name="T98">qui fait partie de la famille des algorithmes d</text:span><text:span text:style-name="T97">’apprentissage (machine learning).</text:span></text:p>
      <text:p text:style-name="P77"><text:span text:style-name="T99">Dans tout algorithme d’apprentissage, il faut un </text:span><text:span text:style-name="T9">jeu de données</text:span><text:span text:style-name="T99">. Nous utiliserons </text:span><text:span text:style-name="T104">ci-dessous </text:span><text:span text:style-name="T100">l’exemple très célèbre des « </text:span><text:span text:style-name="T99">iris de Fisher ». </text:span><text:span text:style-name="T100">Dans ce jeu de données, </text:span><text:span text:style-name="T99">un botaniste a </text:span><text:span text:style-name="T101">mesuré les pétales d</text:span><text:span text:style-name="T104">e 150</text:span><text:span text:style-name="T101"> </text:span><text:span text:style-name="T99">iris de </text:span><text:span text:style-name="T104">trois</text:span><text:span text:style-name="T99"> espèces différentes : Les iris setosa, </text:span><text:span text:style-name="T103">les </text:span><text:span text:style-name="T99">iris versicolor et </text:span><text:span text:style-name="T102">les </text:span><text:span text:style-name="T99">iris virginica.</text:span></text:p>
      <text:p text:style-name="P75"/>
      <table:table table:name="Tableau5" table:style-name="Tableau5">
        <table:table-column table:style-name="Tableau5.A" table:number-columns-repeated="3"/>
        <table:table-row>
          <table:table-cell table:style-name="Tableau5.A1" office:value-type="string">
            <text:p text:style-name="P80">Iris setosa</text:p>
            <text:p text:style-name="P88"><draw:frame draw:style-name="fr1" draw:name="Image3" text:anchor-type="as-char" svg:width="5.33cm" svg:height="4.001cm" draw:z-index="4"><draw:image xlink:href="Pictures/100000000000014A000000F8BB373807.png" xlink:type="simple" xlink:show="embed" xlink:actuate="onLoad" draw:mime-type="image/png"/></draw:frame></text:p>
          </table:table-cell>
          <table:table-cell table:style-name="Tableau5.A1" office:value-type="string">
            <text:p text:style-name="P79">Iris versicolor</text:p>
            <text:p text:style-name="P79"><draw:frame draw:style-name="fr1" draw:name="Image1" text:anchor-type="as-char" svg:width="5.33cm" svg:height="4.001cm" draw:z-index="5"><draw:image xlink:href="Pictures/100000000000014A000000F83455D3DD.png" xlink:type="simple" xlink:show="embed" xlink:actuate="onLoad" draw:mime-type="image/png"/></draw:frame></text:p>
          </table:table-cell>
          <table:table-cell table:style-name="Tableau5.A1" office:value-type="string">
            <text:p text:style-name="P78">Iris virginica</text:p>
            <text:p text:style-name="P79"><draw:frame draw:style-name="fr1" draw:name="Image2" text:anchor-type="as-char" svg:width="4.911cm" svg:height="4.001cm" draw:z-index="6"><draw:image xlink:href="Pictures/100000000000014A0000010D2EA6ACA6.png" xlink:type="simple" xlink:show="embed" xlink:actuate="onLoad" draw:mime-type="image/png"/></draw:frame></text:p>
          </table:table-cell>
        </table:table-row>
      </table:table>
      <text:p text:style-name="P76"/>
      <text:p text:style-name="P76"><text:span text:style-name="T105">On a représenté les données </text:span><text:span text:style-name="T106">mesurées par le botaniste </text:span><text:span text:style-name="T105">dans la figure ci-dessous :</text:span></text:p>
      <text:p text:style-name="P90"><draw:g text:anchor-type="as-char" draw:z-index="7" draw:name="Forme2" draw:style-name="gr2"><draw:polygon draw:style-name="gr3" draw:text-style-name="P202" svg:width="18.539cm" svg:height="6.348cm" svg:x="0cm" svg:y="1cm" svg:viewBox="0 0 18540 6349" draw:points="9271,6349 0,6349 0,0 18540,0 18540,6349"><text:p/></draw:polygon><draw:frame draw:style-name="gr4" draw:text-style-name="P204" svg:width="2.287cm" svg:height="0.814cm" svg:x="16.357cm" svg:y="6.112cm"><draw:text-box><text:p text:style-name="P203"><text:span text:style-name="T194">Longueur des</text:span></text:p><text:p text:style-name="P203"><text:span text:style-name="T194">pétales (cm)</text:span></text:p></draw:text-box></draw:frame><draw:frame draw:style-name="gr5" draw:text-style-name="P204" svg:width="2.844cm" svg:height="0.814cm" svg:x="0.259cm" svg:y="0cm"><draw:text-box><text:p text:style-name="P203"><text:span text:style-name="T194">Largeur des</text:span></text:p><text:p text:style-name="P203"><text:span text:style-name="T194">pétales (cm)</text:span></text:p></draw:text-box></draw:frame><draw:polygon draw:style-name="gr6" draw:text-style-name="P205" svg:width="14.954cm" svg:height="5.26cm" svg:x="0.813cm" svg:y="1.322cm" svg:viewBox="0 0 14955 5261" draw:points="7478,5261 0,5261 0,0 14955,0 14955,5261"><text:p/></draw:polygon><draw:line draw:style-name="gr7" draw:text-style-name="P206" svg:x1="0.813cm" svg:y1="1.321cm" svg:x2="0.813cm" svg:y2="6.582cm"><text:p/></draw:line><draw:line draw:style-name="gr7" draw:text-style-name="P206" svg:x1="2.681cm" svg:y1="1.321cm" svg:x2="2.681cm" svg:y2="6.582cm"><text:p/></draw:line><draw:line draw:style-name="gr7" draw:text-style-name="P206" svg:x1="4.551cm" svg:y1="1.321cm" svg:x2="4.551cm" svg:y2="6.582cm"><text:p/></draw:line><draw:line draw:style-name="gr7" draw:text-style-name="P206" svg:x1="6.421cm" svg:y1="1.321cm" svg:x2="6.421cm" svg:y2="6.582cm"><text:p/></draw:line><draw:line draw:style-name="gr7" draw:text-style-name="P206" svg:x1="8.291cm" svg:y1="1.321cm" svg:x2="8.291cm" svg:y2="6.582cm"><text:p/></draw:line><draw:line draw:style-name="gr7" draw:text-style-name="P206" svg:x1="10.158cm" svg:y1="1.321cm" svg:x2="10.158cm" svg:y2="6.582cm"><text:p/></draw:line><draw:line draw:style-name="gr7" draw:text-style-name="P206" svg:x1="12.027cm" svg:y1="1.321cm" svg:x2="12.027cm" svg:y2="6.582cm"><text:p/></draw:line><draw:line draw:style-name="gr7" draw:text-style-name="P206" svg:x1="13.897cm" svg:y1="1.321cm" svg:x2="13.897cm" svg:y2="6.582cm"><text:p/></draw:line><draw:polyline draw:style-name="gr7" draw:text-style-name="P206" svg:width="5.26cm" svg:height="14.954cm" draw:transform="rotate (-1.5707963267949) translate (15.7673204945124cm 1.31932445677854cm)" svg:viewBox="0 0 5261 14955" draw:points="0,0 5261,0 5261,14955"><text:p/></draw:polyline><draw:line draw:style-name="gr7" draw:text-style-name="P206" svg:x1="15.768cm" svg:y1="4.827cm" svg:x2="0.813cm" svg:y2="4.827cm"><text:p/></draw:line><draw:line draw:style-name="gr7" draw:text-style-name="P206" svg:x1="15.768cm" svg:y1="3.075cm" svg:x2="0.813cm" svg:y2="3.075cm"><text:p/></draw:line><draw:line draw:style-name="gr7" draw:text-style-name="P206" svg:x1="15.768cm" svg:y1="1.321cm" svg:x2="0.813cm" svg:y2="1.321cm"><text:p/></draw:line><draw:polygon draw:style-name="gr7" draw:text-style-name="P206" svg:width="0cm" svg:height="0.149cm" svg:x="0.812cm" svg:y="6.582cm" svg:viewBox="0 0 0 150" draw:points="0,0 0,150"><text:p/></draw:polygon><draw:polygon draw:style-name="gr7" draw:text-style-name="P206" svg:width="0cm" svg:height="0.149cm" svg:x="2.681cm" svg:y="6.582cm" svg:viewBox="0 0 0 150" draw:points="0,0 0,150"><text:p/></draw:polygon><draw:polygon draw:style-name="gr7" draw:text-style-name="P206" svg:width="0cm" svg:height="0.149cm" svg:x="4.551cm" svg:y="6.582cm" svg:viewBox="0 0 0 150" draw:points="0,0 0,150"><text:p/></draw:polygon><draw:polygon draw:style-name="gr7" draw:text-style-name="P206" svg:width="0cm" svg:height="0.149cm" svg:x="6.421cm" svg:y="6.582cm" svg:viewBox="0 0 0 150" draw:points="0,0 0,150"><text:p/></draw:polygon><draw:polygon draw:style-name="gr7" draw:text-style-name="P206" svg:width="0cm" svg:height="0.149cm" svg:x="8.29cm" svg:y="6.582cm" svg:viewBox="0 0 0 150" draw:points="0,0 0,150"><text:p/></draw:polygon><draw:polygon draw:style-name="gr7" draw:text-style-name="P206" svg:width="0cm" svg:height="0.149cm" svg:x="10.158cm" svg:y="6.582cm" svg:viewBox="0 0 0 150" draw:points="0,0 0,150"><text:p/></draw:polygon><draw:polygon draw:style-name="gr7" draw:text-style-name="P206" svg:width="0cm" svg:height="0.149cm" svg:x="12.028cm" svg:y="6.582cm" svg:viewBox="0 0 0 150" draw:points="0,0 0,150"><text:p/></draw:polygon><draw:polygon draw:style-name="gr7" draw:text-style-name="P206" svg:width="0cm" svg:height="0.149cm" svg:x="13.898cm" svg:y="6.582cm" svg:viewBox="0 0 0 150" draw:points="0,0 0,150"><text:p/></draw:polygon><draw:line draw:style-name="gr8" draw:text-style-name="P206" svg:x1="15.767cm" svg:y1="6.582cm" svg:x2="15.767cm" svg:y2="6.732cm"><text:p/></draw:line><draw:line draw:style-name="gr8" draw:text-style-name="P206" svg:x1="15.767cm" svg:y1="6.732cm" svg:x2="15.767cm" svg:y2="6.582cm"><text:p/></draw:line><draw:line draw:style-name="gr9" draw:text-style-name="P206" svg:x1="16.205cm" svg:y1="6.582cm" svg:x2="0.813cm" svg:y2="6.582cm"><text:p/></draw:line><draw:line draw:style-name="gr8" draw:text-style-name="P206" svg:x1="0.812cm" svg:y1="6.582cm" svg:x2="0.66cm" svg:y2="6.582cm"><text:p/></draw:line><draw:line draw:style-name="gr8" draw:text-style-name="P206" svg:x1="0.66cm" svg:y1="6.582cm" svg:x2="0.812cm" svg:y2="6.582cm"><text:p/></draw:line><draw:polygon draw:style-name="gr7" draw:text-style-name="P206" svg:width="0.151cm" svg:height="0cm" svg:x="0.66cm" svg:y="4.827cm" svg:viewBox="0 0 152 0" draw:points="152,0 0,0"><text:p/></draw:polygon><draw:polygon draw:style-name="gr7" draw:text-style-name="P206" svg:width="0.151cm" svg:height="0cm" svg:x="0.66cm" svg:y="3.075cm" svg:viewBox="0 0 152 0" draw:points="152,0 0,0"><text:p/></draw:polygon><draw:line draw:style-name="gr10" draw:text-style-name="P206" svg:x1="0.813cm" svg:y1="6.582cm" svg:x2="0.813cm" svg:y2="0.85cm"><text:p/></draw:line><draw:line draw:style-name="gr8" draw:text-style-name="P206" svg:x1="0.812cm" svg:y1="1.321cm" svg:x2="0.66cm" svg:y2="1.321cm"><text:p/></draw:line><draw:line draw:style-name="gr8" draw:text-style-name="P206" svg:x1="0.66cm" svg:y1="1.321cm" svg:x2="0.812cm" svg:y2="1.321cm"><text:p/></draw:line><draw:polygon draw:style-name="gr11" draw:text-style-name="P207" svg:width="0.202cm" svg:height="0.199cm" svg:x="11.926cm" svg:y="2.098cm" svg:viewBox="0 0 203 200" draw:points="0,200 203,200 102,0"><text:p/></draw:polygon><draw:polygon draw:style-name="gr12" draw:text-style-name="P208" svg:width="0.202cm" svg:height="0.199cm" svg:x="11.926cm" svg:y="2.098cm" svg:viewBox="0 0 203 200" draw:points="0,200 203,200 102,0"><text:p/></draw:polygon><draw:polygon draw:style-name="gr13" draw:text-style-name="P207" svg:width="0.202cm" svg:height="0.199cm" svg:x="10.243cm" svg:y="3.15cm" svg:viewBox="0 0 203 200" draw:points="0,200 203,200 102,0"><text:p/></draw:polygon><draw:polygon draw:style-name="gr12" draw:text-style-name="P208" svg:width="0.202cm" svg:height="0.199cm" svg:x="10.243cm" svg:y="3.15cm" svg:viewBox="0 0 203 200" draw:points="0,200 203,200 102,0"><text:p/></draw:polygon><draw:polygon draw:style-name="gr13" draw:text-style-name="P207" svg:width="0.202cm" svg:height="0.199cm" svg:x="11.739cm" svg:y="2.799cm" svg:viewBox="0 0 203 200" draw:points="0,200 203,200 102,0"><text:p/></draw:polygon><draw:polygon draw:style-name="gr12" draw:text-style-name="P208" svg:width="0.202cm" svg:height="0.199cm" svg:x="11.739cm" svg:y="2.799cm" svg:viewBox="0 0 203 200" draw:points="0,200 203,200 102,0"><text:p/></draw:polygon><draw:polygon draw:style-name="gr13" draw:text-style-name="P207" svg:width="0.202cm" svg:height="0.199cm" svg:x="11.178cm" svg:y="3.326cm" svg:viewBox="0 0 203 200" draw:points="0,200 203,200 102,0"><text:p/></draw:polygon><draw:polygon draw:style-name="gr12" draw:text-style-name="P208" svg:width="0.202cm" svg:height="0.199cm" svg:x="11.178cm" svg:y="3.326cm" svg:viewBox="0 0 203 200" draw:points="0,200 203,200 102,0"><text:p/></draw:polygon><draw:polygon draw:style-name="gr13" draw:text-style-name="P207" svg:width="0.202cm" svg:height="0.199cm" svg:x="11.552cm" svg:y="2.626cm" svg:viewBox="0 0 203 200" draw:points="0,200 203,200 102,0"><text:p/></draw:polygon><draw:polygon draw:style-name="gr12" draw:text-style-name="P208" svg:width="0.202cm" svg:height="0.199cm" svg:x="11.552cm" svg:y="2.626cm" svg:viewBox="0 0 203 200" draw:points="0,200 203,200 102,0"><text:p/></draw:polygon><draw:polygon draw:style-name="gr13" draw:text-style-name="P207" svg:width="0.202cm" svg:height="0.199cm" svg:x="13.047cm" svg:y="2.799cm" svg:viewBox="0 0 203 200" draw:points="0,200 203,200 102,0"><text:p/></draw:polygon><draw:polygon draw:style-name="gr12" draw:text-style-name="P208" svg:width="0.202cm" svg:height="0.199cm" svg:x="13.047cm" svg:y="2.799cm" svg:viewBox="0 0 203 200" draw:points="0,200 203,200 102,0"><text:p/></draw:polygon><draw:polygon draw:style-name="gr13" draw:text-style-name="P207" svg:width="0.201cm" svg:height="0.199cm" svg:x="9.124cm" svg:y="3.501cm" svg:viewBox="0 0 202 200" draw:points="0,200 202,200 102,0"><text:p/></draw:polygon><draw:polygon draw:style-name="gr12" draw:text-style-name="P208" svg:width="0.201cm" svg:height="0.199cm" svg:x="9.124cm" svg:y="3.501cm" svg:viewBox="0 0 202 200" draw:points="0,200 202,200 102,0"><text:p/></draw:polygon><draw:polygon draw:style-name="gr13" draw:text-style-name="P207" svg:width="0.202cm" svg:height="0.199cm" svg:x="12.487cm" svg:y="3.326cm" svg:viewBox="0 0 203 200" draw:points="0,200 203,200 102,0"><text:p/></draw:polygon><draw:polygon draw:style-name="gr12" draw:text-style-name="P208" svg:width="0.202cm" svg:height="0.199cm" svg:x="12.487cm" svg:y="3.326cm" svg:viewBox="0 0 203 200" draw:points="0,200 203,200 102,0"><text:p/></draw:polygon><draw:polygon draw:style-name="gr13" draw:text-style-name="P207" svg:width="0.202cm" svg:height="0.199cm" svg:x="11.552cm" svg:y="3.326cm" svg:viewBox="0 0 203 200" draw:points="0,200 203,200 102,0"><text:p/></draw:polygon><draw:polygon draw:style-name="gr12" draw:text-style-name="P208" svg:width="0.202cm" svg:height="0.199cm" svg:x="11.552cm" svg:y="3.326cm" svg:viewBox="0 0 203 200" draw:points="0,200 203,200 102,0"><text:p/></draw:polygon><draw:polygon draw:style-name="gr13" draw:text-style-name="P207" svg:width="0.202cm" svg:height="0.199cm" svg:x="12.113cm" svg:y="2.098cm" svg:viewBox="0 0 203 200" draw:points="0,200 203,200 102,0"><text:p/></draw:polygon><draw:polygon draw:style-name="gr12" draw:text-style-name="P208" svg:width="0.202cm" svg:height="0.199cm" svg:x="12.113cm" svg:y="2.098cm" svg:viewBox="0 0 203 200" draw:points="0,200 203,200 102,0"><text:p/></draw:polygon><draw:polygon draw:style-name="gr13" draw:text-style-name="P207" svg:width="0.202cm" svg:height="0.199cm" svg:x="10.243cm" svg:y="2.977cm" svg:viewBox="0 0 203 200" draw:points="0,200 203,200 102,0"><text:p/></draw:polygon><draw:polygon draw:style-name="gr12" draw:text-style-name="P208" svg:width="0.202cm" svg:height="0.199cm" svg:x="10.243cm" svg:y="2.977cm" svg:viewBox="0 0 203 200" draw:points="0,200 203,200 102,0"><text:p/></draw:polygon><draw:polygon draw:style-name="gr13" draw:text-style-name="P207" svg:width="0.202cm" svg:height="0.199cm" svg:x="10.617cm" svg:y="3.15cm" svg:viewBox="0 0 203 200" draw:points="0,200 203,200 102,0"><text:p/></draw:polygon><draw:polygon draw:style-name="gr12" draw:text-style-name="P208" svg:width="0.202cm" svg:height="0.199cm" svg:x="10.617cm" svg:y="3.15cm" svg:viewBox="0 0 203 200" draw:points="0,200 203,200 102,0"><text:p/></draw:polygon><draw:polygon draw:style-name="gr13" draw:text-style-name="P207" svg:width="0.202cm" svg:height="0.199cm" svg:x="10.992cm" svg:y="2.799cm" svg:viewBox="0 0 203 200" draw:points="0,200 203,200 102,0"><text:p/></draw:polygon><draw:polygon draw:style-name="gr12" draw:text-style-name="P208" svg:width="0.202cm" svg:height="0.199cm" svg:x="10.992cm" svg:y="2.799cm" svg:viewBox="0 0 203 200" draw:points="0,200 203,200 102,0"><text:p/></draw:polygon><draw:polygon draw:style-name="gr13" draw:text-style-name="P207" svg:width="0.202cm" svg:height="0.199cm" svg:x="10.056cm" svg:y="2.977cm" svg:viewBox="0 0 203 200" draw:points="0,200 203,200 102,0"><text:p/></draw:polygon><draw:polygon draw:style-name="gr12" draw:text-style-name="P208" svg:width="0.202cm" svg:height="0.199cm" svg:x="10.056cm" svg:y="2.977cm" svg:viewBox="0 0 203 200" draw:points="0,200 203,200 102,0"><text:p/></draw:polygon><draw:polygon draw:style-name="gr13" draw:text-style-name="P207" svg:width="0.202cm" svg:height="0.199cm" svg:x="10.243cm" svg:y="2.275cm" svg:viewBox="0 0 203 200" draw:points="0,200 203,200 102,0"><text:p/></draw:polygon><draw:polygon draw:style-name="gr12" draw:text-style-name="P208" svg:width="0.202cm" svg:height="0.199cm" svg:x="10.243cm" svg:y="2.275cm" svg:viewBox="0 0 203 200" draw:points="0,200 203,200 102,0"><text:p/></draw:polygon><draw:polygon draw:style-name="gr13" draw:text-style-name="P207" svg:width="0.202cm" svg:height="0.199cm" svg:x="10.617cm" svg:y="2.449cm" svg:viewBox="0 0 203 200" draw:points="0,200 203,200 102,0"><text:p/></draw:polygon><draw:polygon draw:style-name="gr12" draw:text-style-name="P208" svg:width="0.202cm" svg:height="0.199cm" svg:x="10.617cm" svg:y="2.449cm" svg:viewBox="0 0 203 200" draw:points="0,200 203,200 102,0"><text:p/></draw:polygon><draw:polygon draw:style-name="gr13" draw:text-style-name="P207" svg:width="0.202cm" svg:height="0.199cm" svg:x="10.992cm" svg:y="3.326cm" svg:viewBox="0 0 203 200" draw:points="0,200 203,200 102,0"><text:p/></draw:polygon><draw:polygon draw:style-name="gr12" draw:text-style-name="P208" svg:width="0.202cm" svg:height="0.199cm" svg:x="10.992cm" svg:y="3.326cm" svg:viewBox="0 0 203 200" draw:points="0,200 203,200 102,0"><text:p/></draw:polygon><draw:polygon draw:style-name="gr13" draw:text-style-name="P207" svg:width="0.202cm" svg:height="0.199cm" svg:x="13.235cm" svg:y="2.626cm" svg:viewBox="0 0 203 200" draw:points="0,200 203,200 102,0"><text:p/></draw:polygon><draw:polygon draw:style-name="gr12" draw:text-style-name="P208" svg:width="0.202cm" svg:height="0.199cm" svg:x="13.235cm" svg:y="2.626cm" svg:viewBox="0 0 203 200" draw:points="0,200 203,200 102,0"><text:p/></draw:polygon><draw:polygon draw:style-name="gr13" draw:text-style-name="P207" svg:width="0.202cm" svg:height="0.199cm" svg:x="13.609cm" svg:y="2.449cm" svg:viewBox="0 0 203 200" draw:points="0,200 203,200 102,0"><text:p/></draw:polygon><draw:polygon draw:style-name="gr12" draw:text-style-name="P208" svg:width="0.202cm" svg:height="0.199cm" svg:x="13.609cm" svg:y="2.449cm" svg:viewBox="0 0 203 200" draw:points="0,200 203,200 102,0"><text:p/></draw:polygon><draw:polygon draw:style-name="gr13" draw:text-style-name="P207" svg:width="0.202cm" svg:height="0.199cm" svg:x="10.056cm" svg:y="3.852cm" svg:viewBox="0 0 203 200" draw:points="0,200 203,200 102,0"><text:p/></draw:polygon><draw:polygon draw:style-name="gr12" draw:text-style-name="P208" svg:width="0.202cm" svg:height="0.199cm" svg:x="10.056cm" svg:y="3.852cm" svg:viewBox="0 0 203 200" draw:points="0,200 203,200 102,0"><text:p/></draw:polygon><draw:polygon draw:style-name="gr13" draw:text-style-name="P207" svg:width="0.202cm" svg:height="0.199cm" svg:x="11.365cm" svg:y="2.449cm" svg:viewBox="0 0 203 200" draw:points="0,200 203,200 102,0"><text:p/></draw:polygon><draw:polygon draw:style-name="gr12" draw:text-style-name="P208" svg:width="0.202cm" svg:height="0.199cm" svg:x="11.365cm" svg:y="2.449cm" svg:viewBox="0 0 203 200" draw:points="0,200 203,200 102,0"><text:p/></draw:polygon><draw:polygon draw:style-name="gr13" draw:text-style-name="P207" svg:width="0.202cm" svg:height="0.199cm" svg:x="9.869cm" svg:y="2.977cm" svg:viewBox="0 0 203 200" draw:points="0,200 203,200 102,0"><text:p/></draw:polygon><draw:polygon draw:style-name="gr12" draw:text-style-name="P208" svg:width="0.202cm" svg:height="0.199cm" svg:x="9.869cm" svg:y="2.977cm" svg:viewBox="0 0 203 200" draw:points="0,200 203,200 102,0"><text:p/></draw:polygon><draw:polygon draw:style-name="gr13" draw:text-style-name="P207" svg:width="0.202cm" svg:height="0.199cm" svg:x="13.235cm" svg:y="2.977cm" svg:viewBox="0 0 203 200" draw:points="0,200 203,200 102,0"><text:p/></draw:polygon><draw:polygon draw:style-name="gr12" draw:text-style-name="P208" svg:width="0.202cm" svg:height="0.199cm" svg:x="13.235cm" svg:y="2.977cm" svg:viewBox="0 0 203 200" draw:points="0,200 203,200 102,0"><text:p/></draw:polygon><draw:polygon draw:style-name="gr13" draw:text-style-name="P207" svg:width="0.202cm" svg:height="0.199cm" svg:x="9.869cm" svg:y="3.326cm" svg:viewBox="0 0 203 200" draw:points="0,200 203,200 102,0"><text:p/></draw:polygon><draw:polygon draw:style-name="gr12" draw:text-style-name="P208" svg:width="0.202cm" svg:height="0.199cm" svg:x="9.869cm" svg:y="3.326cm" svg:viewBox="0 0 203 200" draw:points="0,200 203,200 102,0"><text:p/></draw:polygon><draw:polygon draw:style-name="gr13" draw:text-style-name="P207" svg:width="0.202cm" svg:height="0.199cm" svg:x="11.365cm" svg:y="2.799cm" svg:viewBox="0 0 203 200" draw:points="0,200 203,200 102,0"><text:p/></draw:polygon><draw:polygon draw:style-name="gr12" draw:text-style-name="P208" svg:width="0.202cm" svg:height="0.199cm" svg:x="11.365cm" svg:y="2.799cm" svg:viewBox="0 0 203 200" draw:points="0,200 203,200 102,0"><text:p/></draw:polygon><draw:polygon draw:style-name="gr13" draw:text-style-name="P207" svg:width="0.202cm" svg:height="0.199cm" svg:x="11.926cm" svg:y="3.326cm" svg:viewBox="0 0 203 200" draw:points="0,200 203,200 102,0"><text:p/></draw:polygon><draw:polygon draw:style-name="gr12" draw:text-style-name="P208" svg:width="0.202cm" svg:height="0.199cm" svg:x="11.926cm" svg:y="3.326cm" svg:viewBox="0 0 203 200" draw:points="0,200 203,200 102,0"><text:p/></draw:polygon><draw:polygon draw:style-name="gr13" draw:text-style-name="P207" svg:width="0.202cm" svg:height="0.199cm" svg:x="9.682cm" svg:y="3.326cm" svg:viewBox="0 0 203 200" draw:points="0,200 203,200 102,0"><text:p/></draw:polygon><draw:polygon draw:style-name="gr12" draw:text-style-name="P208" svg:width="0.202cm" svg:height="0.199cm" svg:x="9.682cm" svg:y="3.326cm" svg:viewBox="0 0 203 200" draw:points="0,200 203,200 102,0"><text:p/></draw:polygon><draw:polygon draw:style-name="gr13" draw:text-style-name="P207" svg:width="0.202cm" svg:height="0.199cm" svg:x="9.869cm" svg:y="3.326cm" svg:viewBox="0 0 203 200" draw:points="0,200 203,200 102,0"><text:p/></draw:polygon><draw:polygon draw:style-name="gr12" draw:text-style-name="P208" svg:width="0.202cm" svg:height="0.199cm" svg:x="9.869cm" svg:y="3.326cm" svg:viewBox="0 0 203 200" draw:points="0,200 203,200 102,0"><text:p/></draw:polygon><draw:polygon draw:style-name="gr13" draw:text-style-name="P207" svg:width="0.202cm" svg:height="0.199cm" svg:x="11.178cm" svg:y="2.799cm" svg:viewBox="0 0 203 200" draw:points="0,200 203,200 102,0"><text:p/></draw:polygon><draw:polygon draw:style-name="gr12" draw:text-style-name="P208" svg:width="0.202cm" svg:height="0.199cm" svg:x="11.178cm" svg:y="2.799cm" svg:viewBox="0 0 203 200" draw:points="0,200 203,200 102,0"><text:p/></draw:polygon><draw:polygon draw:style-name="gr13" draw:text-style-name="P207" svg:width="0.202cm" svg:height="0.199cm" svg:x="11.552cm" svg:y="3.677cm" svg:viewBox="0 0 203 200" draw:points="0,200 203,200 102,0"><text:p/></draw:polygon><draw:polygon draw:style-name="gr12" draw:text-style-name="P208" svg:width="0.202cm" svg:height="0.199cm" svg:x="11.552cm" svg:y="3.677cm" svg:viewBox="0 0 203 200" draw:points="0,200 203,200 102,0"><text:p/></draw:polygon><draw:polygon draw:style-name="gr13" draw:text-style-name="P207" svg:width="0.202cm" svg:height="0.199cm" svg:x="12.113cm" svg:y="3.15cm" svg:viewBox="0 0 203 200" draw:points="0,200 203,200 102,0"><text:p/></draw:polygon><draw:polygon draw:style-name="gr12" draw:text-style-name="P208" svg:width="0.202cm" svg:height="0.199cm" svg:x="12.113cm" svg:y="3.15cm" svg:viewBox="0 0 203 200" draw:points="0,200 203,200 102,0"><text:p/></draw:polygon><draw:polygon draw:style-name="gr13" draw:text-style-name="P207" svg:width="0.202cm" svg:height="0.199cm" svg:x="12.673cm" svg:y="2.977cm" svg:viewBox="0 0 203 200" draw:points="0,200 203,200 102,0"><text:p/></draw:polygon><draw:polygon draw:style-name="gr12" draw:text-style-name="P208" svg:width="0.202cm" svg:height="0.199cm" svg:x="12.673cm" svg:y="2.977cm" svg:viewBox="0 0 203 200" draw:points="0,200 203,200 102,0"><text:p/></draw:polygon><draw:polygon draw:style-name="gr13" draw:text-style-name="P207" svg:width="0.202cm" svg:height="0.199cm" svg:x="11.178cm" svg:y="2.626cm" svg:viewBox="0 0 203 200" draw:points="0,200 203,200 102,0"><text:p/></draw:polygon><draw:polygon draw:style-name="gr12" draw:text-style-name="P208" svg:width="0.202cm" svg:height="0.199cm" svg:x="11.178cm" svg:y="2.626cm" svg:viewBox="0 0 203 200" draw:points="0,200 203,200 102,0"><text:p/></draw:polygon><draw:polygon draw:style-name="gr13" draw:text-style-name="P207" svg:width="0.202cm" svg:height="0.199cm" svg:x="10.243cm" svg:y="3.852cm" svg:viewBox="0 0 203 200" draw:points="0,200 203,200 102,0"><text:p/></draw:polygon><draw:polygon draw:style-name="gr12" draw:text-style-name="P208" svg:width="0.202cm" svg:height="0.199cm" svg:x="10.243cm" svg:y="3.852cm" svg:viewBox="0 0 203 200" draw:points="0,200 203,200 102,0"><text:p/></draw:polygon><draw:polygon draw:style-name="gr13" draw:text-style-name="P207" svg:width="0.202cm" svg:height="0.198cm" svg:x="11.178cm" svg:y="4.027cm" svg:viewBox="0 0 203 199" draw:points="0,199 203,199 102,0"><text:p/></draw:polygon><draw:polygon draw:style-name="gr12" draw:text-style-name="P208" svg:width="0.202cm" svg:height="0.198cm" svg:x="11.178cm" svg:y="4.027cm" svg:viewBox="0 0 203 199" draw:points="0,199 203,199 102,0"><text:p/></draw:polygon><draw:polygon draw:style-name="gr13" draw:text-style-name="P207" svg:width="0.202cm" svg:height="0.199cm" svg:x="12.113cm" svg:y="2.449cm" svg:viewBox="0 0 203 200" draw:points="0,200 203,200 102,0"><text:p/></draw:polygon><draw:polygon draw:style-name="gr12" draw:text-style-name="P208" svg:width="0.202cm" svg:height="0.199cm" svg:x="12.113cm" svg:y="2.449cm" svg:viewBox="0 0 203 200" draw:points="0,200 203,200 102,0"><text:p/></draw:polygon><draw:polygon draw:style-name="gr13" draw:text-style-name="P207" svg:width="0.202cm" svg:height="0.199cm" svg:x="11.178cm" svg:y="2.275cm" svg:viewBox="0 0 203 200" draw:points="0,200 203,200 102,0"><text:p/></draw:polygon><draw:polygon draw:style-name="gr12" draw:text-style-name="P208" svg:width="0.202cm" svg:height="0.199cm" svg:x="11.178cm" svg:y="2.275cm" svg:viewBox="0 0 203 200" draw:points="0,200 203,200 102,0"><text:p/></draw:polygon><draw:polygon draw:style-name="gr13" draw:text-style-name="P207" svg:width="0.202cm" svg:height="0.199cm" svg:x="10.992cm" svg:y="3.326cm" svg:viewBox="0 0 203 200" draw:points="0,200 203,200 102,0"><text:p/></draw:polygon><draw:polygon draw:style-name="gr12" draw:text-style-name="P208" svg:width="0.202cm" svg:height="0.199cm" svg:x="10.992cm" svg:y="3.326cm" svg:viewBox="0 0 203 200" draw:points="0,200 203,200 102,0"><text:p/></draw:polygon><draw:polygon draw:style-name="gr13" draw:text-style-name="P207" svg:width="0.202cm" svg:height="0.199cm" svg:x="9.682cm" svg:y="3.326cm" svg:viewBox="0 0 203 200" draw:points="0,200 203,200 102,0"><text:p/></draw:polygon><draw:polygon draw:style-name="gr12" draw:text-style-name="P208" svg:width="0.202cm" svg:height="0.199cm" svg:x="9.682cm" svg:y="3.326cm" svg:viewBox="0 0 203 200" draw:points="0,200 203,200 102,0"><text:p/></draw:polygon><draw:polygon draw:style-name="gr13" draw:text-style-name="P207" svg:width="0.202cm" svg:height="0.199cm" svg:x="10.805cm" svg:y="2.799cm" svg:viewBox="0 0 203 200" draw:points="0,200 203,200 102,0"><text:p/></draw:polygon><draw:polygon draw:style-name="gr12" draw:text-style-name="P208" svg:width="0.202cm" svg:height="0.199cm" svg:x="10.805cm" svg:y="2.799cm" svg:viewBox="0 0 203 200" draw:points="0,200 203,200 102,0"><text:p/></draw:polygon><draw:polygon draw:style-name="gr13" draw:text-style-name="P207" svg:width="0.202cm" svg:height="0.199cm" svg:x="11.178cm" svg:y="2.275cm" svg:viewBox="0 0 203 200" draw:points="0,200 203,200 102,0"><text:p/></draw:polygon><draw:polygon draw:style-name="gr12" draw:text-style-name="P208" svg:width="0.202cm" svg:height="0.199cm" svg:x="11.178cm" svg:y="2.275cm" svg:viewBox="0 0 203 200" draw:points="0,200 203,200 102,0"><text:p/></draw:polygon><draw:polygon draw:style-name="gr13" draw:text-style-name="P207" svg:width="0.202cm" svg:height="0.199cm" svg:x="10.243cm" svg:y="2.449cm" svg:viewBox="0 0 203 200" draw:points="0,200 203,200 102,0"><text:p/></draw:polygon><draw:polygon draw:style-name="gr12" draw:text-style-name="P208" svg:width="0.202cm" svg:height="0.199cm" svg:x="10.243cm" svg:y="2.449cm" svg:viewBox="0 0 203 200" draw:points="0,200 203,200 102,0"><text:p/></draw:polygon><draw:polygon draw:style-name="gr13" draw:text-style-name="P207" svg:width="0.202cm" svg:height="0.199cm" svg:x="10.243cm" svg:y="3.15cm" svg:viewBox="0 0 203 200" draw:points="0,200 203,200 102,0"><text:p/></draw:polygon><draw:polygon draw:style-name="gr12" draw:text-style-name="P208" svg:width="0.202cm" svg:height="0.199cm" svg:x="10.243cm" svg:y="3.15cm" svg:viewBox="0 0 203 200" draw:points="0,200 203,200 102,0"><text:p/></draw:polygon><draw:polygon draw:style-name="gr13" draw:text-style-name="P207" svg:width="0.202cm" svg:height="0.199cm" svg:x="11.739cm" svg:y="2.449cm" svg:viewBox="0 0 203 200" draw:points="0,200 203,200 102,0"><text:p/></draw:polygon><draw:polygon draw:style-name="gr12" draw:text-style-name="P208" svg:width="0.202cm" svg:height="0.199cm" svg:x="11.739cm" svg:y="2.449cm" svg:viewBox="0 0 203 200" draw:points="0,200 203,200 102,0"><text:p/></draw:polygon><draw:polygon draw:style-name="gr13" draw:text-style-name="P207" svg:width="0.202cm" svg:height="0.199cm" svg:x="11.365cm" svg:y="2.098cm" svg:viewBox="0 0 203 200" draw:points="0,200 203,200 102,0"><text:p/></draw:polygon><draw:polygon draw:style-name="gr12" draw:text-style-name="P208" svg:width="0.202cm" svg:height="0.199cm" svg:x="11.365cm" svg:y="2.098cm" svg:viewBox="0 0 203 200" draw:points="0,200 203,200 102,0"><text:p/></draw:polygon><draw:polygon draw:style-name="gr13" draw:text-style-name="P207" svg:width="0.202cm" svg:height="0.199cm" svg:x="10.43cm" svg:y="2.449cm" svg:viewBox="0 0 203 200" draw:points="0,200 203,200 102,0"><text:p/></draw:polygon><draw:polygon draw:style-name="gr12" draw:text-style-name="P208" svg:width="0.202cm" svg:height="0.199cm" svg:x="10.43cm" svg:y="2.449cm" svg:viewBox="0 0 203 200" draw:points="0,200 203,200 102,0"><text:p/></draw:polygon><draw:polygon draw:style-name="gr13" draw:text-style-name="P207" svg:width="0.202cm" svg:height="0.199cm" svg:x="10.056cm" svg:y="3.15cm" svg:viewBox="0 0 203 200" draw:points="0,200 203,200 102,0"><text:p/></draw:polygon><draw:polygon draw:style-name="gr12" draw:text-style-name="P208" svg:width="0.202cm" svg:height="0.199cm" svg:x="10.056cm" svg:y="3.15cm" svg:viewBox="0 0 203 200" draw:points="0,200 203,200 102,0"><text:p/></draw:polygon><draw:polygon draw:style-name="gr13" draw:text-style-name="P207" svg:width="0.202cm" svg:height="0.199cm" svg:x="10.43cm" svg:y="2.977cm" svg:viewBox="0 0 203 200" draw:points="0,200 203,200 102,0"><text:p/></draw:polygon><draw:polygon draw:style-name="gr12" draw:text-style-name="P208" svg:width="0.202cm" svg:height="0.199cm" svg:x="10.43cm" svg:y="2.977cm" svg:viewBox="0 0 203 200" draw:points="0,200 203,200 102,0"><text:p/></draw:polygon><draw:polygon draw:style-name="gr13" draw:text-style-name="P207" svg:width="0.202cm" svg:height="0.199cm" svg:x="10.805cm" svg:y="2.449cm" svg:viewBox="0 0 203 200" draw:points="0,200 203,200 102,0"><text:p/></draw:polygon><draw:polygon draw:style-name="gr12" draw:text-style-name="P208" svg:width="0.202cm" svg:height="0.199cm" svg:x="10.805cm" svg:y="2.449cm" svg:viewBox="0 0 203 200" draw:points="0,200 203,200 102,0"><text:p/></draw:polygon><draw:polygon draw:style-name="gr13" draw:text-style-name="P207" svg:width="0.202cm" svg:height="0.199cm" svg:x="10.243cm" svg:y="3.326cm" svg:viewBox="0 0 203 200" draw:points="0,200 203,200 102,0"><text:p/></draw:polygon><draw:polygon draw:style-name="gr12" draw:text-style-name="P208" svg:width="0.202cm" svg:height="0.199cm" svg:x="10.243cm" svg:y="3.326cm" svg:viewBox="0 0 203 200" draw:points="0,200 203,200 102,0"><text:p/></draw:polygon><draw:polygon draw:style-name="gr14" draw:text-style-name="P209"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0"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0"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09"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09"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5" draw:text-style-name="P210"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6" draw:text-style-name="P209"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5" draw:text-style-name="P210"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6" draw:text-style-name="P209"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5" draw:text-style-name="P210"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6" draw:text-style-name="P209"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0"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09"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5" draw:text-style-name="P210"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6" draw:text-style-name="P209"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5" draw:text-style-name="P210"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6" draw:text-style-name="P209"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0"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09"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5" draw:text-style-name="P210"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6" draw:text-style-name="P209"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5" draw:text-style-name="P210"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6" draw:text-style-name="P209"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0"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09"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5" draw:text-style-name="P210"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6" draw:text-style-name="P209"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0"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5" draw:text-style-name="P210"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5" draw:text-style-name="P210"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6" draw:text-style-name="P209"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5" draw:text-style-name="P210"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6" draw:text-style-name="P209"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09"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0"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09"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5" draw:text-style-name="P210"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6" draw:text-style-name="P209"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0"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09"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0"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09"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5" draw:text-style-name="P210"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0"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09"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5" draw:text-style-name="P210"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6" draw:text-style-name="P209"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5" draw:text-style-name="P210"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6" draw:text-style-name="P209"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5" draw:text-style-name="P210"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6" draw:text-style-name="P209"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5" draw:text-style-name="P210"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5" draw:text-style-name="P210"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6" draw:text-style-name="P209"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5" draw:text-style-name="P210"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6" draw:text-style-name="P209"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5" draw:text-style-name="P210"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6" draw:text-style-name="P209"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0"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6" draw:text-style-name="P209"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09"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5" draw:text-style-name="P210"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6" draw:text-style-name="P209"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5" draw:text-style-name="P210"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6" draw:text-style-name="P209"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5" draw:text-style-name="P210"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6" draw:text-style-name="P209"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0"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09"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5" draw:text-style-name="P210"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6" draw:text-style-name="P209"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5" draw:text-style-name="P210"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6" draw:text-style-name="P209"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0"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7"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889cm" svg:y="5.78cm" svg:viewBox="0 0 203 200" draw:points="0,100 102,200 203,100 102,0"><text:p/></draw:polygon><draw:polygon draw:style-name="gr18" draw:text-style-name="P212" svg:width="0.202cm" svg:height="0.199cm" svg:x="3.889cm" svg:y="5.78cm" svg:viewBox="0 0 203 200" draw:points="0,100 102,200 203,100 102,0"><text:p/></draw:polygon><draw:polygon draw:style-name="gr19" draw:text-style-name="P211" svg:width="0.202cm" svg:height="0.199cm" svg:x="3.328cm" svg:y="5.955cm" svg:viewBox="0 0 203 200" draw:points="0,100 102,200 203,100 102,0"><text:p/></draw:polygon><draw:polygon draw:style-name="gr18" draw:text-style-name="P212" svg:width="0.202cm" svg:height="0.199cm" svg:x="3.328cm" svg:y="5.955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328cm" svg:y="6.306cm" svg:viewBox="0 0 203 200" draw:points="0,100 102,200 203,100 102,0"><text:p/></draw:polygon><draw:polygon draw:style-name="gr18" draw:text-style-name="P212" svg:width="0.202cm" svg:height="0.199cm" svg:x="3.328cm" svg:y="6.306cm" svg:viewBox="0 0 203 200" draw:points="0,100 102,200 203,100 102,0"><text:p/></draw:polygon><draw:polygon draw:style-name="gr19" draw:text-style-name="P211" svg:width="0.202cm" svg:height="0.199cm" svg:x="2.767cm" svg:y="6.306cm" svg:viewBox="0 0 203 200" draw:points="0,100 102,200 203,100 102,0"><text:p/></draw:polygon><draw:polygon draw:style-name="gr18" draw:text-style-name="P212" svg:width="0.202cm" svg:height="0.199cm" svg:x="2.767cm" svg:y="6.306cm" svg:viewBox="0 0 203 200" draw:points="0,100 102,200 203,100 102,0"><text:p/></draw:polygon><draw:polygon draw:style-name="gr19" draw:text-style-name="P211" svg:width="0.202cm" svg:height="0.199cm" svg:x="2.954cm" svg:y="6.131cm" svg:viewBox="0 0 203 200" draw:points="0,100 102,200 203,100 102,0"><text:p/></draw:polygon><draw:polygon draw:style-name="gr18" draw:text-style-name="P212" svg:width="0.202cm" svg:height="0.199cm" svg:x="2.954cm" svg:y="6.131cm" svg:viewBox="0 0 203 200" draw:points="0,100 102,200 203,100 102,0"><text:p/></draw:polygon><draw:polygon draw:style-name="gr19" draw:text-style-name="P211" svg:width="0.202cm" svg:height="0.199cm" svg:x="3.515cm" svg:y="5.78cm" svg:viewBox="0 0 203 200" draw:points="0,100 102,200 203,100 102,0"><text:p/></draw:polygon><draw:polygon draw:style-name="gr18" draw:text-style-name="P212" svg:width="0.202cm" svg:height="0.199cm" svg:x="3.515cm" svg:y="5.78cm" svg:viewBox="0 0 203 200" draw:points="0,100 102,200 203,100 102,0"><text:p/></draw:polygon><draw:polygon draw:style-name="gr19" draw:text-style-name="P211" svg:width="0.202cm" svg:height="0.199cm" svg:x="3.14cm" svg:y="5.78cm" svg:viewBox="0 0 203 200" draw:points="0,100 102,200 203,100 102,0"><text:p/></draw:polygon><draw:polygon draw:style-name="gr18" draw:text-style-name="P212" svg:width="0.202cm" svg:height="0.199cm" svg:x="3.14cm" svg:y="5.78cm" svg:viewBox="0 0 203 200" draw:points="0,100 102,200 203,100 102,0"><text:p/></draw:polygon><draw:polygon draw:style-name="gr19" draw:text-style-name="P211" svg:width="0.202cm" svg:height="0.199cm" svg:x="3.328cm" svg:y="5.955cm" svg:viewBox="0 0 203 200" draw:points="0,100 102,200 203,100 102,0"><text:p/></draw:polygon><draw:polygon draw:style-name="gr18" draw:text-style-name="P212" svg:width="0.202cm" svg:height="0.199cm" svg:x="3.328cm" svg:y="5.955cm" svg:viewBox="0 0 203 200" draw:points="0,100 102,200 203,100 102,0"><text:p/></draw:polygon><draw:polygon draw:style-name="gr19" draw:text-style-name="P211" svg:width="0.202cm" svg:height="0.199cm" svg:x="3.889cm" svg:y="5.955cm" svg:viewBox="0 0 203 200" draw:points="0,100 102,200 203,100 102,0"><text:p/></draw:polygon><draw:polygon draw:style-name="gr18" draw:text-style-name="P212" svg:width="0.202cm" svg:height="0.199cm" svg:x="3.889cm" svg:y="5.955cm" svg:viewBox="0 0 203 200" draw:points="0,100 102,200 203,100 102,0"><text:p/></draw:polygon><draw:polygon draw:style-name="gr19" draw:text-style-name="P211" svg:width="0.202cm" svg:height="0.199cm" svg:x="3.515cm" svg:y="5.955cm" svg:viewBox="0 0 203 200" draw:points="0,100 102,200 203,100 102,0"><text:p/></draw:polygon><draw:polygon draw:style-name="gr18" draw:text-style-name="P212" svg:width="0.202cm" svg:height="0.199cm" svg:x="3.515cm" svg:y="5.955cm" svg:viewBox="0 0 203 200" draw:points="0,100 102,200 203,100 102,0"><text:p/></draw:polygon><draw:polygon draw:style-name="gr19" draw:text-style-name="P211" svg:width="0.202cm" svg:height="0.199cm" svg:x="3.889cm" svg:y="6.131cm" svg:viewBox="0 0 203 200" draw:points="0,100 102,200 203,100 102,0"><text:p/></draw:polygon><draw:polygon draw:style-name="gr18" draw:text-style-name="P212" svg:width="0.202cm" svg:height="0.199cm" svg:x="3.889cm" svg:y="6.131cm" svg:viewBox="0 0 203 200" draw:points="0,100 102,200 203,100 102,0"><text:p/></draw:polygon><draw:polygon draw:style-name="gr19" draw:text-style-name="P211" svg:width="0.202cm" svg:height="0.199cm" svg:x="3.515cm" svg:y="5.78cm" svg:viewBox="0 0 203 200" draw:points="0,100 102,200 203,100 102,0"><text:p/></draw:polygon><draw:polygon draw:style-name="gr18" draw:text-style-name="P212" svg:width="0.202cm" svg:height="0.199cm" svg:x="3.515cm" svg:y="5.78cm" svg:viewBox="0 0 203 200" draw:points="0,100 102,200 203,100 102,0"><text:p/></draw:polygon><draw:polygon draw:style-name="gr19" draw:text-style-name="P211" svg:width="0.202cm" svg:height="0.199cm" svg:x="2.58cm" svg:y="6.131cm" svg:viewBox="0 0 203 200" draw:points="0,100 102,200 203,100 102,0"><text:p/></draw:polygon><draw:polygon draw:style-name="gr18" draw:text-style-name="P212" svg:width="0.202cm" svg:height="0.199cm" svg:x="2.58cm" svg:y="6.131cm" svg:viewBox="0 0 203 200" draw:points="0,100 102,200 203,100 102,0"><text:p/></draw:polygon><draw:polygon draw:style-name="gr19" draw:text-style-name="P211" svg:width="0.202cm" svg:height="0.199cm" svg:x="3.889cm" svg:y="5.604cm" svg:viewBox="0 0 203 200" draw:points="0,100 102,200 203,100 102,0"><text:p/></draw:polygon><draw:polygon draw:style-name="gr18" draw:text-style-name="P212" svg:width="0.202cm" svg:height="0.199cm" svg:x="3.889cm" svg:y="5.604cm" svg:viewBox="0 0 203 200" draw:points="0,100 102,200 203,100 102,0"><text:p/></draw:polygon><draw:polygon draw:style-name="gr19" draw:text-style-name="P211" svg:width="0.202cm" svg:height="0.199cm" svg:x="4.263cm" svg:y="6.131cm" svg:viewBox="0 0 203 200" draw:points="0,100 102,200 203,100 102,0"><text:p/></draw:polygon><draw:polygon draw:style-name="gr18" draw:text-style-name="P212" svg:width="0.202cm" svg:height="0.199cm" svg:x="4.263cm" svg:y="6.131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702cm" svg:y="5.78cm" svg:viewBox="0 0 203 200" draw:points="0,100 102,200 203,100 102,0"><text:p/></draw:polygon><draw:polygon draw:style-name="gr18" draw:text-style-name="P212" svg:width="0.202cm" svg:height="0.199cm" svg:x="3.702cm" svg:y="5.78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515cm" svg:y="5.78cm" svg:viewBox="0 0 203 200" draw:points="0,100 102,200 203,100 102,0"><text:p/></draw:polygon><draw:polygon draw:style-name="gr18" draw:text-style-name="P212" svg:width="0.202cm" svg:height="0.199cm" svg:x="3.515cm" svg:y="5.78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2.954cm" svg:y="6.131cm" svg:viewBox="0 0 203 200" draw:points="0,100 102,200 203,100 102,0"><text:p/></draw:polygon><draw:polygon draw:style-name="gr18" draw:text-style-name="P212" svg:width="0.202cm" svg:height="0.199cm" svg:x="2.954cm" svg:y="6.131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14cm" svg:y="5.955cm" svg:viewBox="0 0 203 200" draw:points="0,100 102,200 203,100 102,0"><text:p/></draw:polygon><draw:polygon draw:style-name="gr18" draw:text-style-name="P212" svg:width="0.202cm" svg:height="0.199cm" svg:x="3.14cm" svg:y="5.955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702cm" svg:y="5.429cm" svg:viewBox="0 0 203 200" draw:points="0,100 102,200 203,100 102,0"><text:p/></draw:polygon><draw:polygon draw:style-name="gr18" draw:text-style-name="P212" svg:width="0.202cm" svg:height="0.199cm" svg:x="3.702cm" svg:y="5.429cm" svg:viewBox="0 0 203 200" draw:points="0,100 102,200 203,100 102,0"><text:p/></draw:polygon><draw:polygon draw:style-name="gr19" draw:text-style-name="P211" svg:width="0.202cm" svg:height="0.199cm" svg:x="4.263cm" svg:y="5.78cm" svg:viewBox="0 0 203 200" draw:points="0,100 102,200 203,100 102,0"><text:p/></draw:polygon><draw:polygon draw:style-name="gr18" draw:text-style-name="P212" svg:width="0.202cm" svg:height="0.199cm" svg:x="4.263cm" svg:y="5.78cm" svg:viewBox="0 0 203 200" draw:points="0,100 102,200 203,100 102,0"><text:p/></draw:polygon><draw:polygon draw:style-name="gr19" draw:text-style-name="P211" svg:width="0.202cm" svg:height="0.199cm" svg:x="3.328cm" svg:y="5.955cm" svg:viewBox="0 0 203 200" draw:points="0,100 102,200 203,100 102,0"><text:p/></draw:polygon><draw:polygon draw:style-name="gr18" draw:text-style-name="P212" svg:width="0.202cm" svg:height="0.199cm" svg:x="3.328cm" svg:y="5.955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frame draw:style-name="gr20" draw:text-style-name="P204" svg:width="0.202cm" svg:height="0.408cm" svg:x="0.718cm" svg:y="6.819cm"><draw:text-box><text:p text:style-name="P213"><text:span text:style-name="T194">0</text:span></text:p></draw:text-box></draw:frame><draw:frame draw:style-name="gr21" draw:text-style-name="P204" svg:width="0.2cm" svg:height="0.408cm" svg:x="2.589cm" svg:y="6.819cm"><draw:text-box><text:p text:style-name="P213"><text:span text:style-name="T194">1</text:span></text:p></draw:text-box></draw:frame><draw:frame draw:style-name="gr20" draw:text-style-name="P204" svg:width="0.202cm" svg:height="0.408cm" svg:x="4.457cm" svg:y="6.819cm"><draw:text-box><text:p text:style-name="P213"><text:span text:style-name="T194">2</text:span></text:p></draw:text-box></draw:frame><draw:frame draw:style-name="gr20" draw:text-style-name="P204" svg:width="0.202cm" svg:height="0.408cm" svg:x="6.327cm" svg:y="6.819cm"><draw:text-box><text:p text:style-name="P213"><text:span text:style-name="T194">3</text:span></text:p></draw:text-box></draw:frame><draw:frame draw:style-name="gr21" draw:text-style-name="P204" svg:width="0.2cm" svg:height="0.408cm" svg:x="8.199cm" svg:y="6.819cm"><draw:text-box><text:p text:style-name="P213"><text:span text:style-name="T194">4</text:span></text:p></draw:text-box></draw:frame><draw:frame draw:style-name="gr20" draw:text-style-name="P204" svg:width="0.202cm" svg:height="0.408cm" svg:x="10.065cm" svg:y="6.819cm"><draw:text-box><text:p text:style-name="P213"><text:span text:style-name="T194">5</text:span></text:p></draw:text-box></draw:frame><draw:frame draw:style-name="gr20" draw:text-style-name="P204" svg:width="0.202cm" svg:height="0.408cm" svg:x="11.934cm" svg:y="6.819cm"><draw:text-box><text:p text:style-name="P213"><text:span text:style-name="T194">6</text:span></text:p></draw:text-box></draw:frame><draw:frame draw:style-name="gr21" draw:text-style-name="P204" svg:width="0.2cm" svg:height="0.408cm" svg:x="13.806cm" svg:y="6.819cm"><draw:text-box><text:p text:style-name="P213"><text:span text:style-name="T194">7</text:span></text:p></draw:text-box></draw:frame><draw:frame draw:style-name="gr20" draw:text-style-name="P204" svg:width="0.202cm" svg:height="0.408cm" svg:x="15.674cm" svg:y="6.819cm"><draw:text-box><text:p text:style-name="P213"><text:span text:style-name="T194">8</text:span></text:p></draw:text-box></draw:frame><draw:frame draw:style-name="gr20" draw:text-style-name="P204" svg:width="0.202cm" svg:height="0.408cm" svg:x="0.37cm" svg:y="6.376cm"><draw:text-box><text:p text:style-name="P213"><text:span text:style-name="T194">0</text:span></text:p></draw:text-box></draw:frame><draw:frame draw:style-name="gr20" draw:text-style-name="P204" svg:width="0.202cm" svg:height="0.408cm" svg:x="0.37cm" svg:y="4.621cm"><draw:text-box><text:p text:style-name="P213"><text:span text:style-name="T194">1</text:span></text:p></draw:text-box></draw:frame><draw:frame draw:style-name="gr20" draw:text-style-name="P204" svg:width="0.202cm" svg:height="0.408cm" svg:x="0.37cm" svg:y="2.868cm"><draw:text-box><text:p text:style-name="P213"><text:span text:style-name="T194">2</text:span></text:p></draw:text-box></draw:frame><draw:frame draw:style-name="gr20" draw:text-style-name="P204" svg:width="0.202cm" svg:height="0.408cm" svg:x="0.37cm" svg:y="1.115cm"><draw:text-box><text:p text:style-name="P213"><text:span text:style-name="T194">3</text:span></text:p></draw:text-box></draw:frame><draw:polygon draw:style-name="gr19" draw:text-style-name="P211" svg:width="0.213cm" svg:height="0.21cm" svg:x="16.351cm" svg:y="3.579cm" svg:viewBox="0 0 214 211" draw:points="0,105 107,211 214,105 107,0"><text:p/></draw:polygon><draw:polygon draw:style-name="gr18" draw:text-style-name="P212" svg:width="0.213cm" svg:height="0.21cm" svg:x="16.351cm" svg:y="3.579cm" svg:viewBox="0 0 214 211" draw:points="0,105 107,211 214,105 107,0"><text:p/></draw:polygon><draw:polygon draw:style-name="gr22" draw:text-style-name="P209"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15" draw:text-style-name="P210"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23" draw:text-style-name="P207" svg:width="0.213cm" svg:height="0.21cm" svg:x="16.351cm" svg:y="4.557cm" svg:viewBox="0 0 214 211" draw:points="0,211 214,211 107,0"><text:p/></draw:polygon><draw:polygon draw:style-name="gr12" draw:text-style-name="P208" svg:width="0.213cm" svg:height="0.21cm" svg:x="16.351cm" svg:y="4.557cm" svg:viewBox="0 0 214 211" draw:points="0,211 214,211 107,0"><text:p/></draw:polygon><draw:frame draw:style-name="gr24" draw:text-style-name="P204" svg:width="1.056cm" svg:height="0.408cm" svg:x="16.667cm" svg:y="3.477cm"><draw:text-box><text:p text:style-name="P213"><text:span text:style-name="T194">setosa</text:span></text:p></draw:text-box></draw:frame><draw:frame draw:style-name="gr25" draw:text-style-name="P204" svg:width="1.542cm" svg:height="0.408cm" svg:x="16.667cm" svg:y="3.965cm"><draw:text-box><text:p text:style-name="P213"><text:span text:style-name="T194">versicolor</text:span></text:p></draw:text-box></draw:frame><draw:frame draw:style-name="gr26" draw:text-style-name="P204" svg:width="1.313cm" svg:height="0.408cm" svg:x="16.667cm" svg:y="4.456cm"><draw:text-box><text:p text:style-name="P213"><text:span text:style-name="T194">virginica</text:span></text:p></draw:text-box></draw:frame><draw:g draw:style-name="gr27"><draw:line draw:style-name="gr28" draw:text-style-name="P206" svg:x1="10.213cm" svg:y1="4.002cm" svg:x2="10.482cm" svg:y2="4.252cm"><text:p/></draw:line><draw:line draw:style-name="gr28" draw:text-style-name="P206" svg:x1="10.482cm" svg:y1="4.002cm" svg:x2="10.213cm" svg:y2="4.252cm"><text:p/></draw:line></draw:g></draw:g></text:p>
      <text:p text:style-name="P84">Principe de l’algorithme :</text:p>
      <text:p text:style-name="P83">On vient de trouver un iris dans un champ et on cherche son espèce <text:span text:style-name="T124">en s’appuyant sur notre jeu de données :</text:span></text:p>
      <text:list text:continue-list="list1905859808218" text:style-name="tfPuce">
        <text:list-item>
          <text:p text:style-name="P175">On choisit une valeur de k appropriée (k = le nombre de voisins que l’on va considérer).</text:p>
        </text:list-item>
        <text:list-item>
          <text:p text:style-name="P176"><text:span text:style-name="T122">On calcule les distances entre </text:span>l’iris que l’on a trouvé <text:span text:style-name="T122">et chaque</text:span> iris du jeu de données.</text:p>
        </text:list-item>
        <text:list-item>
          <text:p text:style-name="P168"><text:span text:style-name="T122">O</text:span><text:span text:style-name="T119">n identifie l’espèce majoritaire </text:span><text:span text:style-name="T122">parmi </text:span><text:span text:style-name="T119">les k plus proches voisins de l’iris trouvé.</text:span></text:p>
        </text:list-item>
      </text:list>
      <text:p text:style-name="P83"/>
      <text:p text:style-name="tfTitre_20_non_20_numéroté">Application :</text:p>
      <table:table table:name="Tableau6" table:style-name="Tableau6">
        <table:table-column table:style-name="Tableau6.A" table:number-columns-repeated="3"/>
        <table:table-row>
          <table:table-cell table:style-name="Tableau6.A1" office:value-type="string">
            <text:p text:style-name="P114">Dimensions des pétales</text:p>
          </table:table-cell>
          <table:table-cell table:style-name="Tableau6.A1" office:value-type="string">
            <text:p text:style-name="P114">Espèce si k = 2</text:p>
          </table:table-cell>
          <table:table-cell table:style-name="Tableau6.C1" office:value-type="string">
            <text:p text:style-name="P114">Espèce si k = 5</text:p>
          </table:table-cell>
        </table:table-row>
        <table:table-row>
          <table:table-cell table:style-name="Tableau6.A2" office:value-type="string">
            <text:p text:style-name="P85"><text:span text:style-name="T107">1,5 cm </text:span><text:span text:style-name="T75">× 0,3 cm</text:span></text:p>
          </table:table-cell>
          <table:table-cell table:style-name="Tableau6.A2" office:value-type="string">
            <text:p text:style-name="P93"><draw:control text:anchor-type="as-char" draw:z-index="37" draw:name="Contrôle 51" draw:style-name="gr1" draw:text-style-name="P201" svg:width="4.089cm" svg:height="0.6cm" draw:control="control29"/></text:p>
          </table:table-cell>
          <table:table-cell table:style-name="Tableau6.C2" office:value-type="string">
            <text:p text:style-name="P94"><draw:control text:anchor-type="as-char" draw:z-index="69" draw:name="Contrôle 55" draw:style-name="gr1" draw:text-style-name="P201" svg:width="4.089cm" svg:height="0.6cm" draw:control="control61"/></text:p>
          </table:table-cell>
        </table:table-row>
        <table:table-row>
          <table:table-cell table:style-name="Tableau6.A2" office:value-type="string">
            <text:p text:style-name="P86"><text:span text:style-name="T120">4 </text:span><text:span text:style-name="T107">cm </text:span><text:span text:style-name="T75">× </text:span><text:span text:style-name="T77">1 </text:span><text:span text:style-name="T75">cm</text:span></text:p>
          </table:table-cell>
          <table:table-cell table:style-name="Tableau6.A2" office:value-type="string">
            <text:p text:style-name="P94"><draw:control text:anchor-type="as-char" draw:z-index="66" draw:name="Contrôle 52" draw:style-name="gr1" draw:text-style-name="P201" svg:width="4.089cm" svg:height="0.6cm" draw:control="control58"/></text:p>
          </table:table-cell>
          <table:table-cell table:style-name="Tableau6.C2" office:value-type="string">
            <text:p text:style-name="P94"><draw:control text:anchor-type="as-char" draw:z-index="70" draw:name="Contrôle 56" draw:style-name="gr1" draw:text-style-name="P201" svg:width="4.089cm" svg:height="0.6cm" draw:control="control62"/></text:p>
          </table:table-cell>
        </table:table-row>
        <table:table-row>
          <table:table-cell table:style-name="Tableau6.A2" office:value-type="string">
            <text:p text:style-name="P87"><text:span text:style-name="T124">7</text:span><text:span text:style-name="T120"> </text:span><text:span text:style-name="T107">cm </text:span><text:span text:style-name="T75">× </text:span><text:span text:style-name="T79">2</text:span><text:span text:style-name="T77"> </text:span><text:span text:style-name="T75">cm</text:span></text:p>
          </table:table-cell>
          <table:table-cell table:style-name="Tableau6.A2" office:value-type="string">
            <text:p text:style-name="P94"><draw:control text:anchor-type="as-char" draw:z-index="67" draw:name="Contrôle 53" draw:style-name="gr1" draw:text-style-name="P201" svg:width="4.089cm" svg:height="0.6cm" draw:control="control59"/></text:p>
          </table:table-cell>
          <table:table-cell table:style-name="Tableau6.C2" office:value-type="string">
            <text:p text:style-name="P94"><draw:control text:anchor-type="as-char" draw:z-index="71" draw:name="Contrôle 57" draw:style-name="gr1" draw:text-style-name="P201" svg:width="4.089cm" svg:height="0.6cm" draw:control="control63"/></text:p>
          </table:table-cell>
        </table:table-row>
        <table:table-row>
          <table:table-cell table:style-name="Tableau6.A2" office:value-type="string">
            <text:p text:style-name="P86"><text:span text:style-name="T77">iris </text:span><text:span text:style-name="T76">symbolisé par une croix </text:span><text:span text:style-name="T78">orange</text:span></text:p>
          </table:table-cell>
          <table:table-cell table:style-name="Tableau6.A2" office:value-type="string">
            <text:p text:style-name="P94"><draw:control text:anchor-type="as-char" draw:z-index="68" draw:name="Contrôle 54" draw:style-name="gr1" draw:text-style-name="P201" svg:width="4.089cm" svg:height="0.6cm" draw:control="control60"/></text:p>
          </table:table-cell>
          <table:table-cell table:style-name="Tableau6.C2" office:value-type="string">
            <text:p text:style-name="P94"><draw:control text:anchor-type="as-char" draw:z-index="72" draw:name="Contrôle 58" draw:style-name="gr1" draw:text-style-name="P201" svg:width="4.089cm" svg:height="0.6cm" draw:control="control64"/></text:p>
          </table:table-cell>
        </table:table-row>
      </table:table>
      <text:p text:style-name="P148"><text:soft-page-break/>Remarques :</text:p>
      <text:list text:continue-numbering="true" text:style-name="tfPuce">
        <text:list-item>
          <text:p text:style-name="P169"><text:span text:style-name="T124">Pour calculer les distances, nous avons</text:span><text:span text:style-name="T109"> </text:span><text:span text:style-name="T122">utilis</text:span><text:span text:style-name="T124">é</text:span><text:span text:style-name="T109"> ici la distance euclidienne : </text:span><text:span text:style-name="T109"><draw:frame draw:style-name="fr2" draw:name="Objet1" text:anchor-type="as-char" svg:y="-0.483cm" svg:width="3.692cm" svg:height="0.646cm" draw:z-index="8"><draw:object xlink:href="./Object 1" xlink:type="simple" xlink:show="embed" xlink:actuate="onLoad"/><draw:image xlink:href="./ObjectReplacements/Object 1" xlink:type="simple" xlink:show="embed" xlink:actuate="onLoad"/></draw:frame></text:span><text:span text:style-name="T109">.<text:line-break/></text:span><text:span text:style-name="T124">Rappel, pour visualiser </text:span><text:span text:style-name="T125">une </text:span><text:span text:style-name="T124">distance </text:span><text:span text:style-name="T125">euclidienne </text:span><text:span text:style-name="T124">sur un graphique,</text:span><text:span text:style-name="T121"> le repère </text:span><text:span text:style-name="T124">d</text:span><text:span text:style-name="T121">oit </text:span><text:span text:style-name="T124">être </text:span><text:span text:style-name="T121">orthonormé !</text:span></text:p>
        </text:list-item>
        <text:list-item>
          <text:p text:style-name="P169"><text:span text:style-name="T125">Selon les </text:span><text:span text:style-name="T126">situations</text:span><text:span text:style-name="T125">, on peut aussi utiliser d’autres types de distances : Manhattan, Hamming,...</text:span></text:p>
        </text:list-item>
        <text:list-item>
          <text:p text:style-name="P177">Le choix de k (nombre de voisins retenus) se fait souvent <text:span text:style-name="T121">empiriquement </text:span>en testant plusieurs valeurs.</text:p>
        </text:list-item>
      </text:list>
      <text:p text:style-name="P82"/>
      <text:p text:style-name="P82"/>
      <text:p text:style-name="tfTitre_20_non_20_numéroté"><text:span text:style-name="T112">Exercices</text:span> :</text:p>
      <text:p text:style-name="P124"><text:span text:style-name="T122">1) </text:span>Écrire<text:span text:style-name="T108"> un script </text:span><text:span text:style-name="T123">Python </text:span><text:span text:style-name="T108">qui :</text:span></text:p>
      <text:list text:continue-numbering="true" text:style-name="tfPuce">
        <text:list-item>
          <text:p text:style-name="P178">demande à l’utilisateur la longueur et la largeur d’un nouveau pétale d’iris.</text:p>
        </text:list-item>
        <text:list-item>
          <text:p text:style-name="P169"><text:span text:style-name="T126">crée </text:span><text:span text:style-name="T133">la</text:span><text:span text:style-name="T126"> liste des iris du jeu de données « </text:span><text:span text:style-name="T133">iris.csv »</text:span><text:span text:style-name="T126">. C</text:span><text:span text:style-name="T133">haque iris sera représenté par une</text:span><text:span text:style-name="T126"> sous-liste </text:span><text:span text:style-name="T108">de la forme : [distance </text:span><text:span text:style-name="T132">euclidienne </text:span><text:span text:style-name="T109">entre </text:span><text:span text:style-name="T132">le pétale de</text:span><text:span text:style-name="T109"> l’iris et le nouveau pétale, </text:span><text:span text:style-name="T122">longueur du pétale </text:span><text:span text:style-name="T133">de l’iris</text:span><text:span text:style-name="T122">, largeur du pétale </text:span><text:span text:style-name="T133">de l’iris</text:span><text:span text:style-name="T122">, espèce </text:span><text:span text:style-name="T133">de l’iris</text:span><text:span text:style-name="T122">].</text:span></text:p>
        </text:list-item>
        <text:list-item>
          <text:p text:style-name="P179">trie cette liste de liste selon les distances entre le nouvel iris et les iris du jeu de données.</text:p>
        </text:list-item>
        <text:list-item>
          <text:p text:style-name="P179">A<text:span text:style-name="T134">ffiche les </text:span>espèce<text:span text:style-name="T134">s</text:span> d<text:span text:style-name="T134">es 5 plus proches voisins d</text:span>u nouvel iris.</text:p>
        </text:list-item>
      </text:list>
      <text:p text:style-name="P73"/>
      <text:p text:style-name="P73"/>
      <text:p text:style-name="P81"><text:span text:style-name="T132">2</text:span><text:span text:style-name="T125">) Utiliser </text:span><text:span text:style-name="T128">l’</text:span><text:span text:style-name="T125">algorithme des k plus proches voisins pour </text:span><text:span text:style-name="T131">aider le choixpeau magique de Poudlard à déterminer la maison d’Hermione</text:span><text:span text:style-name="T125">.</text:span></text:p>
      <text:list xml:id="list1907280635775" text:continue-numbering="true" text:style-name="tfPuce">
        <text:list-item>
          <text:p text:style-name="P170"><text:span text:style-name="T132">J</text:span><text:span text:style-name="T129">eu de données : </text:span><text:span text:style-name="T127">« choixpeau-magique.csv ».</text:span></text:p>
        </text:list-item>
        <text:list-item>
          <text:p text:style-name="P171"><text:span text:style-name="T131">Hermione a pour caractéristiques : </text:span><text:span text:style-name="T132">Courage=8, Loyauté=6, Sagesse=6, Malice=6.</text:span></text:p>
        </text:list-item>
        <text:list-item>
          <text:p text:style-name="P180">k = 7</text:p>
        </text:list-item>
        <text:list-item>
          <text:p text:style-name="P180">Distance utilisée : Manhattan <text:span text:style-name="T144">(faites une recherche sur le web pour savoir de quoi il s’agit ;-)</text:span></text:p>
        </text:list-item>
      </text:list>
      <text:p text:style-name="P97"/>
      <text:p text:style-name="P97"/>
      <text:p text:style-name="P96"><text:span text:style-name="T132">3</text:span><text:span text:style-name="T125">) Utiliser </text:span><text:span text:style-name="T128">l’</text:span><text:span text:style-name="T125">algorithme des k plus proches voisins </text:span><text:span text:style-name="T130">pour</text:span><text:span text:style-name="T125"> décider si un texte est écrit en français ou en anglais.</text:span></text:p>
      <text:p text:style-name="P96"><text:span text:style-name="T130">On s’appuiera pour cela sur le fait que </text:span><text:span text:style-name="T125">la fréquence des « h » et </text:span><text:span text:style-name="T127">celle </text:span><text:span text:style-name="T125">des « y » </text:span><text:span text:style-name="T129">sont assez différentes dans les deux langues </text:span><text:span text:style-name="T130">et on</text:span><text:span text:style-name="T125"> créer</text:span><text:span text:style-name="T130">a</text:span><text:span text:style-name="T125"> un jeu de données en analysant </text:span><text:span text:style-name="T130">ces fréquences dans </text:span><text:span text:style-name="T129">quelques</text:span><text:span text:style-name="T125"> textes des deux langues.</text:span></text:p>
      <text:p text:style-name="P95"/>
      <text:list text:continue-list="list1907523340233" text:style-name="tfNum_20_I_29_">
        <text:list-item>
          <text:p text:style-name="P191">Algorithmes gloutons</text:p>
        </text:list-item>
      </text:list>
      <text:list xml:id="list1906605150188" text:continue-list="list1906915305982" text:style-name="tfNum_20_1_29_">
        <text:list-item text:start-value="1">
          <text:p text:style-name="tfTitre_20_1_29_">Problèmes d’optimisation</text:p>
        </text:list-item>
      </text:list>
      <text:p text:style-name="P73">Un <text:span text:style-name="T1">problème d'optimisation</text:span> est un problème <text:span text:style-name="T135">dont la difficulté n’est pas de trouver des solutions </text:span><text:span text:style-name="T141">mais plutôt</text:span><text:span text:style-name="T135"> de trouver la « meilleure » </text:span><text:span text:style-name="T141">solution</text:span><text:span text:style-name="T135">.</text:span></text:p>
      <text:p text:style-name="P73"/>
      <text:p text:style-name="P149"><text:span text:style-name="T145">E</text:span>xemples :</text:p>
      <text:list xml:id="list1906678847278" text:continue-list="list1907280635775" text:style-name="tfPuce">
        <text:list-item>
          <text:p text:style-name="P172">Rendre la monnaie avec un minimum de pièces.</text:p>
        </text:list-item>
        <text:list-item>
          <text:p text:style-name="P181">Mettre le plus de livres <text:span text:style-name="T137">possible </text:span>dans un carton.</text:p>
        </text:list-item>
        <text:list-item>
          <text:p text:style-name="P173"><text:span text:style-name="T135">Trouver la route la plus </text:span><text:span text:style-name="T138">rapide</text:span><text:span text:style-name="T135"> entre deux villes.</text:span></text:p>
        </text:list-item>
      </text:list>
      <text:p text:style-name="P120"/>
      <text:p text:style-name="P120"/>
      <text:list xml:id="list1906904046855" text:continue-list="list1906605150188" text:style-name="tfNum_20_1_29_">
        <text:list-item>
          <text:p text:style-name="tfTitre_20_1_29_">Algorithmes glouton</text:p>
        </text:list-item>
      </text:list>
      <text:p text:style-name="Standard"><text:span text:style-name="T135">Pour résoudre un problème </text:span><text:span text:style-name="T136">d’optimisation</text:span><text:span text:style-name="T135">, on peut </text:span><text:span text:style-name="T145">c</text:span><text:span text:style-name="T135">hercher toutes les solutions, puis définir ensuite la meilleure.</text:span></text:p>
      <text:p text:style-name="P125"><text:span text:style-name="T135">Malheureusement, dans certains cas, trouver toutes les solutions </text:span><text:span text:style-name="T139">peut être très</text:span><text:span text:style-name="T136"> long, même pour un ordinateur !</text:span></text:p>
      <text:p text:style-name="P121"><text:span text:style-name="T145">On peut alors essayer d’utiliser</text:span><text:span text:style-name="T139"> un </text:span><text:span text:style-name="T10">algorithme glouton</text:span><text:span text:style-name="T139"> </text:span><text:span text:style-name="T145">qui va</text:span><text:span text:style-name="T143"> </text:span>proc<text:span text:style-name="T143">é</text:span>de<text:span text:style-name="T143">r</text:span> étape par étape, en faisant à chaque étape le meilleur choix possible <text:span text:style-name="T141">à ce moment là</text:span>.</text:p>
      <text:p text:style-name="P120"/>
      <text:p text:style-name="P149">Remarques :</text:p>
      <text:list text:continue-list="list1906678847278" text:style-name="tfPuce">
        <text:list-item>
          <text:p text:style-name="P174"><text:span text:style-name="T142">Le gros intérêt des</text:span><text:span text:style-name="T139"> algorithmes gloutons </text:span><text:span text:style-name="T142">est qu’ils s</text:span><text:span text:style-name="T139">ont </text:span><text:span text:style-name="T140">beaucoup plus</text:span><text:span text:style-name="T139"> rapide</text:span><text:span text:style-name="T140">s que</text:span><text:span text:style-name="T139"> la </text:span><text:span text:style-name="T145">recherche de toutes les solutions</text:span><text:span text:style-name="T139">.</text:span></text:p>
        </text:list-item>
        <text:list-item>
          <text:p text:style-name="P182">En revanche, o<text:span text:style-name="T139">n verra ci-dessous qu’un algorithme glouton </text:span><text:span text:style-name="T142">ne trouve pas toujours la meilleure des solutions et même parfois ne </text:span><text:span text:style-name="T178">trouve </text:span><text:span text:style-name="T142">pas de </text:span>solution <text:span text:style-name="T144">du tout </text:span>alors qu’il en existe !</text:p>
        </text:list-item>
      </text:list>
      <text:p text:style-name="P123"/>
      <text:p text:style-name="P123"/>
      <text:list xml:id="list1907433827796" text:continue-list="list1906904046855" text:style-name="tfNum_20_1_29_">
        <text:list-item>
          <text:p text:style-name="P187">Le rendu de monnaie</text:p>
        </text:list-item>
      </text:list>
      <text:p text:style-name="P122"><text:span text:style-name="T137">Commençons par un </text:span><text:span text:style-name="T142">grand</text:span><text:span text:style-name="T137"> classique : Comment rendre la monnaie avec un nombre minimal de pièces.</text:span></text:p>
      <text:p text:style-name="Standard"/>
      <text:list text:style-name="tfNum_20_a_29_">
        <text:list-item>
          <text:p text:style-name="P193"><text:span text:style-name="T149">Système de monnaie </text:span><text:span text:style-name="T113">habituel</text:span></text:p>
        </text:list-item>
      </text:list>
      <text:p text:style-name="P129"><text:span text:style-name="T141">On </text:span><text:span text:style-name="T142">doit rendre 16</text:span><text:span text:style-name="T148">2</text:span><text:span text:style-name="T142"> euros </text:span><text:span text:style-name="T153">en utilisant les</text:span><text:span text:style-name="T142"> pièces suivantes en nombre illimité :</text:span><text:span text:style-name="T137"> </text:span><text:span text:style-name="T144">100 ; 50 ; 20 ; </text:span><text:span text:style-name="T137">1</text:span><text:span text:style-name="T144">0</text:span><text:span text:style-name="T137"> ; </text:span><text:span text:style-name="T144">5</text:span><text:span text:style-name="T137"> ; </text:span><text:span text:style-name="T144">2</text:span><text:span text:style-name="T137"> ; 1 </text:span><text:span text:style-name="T144">€</text:span><text:span text:style-name="T142">.</text:span></text:p>
      <table:table table:name="Tableau7" table:style-name="Tableau7">
        <table:table-column table:style-name="Tableau7.A"/>
        <table:table-column table:style-name="Tableau7.B" table:number-columns-repeated="2"/>
        <table:table-row>
          <table:table-cell table:style-name="Tableau7.A1" office:value-type="string">
            <text:p text:style-name="P137"/>
          </table:table-cell>
          <table:table-cell table:style-name="Tableau7.A1" office:value-type="string">
            <text:p text:style-name="P138">Somme restant à rendre</text:p>
          </table:table-cell>
          <table:table-cell table:style-name="Tableau7.C1" office:value-type="string">
            <text:p text:style-name="P137">Pièces rendues</text:p>
          </table:table-cell>
        </table:table-row>
        <table:table-row>
          <table:table-cell table:style-name="Tableau7.A2" office:value-type="string">
            <text:p text:style-name="P137">Étape 0</text:p>
          </table:table-cell>
          <table:table-cell table:style-name="Tableau7.A2" office:value-type="string">
            <text:p text:style-name="P91"><text:span text:style-name="T143">16</text:span><text:span text:style-name="T148">2</text:span></text:p>
          </table:table-cell>
          <table:table-cell table:style-name="Tableau7.C2" office:value-type="string">
            <text:p text:style-name="P137">aucune</text:p>
          </table:table-cell>
        </table:table-row>
        <table:table-row>
          <table:table-cell table:style-name="Tableau7.A2" office:value-type="string">
            <text:p text:style-name="P137">Étape 1</text:p>
          </table:table-cell>
          <table:table-cell table:style-name="Tableau7.A2" office:value-type="string">
            <text:p text:style-name="P91"><text:span text:style-name="T143">6</text:span><text:span text:style-name="T148">2</text:span></text:p>
          </table:table-cell>
          <table:table-cell table:style-name="Tableau7.C2" office:value-type="string">
            <text:p text:style-name="P137">100</text:p>
          </table:table-cell>
        </table:table-row>
        <table:table-row>
          <table:table-cell table:style-name="Tableau7.A2" office:value-type="string">
            <text:p text:style-name="P137">Étape 2</text:p>
          </table:table-cell>
          <table:table-cell table:style-name="Tableau7.A2" office:value-type="string">
            <text:p text:style-name="P88">1<text:span text:style-name="T148">2</text:span></text:p>
          </table:table-cell>
          <table:table-cell table:style-name="Tableau7.C2" office:value-type="string">
            <text:p text:style-name="P137">100 ; 50</text:p>
          </table:table-cell>
        </table:table-row>
        <table:table-row>
          <table:table-cell table:style-name="Tableau7.A2" office:value-type="string">
            <text:p text:style-name="P137">Étape 3</text:p>
          </table:table-cell>
          <table:table-cell table:style-name="Tableau7.A2" office:value-type="string">
            <text:p text:style-name="P140">2</text:p>
          </table:table-cell>
          <table:table-cell table:style-name="Tableau7.C2" office:value-type="string">
            <text:p text:style-name="P137">100 ; 50 ; 10</text:p>
          </table:table-cell>
        </table:table-row>
        <table:table-row>
          <table:table-cell table:style-name="Tableau7.A2" office:value-type="string">
            <text:p text:style-name="P137">Étape 4</text:p>
          </table:table-cell>
          <table:table-cell table:style-name="Tableau7.A2" office:value-type="string">
            <text:p text:style-name="P138">0</text:p>
          </table:table-cell>
          <table:table-cell table:style-name="Tableau7.C2" office:value-type="string">
            <text:p text:style-name="P139"><text:span text:style-name="T143">100 ; 50 ; 10 ; </text:span><text:span text:style-name="T148">2</text:span></text:p>
          </table:table-cell>
        </table:table-row>
      </table:table>
      <text:p text:style-name="P126">Le principe est simple : à chaque étape, on rend la pièce la plus grosse possible et notre système de monnaie est fait de telle sorte que cet algorithme donnera toujours la meilleure solution.</text:p>
      <text:p text:style-name="Standard"/>
      <text:list text:continue-numbering="true" text:style-name="tfNum_20_a_29_">
        <text:list-item>
          <text:p text:style-name="P194">Système de monnaie exotique</text:p>
        </text:list-item>
      </text:list>
      <text:p text:style-name="P129"><text:span text:style-name="T141">On </text:span><text:span text:style-name="T142">doit rendre 16</text:span><text:span text:style-name="T148">2</text:span><text:span text:style-name="T142"> euros </text:span><text:span text:style-name="T153">en utilisant</text:span><text:span text:style-name="T142"> </text:span><text:span text:style-name="T146">maintenant </text:span><text:span text:style-name="T153">l</text:span><text:span text:style-name="T142">es pièces suivantes en nombre illimité :</text:span><text:span text:style-name="T137"> </text:span><text:span text:style-name="T144">50 ; </text:span><text:span text:style-name="T147">4</text:span><text:span text:style-name="T144">0 ; </text:span><text:span text:style-name="T152">3 ; </text:span><text:span text:style-name="T144">2</text:span><text:span text:style-name="T137"> </text:span><text:span text:style-name="T144">€</text:span><text:span text:style-name="T142">.</text:span></text:p>
      <text:p text:style-name="P160"><text:span text:style-name="T148">En </text:span><text:span text:style-name="T153">appliqu</text:span><text:span text:style-name="T148">ant le même algorithme que ci-dessus, combien de pièces devra-t-on rendre ? </text:span><text:span text:style-name="T148"><draw:control text:anchor-type="as-char" draw:z-index="42" draw:name="Contrôle 63" draw:style-name="gr1" draw:text-style-name="P200" svg:width="4.091cm" svg:height="0.701cm" draw:control="control34"/></text:span></text:p>
      <text:p text:style-name="P160"><text:span text:style-name="T148">Peut-on trouver une solution </text:span><text:span text:style-name="T149">permettant de ne rendre que </text:span><text:span text:style-name="T148">5 pièces ? </text:span><text:span text:style-name="T148"><draw:control text:anchor-type="as-char" draw:z-index="43" draw:name="Contrôle 64" draw:style-name="gr1" draw:text-style-name="P200" svg:width="4.091cm" svg:height="0.701cm" draw:control="control35"/></text:span></text:p>
      <text:p text:style-name="P127">Avec ce nouveau système de monnaie, nous voyons que l’algorithme glouton permet de trouver une solution <text:span text:style-name="T153">pour 162 euros </text:span>mais celle-ci n’est pas optimale.</text:p>
      <text:p text:style-name="P130"><text:span text:style-name="T152">De même cet algorithme n’aurait pas permis de rendre 16</text:span><text:span text:style-name="T170">0</text:span><text:span text:style-name="T152"> euros alors que </text:span><text:span text:style-name="T153">16</text:span><text:span text:style-name="T170">0</text:span><text:span text:style-name="T153"> = </text:span><text:span text:style-name="T170">4</text:span><text:span text:style-name="T153">0 + </text:span><text:span text:style-name="T170">4</text:span><text:span text:style-name="T153">0 + </text:span><text:span text:style-name="T170">4</text:span><text:span text:style-name="T153">0 + </text:span><text:span text:style-name="T170">40</text:span><text:span text:style-name="T152">.</text:span></text:p>
      <text:p text:style-name="Standard"/>
      <text:list text:continue-numbering="true" text:style-name="tfNum_20_a_29_">
        <text:list-item>
          <text:p text:style-name="tfTitre_20_a_29_"><text:span text:style-name="T37">Cod</text:span><text:span text:style-name="T53">e </text:span><text:span text:style-name="T34">(à compléter)</text:span><text:span text:style-name="T171"> </text:span></text:p>
        </text:list-item>
      </text:list>
      <text:p text:style-name="P146">def rendu_glouton(somme_à_rendre, monnaie):</text:p>
      <text:p text:style-name="P146"><text:s text:c="4"/>"""</text:p>
      <text:p text:style-name="P146"><text:s text:c="4"/>Paramètres :</text:p>
      <text:p text:style-name="P146"><text:s text:c="8"/>somme_à_rendre : int</text:p>
      <text:p text:style-name="P146"><text:s text:c="8"/>monnaie : tuple ou list trié dans l'ordre décroissant</text:p>
      <text:p text:style-name="P146"><text:s text:c="4"/>Valeur renvoyée :</text:p>
      <text:p text:style-name="P151"><text:s text:c="8"/>liste_pièces_à_rendre : list </text:p>
      <text:p text:style-name="P165"><text:s text:c="8"/>(renvoie une liste vide dans le cas où l’algorithme ne trouve pas de solution)</text:p>
      <text:p text:style-name="P146"><text:s text:c="4"/>"""</text:p>
      <text:p text:style-name="P66"><text:s text:c="4"/>liste_pièces_à_rendre <text:span text:style-name="T174">= []</text:span></text:p>
      <text:p text:style-name="P66"><text:s text:c="4"/><draw:control text:anchor-type="as-char" draw:z-index="38" draw:name="Contrôle 59" draw:style-name="gr1" draw:text-style-name="P199" svg:width="9.961cm" svg:height="0.701cm" draw:control="control30"/></text:p>
      <text:p text:style-name="P66"><text:s text:c="8"/><draw:control text:anchor-type="as-char" draw:z-index="39" draw:name="Contrôle 60" draw:style-name="gr1" draw:text-style-name="P199" svg:width="9.961cm" svg:height="0.701cm" draw:control="control31"/></text:p>
      <text:p text:style-name="P66"><text:s text:c="12"/><draw:control text:anchor-type="as-char" draw:z-index="40" draw:name="Contrôle 61" draw:style-name="gr1" draw:text-style-name="P199" svg:width="9.961cm" svg:height="0.701cm" draw:control="control32"/></text:p>
      <text:p text:style-name="P66"><text:s text:c="12"/><draw:control text:anchor-type="as-char" draw:z-index="41" draw:name="Contrôle 62" draw:style-name="gr1" draw:text-style-name="P199" svg:width="9.961cm" svg:height="0.701cm" draw:control="control33"/></text:p>
      <text:p text:style-name="P70"><text:s text:c="4"/><text:span text:style-name="T177">if somme_à_rendre == 0:</text:span></text:p>
      <text:p text:style-name="P67"><text:s text:c="8"/>return liste_pièces_à_rendre</text:p>
      <text:p text:style-name="P70"><text:s text:c="4"/><draw:control text:anchor-type="as-char" draw:z-index="88" draw:name="Contrôle 80" draw:style-name="gr1" draw:text-style-name="P199" svg:width="9.961cm" svg:height="0.701cm" draw:control="control80"/></text:p>
      <text:p text:style-name="P70"><text:s text:c="8"/><draw:control text:anchor-type="as-char" draw:z-index="89" draw:name="Contrôle 81" draw:style-name="gr1" draw:text-style-name="P199" svg:width="9.961cm" svg:height="0.701cm" draw:control="control81"/></text:p>
      <text:p text:style-name="P70"/>
      <text:p text:style-name="P146">assert rendu_glouton(162, (100, 50, 20, 10, 5, 2, 1)) == [100, 50, 10, 2]</text:p>
      <text:p text:style-name="P146">assert rendu_glouton(162, (50, 20, 10, 5, 2, 1)) == [50, 50, 50, 10, 2]</text:p>
      <text:p text:style-name="P146">assert rendu_glouton(162, (50, 40, <text:span text:style-name="T152">3, </text:span>2)) == [50, 50, 50, <text:span text:style-name="T27">3</text:span>, <text:span text:style-name="T27">3</text:span>, <text:span text:style-name="T27">3</text:span>, <text:span text:style-name="T27">3</text:span>]</text:p>
      <text:p text:style-name="P151">assert rendu_glouton(16<text:span text:style-name="T170">0</text:span>, (50, 40, <text:span text:style-name="T152">3, </text:span>2)) == []</text:p>
      <text:p text:style-name="P100"/>
      <text:list xml:id="list1906029740183" text:continue-numbering="true" text:style-name="tfNum_20_a_29_">
        <text:list-item>
          <text:p text:style-name="P195"><text:soft-page-break/>Conclusion</text:p>
        </text:list-item>
      </text:list>
      <text:p text:style-name="P131"><text:span text:style-name="T154">Si on veut dénombrer toutes les façons de rendre la monnaie pour choisir ensuite la meilleure, </text:span><text:span text:style-name="T155">on trouve déjà plus de </text:span><text:span text:style-name="T154">30 000 </text:span><text:span text:style-name="T155">possibilités </text:span><text:span text:style-name="T154">dans le cas </text:span><text:span text:style-name="T155">a</text:span><text:span text:style-name="T154">)</text:span><text:span text:style-name="T155"> !</text:span></text:p>
      <text:p text:style-name="P150">Certes notre algorithme glouton n’est optimal que si le système de monnaie est bien conçu mais il a quand même l’avantage de nous conduire <text:span text:style-name="T177">rapidement </text:span>à une solution <text:span text:style-name="T177">satisfaisante</text:span> !</text:p>
      <text:list text:continue-list="list1907433827796" text:style-name="tfNum_20_1_29_">
        <text:list-item>
          <text:p text:style-name="P188">Le problème du sac à dos</text:p>
        </text:list-item>
      </text:list>
      <text:p text:style-name="P128">Autre grand classique !</text:p>
      <text:p text:style-name="P133"><text:span text:style-name="T158">Vos parents vous envoient acheter ce qu’il faut pour l’apéritif. Vous avez le droit aux </text:span><text:span text:style-name="T164">article</text:span><text:span text:style-name="T158">s ci-dessous avec deux contraintes : Vous n’avez pas le droit de choisir deux fois le même </text:span><text:span text:style-name="T164">article</text:span><text:span text:style-name="T158"> et tout doit tenir dans un sac </text:span><text:span text:style-name="T175">ridicule</text:span><text:span text:style-name="T158"> </text:span><text:span text:style-name="T156">qui contient au maximum </text:span><text:span text:style-name="T165">6</text:span><text:span text:style-name="T163">00 g !</text:span></text:p>
      <text:p text:style-name="P133"><text:span text:style-name="T156">Qu’</text:span><text:span text:style-name="T158">allez vous choisir pour maximiser le prix </text:span><text:span text:style-name="T169">du contenu du sac à dos </text:span><text:span text:style-name="T158">sans dépasser la </text:span><text:span text:style-name="T163">masse autorisée</text:span><text:span text:style-name="T156"> ?</text:span></text:p>
      <text:p text:style-name="P101"/>
      <table:table table:name="Tableau9" table:style-name="Tableau9">
        <table:table-column table:style-name="Tableau9.A" table:number-columns-repeated="5"/>
        <table:table-column table:style-name="Tableau9.F"/>
        <table:table-row>
          <table:table-cell table:style-name="Tableau9.A1" office:value-type="string">
            <text:p text:style-name="P145">Article</text:p>
          </table:table-cell>
          <table:table-cell table:style-name="Tableau9.A1" office:value-type="string">
            <text:p text:style-name="P92"><text:span text:style-name="T157">C</text:span><text:span text:style-name="T161">hips </text:span><text:span text:style-name="T162">bio</text:span></text:p>
          </table:table-cell>
          <table:table-cell table:style-name="Tableau9.A1" office:value-type="string">
            <text:p text:style-name="P141">Pistaches</text:p>
          </table:table-cell>
          <table:table-cell table:style-name="Tableau9.A1" office:value-type="string">
            <text:p text:style-name="P141">Curly</text:p>
          </table:table-cell>
          <table:table-cell table:style-name="Tableau9.A1" office:value-type="string">
            <text:p text:style-name="P141">Noix de pécan</text:p>
          </table:table-cell>
          <table:table-cell table:style-name="Tableau9.F1" office:value-type="string">
            <text:p text:style-name="P142">Saucisson</text:p>
          </table:table-cell>
        </table:table-row>
        <table:table-row>
          <table:table-cell table:style-name="Tableau9.A2" office:value-type="string">
            <text:p text:style-name="P132">Masse (g)</text:p>
          </table:table-cell>
          <table:table-cell table:style-name="Tableau9.A2" office:value-type="string">
            <text:p text:style-name="P92"><text:span text:style-name="T161">1</text:span><text:span text:style-name="T157">00</text:span></text:p>
          </table:table-cell>
          <table:table-cell table:style-name="Tableau9.A2" office:value-type="string">
            <text:p text:style-name="P141">300</text:p>
          </table:table-cell>
          <table:table-cell table:style-name="Tableau9.A2" office:value-type="string">
            <text:p text:style-name="P92"><text:span text:style-name="T172">1</text:span><text:span text:style-name="T162">0</text:span><text:span text:style-name="T157">0</text:span></text:p>
          </table:table-cell>
          <table:table-cell table:style-name="Tableau9.A2" office:value-type="string">
            <text:p text:style-name="P141">100</text:p>
          </table:table-cell>
          <table:table-cell table:style-name="Tableau9.F2" office:value-type="string">
            <text:p text:style-name="P142">300</text:p>
          </table:table-cell>
        </table:table-row>
        <table:table-row>
          <table:table-cell table:style-name="Tableau9.A2" office:value-type="string">
            <text:p text:style-name="P132">Valeur (€)</text:p>
          </table:table-cell>
          <table:table-cell table:style-name="Tableau9.A2" office:value-type="string">
            <text:p text:style-name="P143">2,4</text:p>
          </table:table-cell>
          <table:table-cell table:style-name="Tableau9.A2" office:value-type="string">
            <text:p text:style-name="P141">4,55</text:p>
          </table:table-cell>
          <table:table-cell table:style-name="Tableau9.A2" office:value-type="string">
            <text:p text:style-name="P92"><text:span text:style-name="T172">1</text:span><text:span text:style-name="T157">,</text:span><text:span text:style-name="T172">3</text:span><text:span text:style-name="T157">0</text:span></text:p>
          </table:table-cell>
          <table:table-cell table:style-name="Tableau9.A2" office:value-type="string">
            <text:p text:style-name="P141">3,80</text:p>
          </table:table-cell>
          <table:table-cell table:style-name="Tableau9.F2" office:value-type="string">
            <text:p text:style-name="P142">6,25</text:p>
          </table:table-cell>
        </table:table-row>
        <table:table-row>
          <table:table-cell table:style-name="Tableau9.A2" office:value-type="string">
            <text:p text:style-name="P143">Valeur/Masse</text:p>
          </table:table-cell>
          <table:table-cell table:style-name="Tableau9.B4" office:value-type="float" office:value="0.024">
            <text:p text:style-name="P88"><text:span text:style-name="T150">0,0</text:span><text:span text:style-name="T151">2</text:span><text:span text:style-name="T150">4</text:span></text:p>
          </table:table-cell>
          <table:table-cell table:style-name="Tableau9.B4" office:value-type="float" office:value="0.0151666666666667">
            <text:p text:style-name="P144">0,015</text:p>
          </table:table-cell>
          <table:table-cell table:style-name="Tableau9.B4" office:value-type="float" office:value="0.0133333333333333">
            <text:p text:style-name="P144">0,013</text:p>
          </table:table-cell>
          <table:table-cell table:style-name="Tableau9.B4" office:value-type="float" office:value="0.038">
            <text:p text:style-name="P144">0,038</text:p>
          </table:table-cell>
          <table:table-cell table:style-name="Tableau9.F4" office:value-type="float" office:value="0.0208333333333333">
            <text:p text:style-name="P144">0,021</text:p>
          </table:table-cell>
        </table:table-row>
      </table:table>
      <text:p text:style-name="P102"/>
      <text:list text:continue-list="list1906029740183" text:style-name="tfNum_20_a_29_">
        <text:list-item text:start-value="1">
          <text:p text:style-name="P196"><text:span text:style-name="T159">Premier </text:span><text:span text:style-name="T115">essai</text:span><text:span text:style-name="T159"> :</text:span></text:p>
        </text:list-item>
      </text:list>
      <text:p text:style-name="P162">Vous décidez de choisir en premier les articles les plus chers. <text:span text:style-name="T164">Est-ce un algorithme glouton ? </text:span><text:span text:style-name="T164"><draw:control text:anchor-type="as-char" draw:z-index="82" draw:name="Contrôle 76" draw:style-name="gr1" draw:text-style-name="P200" svg:width="1.641cm" svg:height="0.701cm" draw:control="control74"/></text:span><text:span text:style-name="T164"><text:line-break/></text:span>Que<text:span text:style-name="T164">ls articles</text:span> prenez-vous ? <draw:control text:anchor-type="as-char" draw:z-index="83" draw:name="Contrôle 77" draw:style-name="gr1" draw:text-style-name="P200" svg:width="5.52cm" svg:height="0.701cm" draw:control="control75"/><text:s/>Quelle est la valeur du sac ? <draw:control text:anchor-type="as-char" draw:z-index="84" draw:name="Contrôle 72" draw:style-name="gr1" draw:text-style-name="P200" svg:width="1.641cm" svg:height="0.701cm" draw:control="control76"/></text:p>
      <text:p text:style-name="P103"/>
      <text:list text:continue-numbering="true" text:style-name="tfNum_20_a_29_">
        <text:list-item>
          <text:p text:style-name="P196"><text:span text:style-name="T114">Deuxième</text:span><text:span text:style-name="T159"> </text:span><text:span text:style-name="T115">essai</text:span><text:span text:style-name="T159"> :</text:span></text:p>
        </text:list-item>
      </text:list>
      <text:p text:style-name="P134"><text:span text:style-name="T159">Vous décidez de choisir en premier les articles </text:span><text:span text:style-name="T160">ayant le ratio</text:span><text:span text:style-name="T159"> « valeur/masse » </text:span><text:span text:style-name="T160">le plus avantageux</text:span><text:span text:style-name="T159">.</text:span></text:p>
      <text:p text:style-name="P162"><text:span text:style-name="T164">Est-ce un algorithme glouton ? </text:span><text:span text:style-name="T164"><draw:control text:anchor-type="as-char" draw:z-index="85" draw:name="Contrôle 78" draw:style-name="gr1" draw:text-style-name="P200" svg:width="1.641cm" svg:height="0.701cm" draw:control="control77"/></text:span><text:span text:style-name="T164"><text:s/></text:span>Que<text:span text:style-name="T164">ls articles</text:span> prenez-vous ? <draw:control text:anchor-type="as-char" draw:z-index="87" draw:name="Contrôle 79" draw:style-name="gr1" draw:text-style-name="P200" svg:width="7.481cm" svg:height="0.701cm" draw:control="control79"/><text:line-break/>Quelle est la valeur du sac ? <text:span text:style-name="T176"><draw:control text:anchor-type="as-char" draw:z-index="86" draw:name="Contrôle 73" draw:style-name="gr1" draw:text-style-name="P200" svg:width="1.641cm" svg:height="0.701cm" draw:control="control78"/></text:span></text:p>
      <text:p text:style-name="P105"/>
      <text:p text:style-name="P197"><text:span text:style-name="T167">Cod</text:span><text:span text:style-name="T168">e</text:span><text:span text:style-name="T53"> </text:span><text:span text:style-name="T34">(à compléter) </text:span></text:p>
      <text:p text:style-name="P147">def sac_à_dos_glouton(masse_max, liste_articles):</text:p>
      <text:p text:style-name="P147"><text:s text:c="4"/>articles = sorted(liste_articles, reverse = True)</text:p>
      <text:p text:style-name="P164"><text:s text:c="4"/>contenu_sac_à_dos = <draw:control text:anchor-type="as-char" draw:z-index="77" draw:name="Contrôle 69" draw:style-name="gr1" draw:text-style-name="P199" svg:width="1.669cm" svg:height="0.6cm" draw:control="control69"/></text:p>
      <text:p text:style-name="P164"><text:s text:c="4"/>valeur_totale = <draw:control text:anchor-type="as-char" draw:z-index="78" draw:name="Contrôle 70" draw:style-name="gr1" draw:text-style-name="P199" svg:width="1.669cm" svg:height="0.6cm" draw:control="control70"/></text:p>
      <text:p text:style-name="P164"><text:s text:c="4"/>masse_totale = <draw:control text:anchor-type="as-char" draw:z-index="79" draw:name="Contrôle 71" draw:style-name="gr1" draw:text-style-name="P199" svg:width="1.669cm" svg:height="0.6cm" draw:control="control71"/></text:p>
      <text:p text:style-name="P68"><text:s text:c="4"/>for article in articles:</text:p>
      <text:p text:style-name="P69"><text:s text:c="8"/><draw:control text:anchor-type="as-char" draw:z-index="73" draw:name="Contrôle 65" draw:style-name="gr1" draw:text-style-name="P199" svg:width="9.961cm" svg:height="0.701cm" draw:control="control65"/></text:p>
      <text:p text:style-name="P69"><text:s text:c="12"/><draw:control text:anchor-type="as-char" draw:z-index="74" draw:name="Contrôle 66" draw:style-name="gr1" draw:text-style-name="P199" svg:width="9.961cm" svg:height="0.701cm" draw:control="control66"/></text:p>
      <text:p text:style-name="P69"><text:s text:c="12"/><draw:control text:anchor-type="as-char" draw:z-index="75" draw:name="Contrôle 67" draw:style-name="gr1" draw:text-style-name="P199" svg:width="9.961cm" svg:height="0.701cm" draw:control="control67"/></text:p>
      <text:p text:style-name="P69"><text:s text:c="12"/><draw:control text:anchor-type="as-char" draw:z-index="76" draw:name="Contrôle 68" draw:style-name="gr1" draw:text-style-name="P199" svg:width="9.961cm" svg:height="0.701cm" draw:control="control68"/></text:p>
      <text:p text:style-name="P68"><text:s text:c="4"/>return contenu_sac_à_dos, valeur_totale, masse_totale</text:p>
      <text:p text:style-name="P147"/>
      <text:p text:style-name="P147">liste_articles = [[0.024, 2.4, 100, "Chips bio"],</text:p>
      <text:p text:style-name="P147"><text:s text:c="18"/>[0.015, 4.55, 300, "Pistaches"],</text:p>
      <text:p text:style-name="P147"><text:s text:c="18"/>[0.013, 1.3, 100, "Curly"],</text:p>
      <text:p text:style-name="P147"><text:s text:c="18"/>[0.038, 3.8, 100, "Noix de pécan"],</text:p>
      <text:p text:style-name="P147"><text:s text:c="18"/>[0.021, 6.25, 300, "Saucisson"]]</text:p>
      <text:p text:style-name="P147">assert sac_à_dos_glouton(600, liste_articles) == (['Noix de pécan', 'Chips bio', 'Saucisson', 'Curly'], 13.75, 600)</text:p>
      <text:p text:style-name="P104"/>
      <text:list text:continue-numbering="true" text:style-name="tfNum_20_a_29_">
        <text:list-item>
          <text:p text:style-name="P198"><text:span text:style-name="T116">Conclusion</text:span><text:span text:style-name="T164"> :</text:span></text:p>
        </text:list-item>
      </text:list>
      <text:p text:style-name="P163"><text:span text:style-name="T164">Si on fait abstraction de la contrainte des </text:span><text:span text:style-name="T166">6</text:span><text:span text:style-name="T164">00 g, combien y a-t-il de façon de remplir le sac </text:span><text:span text:style-name="T169">avec 5 articles</text:span><text:span text:style-name="T164"> ?</text:span><text:span text:style-name="T164"><draw:control text:anchor-type="as-char" draw:z-index="80" draw:name="Contrôle 74" draw:style-name="gr1" draw:text-style-name="P200" svg:width="1.355cm" svg:height="0.6cm" draw:control="control72"/></text:span></text:p>
      <text:p text:style-name="P136">Même question avec 15 articles ? <draw:control text:anchor-type="as-char" draw:z-index="81" draw:name="Contrôle 75" draw:style-name="gr1" draw:text-style-name="P200" svg:width="1.355cm" svg:height="0.6cm" draw:control="control73"/></text:p>
      <text:p text:style-name="P135">On voit que l’étude de toutes les solutions est de complexité <text:span text:style-name="T179">factor</text:span>ielle alors que la complexité de l’algorithme glouton (au tri de la liste des articles près) est linéaire.</text:p>
      <text:p text:style-name="P135">Pour approfondir la question : <text:a xlink:type="simple" xlink:href="https://interstices.info/le-probleme-du-sac-a-dos/" text:style-name="Internet_20_link" text:visited-style-name="Visited_20_Internet_20_Link">https://interstices.info/le-probleme-du-sac-a-do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4"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201cm" fo:margin-right="0.201cm" style:vertical-pos="middle" style:vertical-rel="tex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24.2.7.2$Linux_X86_64 LibreOffice_project/420$Build-2</meta:generator>
    <dc:date>2026-05-05T00:19:04.906732035</dc:date>
    <meta:editing-duration>P2DT46M34S</meta:editing-duration>
    <meta:editing-cycles>233</meta:editing-cycles>
    <meta:document-statistic meta:table-count="11" meta:image-count="3" meta:object-count="1" meta:page-count="13" meta:paragraph-count="632" meta:word-count="3033" meta:character-count="17095" meta:non-whitespace-character-count="14068"/>
  </office:meta>
</office:document-meta>
</file>

<file path=Object 1/content.xml><?xml version="1.0" encoding="utf-8"?>
<math xmlns="http://www.w3.org/1998/Math/MathML" display="block">
  <semantics>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annotation encoding="StarMath 5.0"> sqrt{{{{({{x}_{1}}-{{x}_{2}})}^{2}}+{{({{y}_{1}}-{{y}_{2}})}^{2}}}}%%&lt;cmathArbre&gt;«sqrt­«{}­«+­«^­«()­«-­«_­x­1»­«_­x­2»»»­2»­«^­«()­«-­«_­y­1»­«_­y­2»»»­2»»»»&lt;/cmathArbre&gt;&lt;cmathFormule&gt;√{(x_1-x_2)^2+(y_1-y_2)^2}&lt;/cmathFormule&gt;</annotation>
  </semantics>
</math>
</file>