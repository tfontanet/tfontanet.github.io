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7000000D6F9BAEF8A.png" manifest:media-type="image/png"/>
  <manifest:file-entry manifest:full-path="Pictures/10000001000003D50000017C54C477C6.png" manifest:media-type="image/png"/>
  <manifest:file-entry manifest:full-path="Pictures/10000001000002FA0000016FDC50313E.png" manifest:media-type="image/png"/>
  <manifest:file-entry manifest:full-path="Pictures/10000001000003FB00000173033B4A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-hatch-name="hatch"/>
      <style:paragraph-properties fo:margin-top="0.101cm" fo:margin-bottom="0.801cm" style:contextual-spacing="false" fo:padding="0.049cm" fo:border-left="none" fo:border-right="none" fo:border-top="none" fo:border-bottom="0.74pt solid #000000"/>
      <style:text-properties officeooo:paragraph-rsid="0027c6ca"/>
    </style:style>
    <style:style style:name="P2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2cf0d4"/>
    </style:style>
    <style:style style:name="P3" style:family="paragraph" style:parent-style-name="Standard" style:list-style-name="Numbering_20_123">
      <loext:graphic-properties draw:fill-gradient-name="gradient" draw:fill-hatch-name="hatch"/>
      <style:paragraph-properties fo:margin-top="0cm" fo:margin-bottom="0.4cm" style:contextual-spacing="false" fo:line-height="115%"/>
      <style:text-properties officeooo:rsid="001fe375" officeooo:paragraph-rsid="002cf0d4"/>
    </style:style>
    <style:style style:name="P4" style:family="paragraph" style:parent-style-name="Standard" style:list-style-name="Numbering_20_123">
      <loext:graphic-properties draw:fill-gradient-name="gradient" draw:fill-hatch-name="hatch"/>
      <style:paragraph-properties fo:margin-top="0cm" fo:margin-bottom="0.4cm" style:contextual-spacing="false" fo:line-height="115%"/>
      <style:text-properties officeooo:rsid="001fe375" officeooo:paragraph-rsid="002fbcb7"/>
    </style:style>
    <style:style style:name="P5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33663e"/>
    </style:style>
    <style:style style:name="P6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245865" officeooo:paragraph-rsid="00255cd1"/>
    </style:style>
    <style:style style:name="P7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34ec75" officeooo:paragraph-rsid="0034ec75"/>
    </style:style>
    <style:style style:name="P8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36ccfb" officeooo:paragraph-rsid="0036ccfb"/>
    </style:style>
    <style:style style:name="P9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 fo:text-align="start" style:justify-single-word="false"/>
      <style:text-properties officeooo:rsid="0036ccfb" officeooo:paragraph-rsid="0036ccfb"/>
    </style:style>
    <style:style style:name="P10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3a0726" officeooo:paragraph-rsid="003a0726"/>
    </style:style>
    <style:style style:name="P11" style:family="paragraph">
      <loext:graphic-properties draw:fill="none"/>
    </style:style>
    <style:style style:name="T1" style:family="text">
      <style:text-properties officeooo:rsid="00216477"/>
    </style:style>
    <style:style style:name="T2" style:family="text">
      <style:text-properties officeooo:rsid="00255cd1"/>
    </style:style>
    <style:style style:name="T3" style:family="text">
      <style:text-properties officeooo:rsid="0029aa51"/>
    </style:style>
    <style:style style:name="T4" style:family="text">
      <style:text-properties officeooo:rsid="002ae642"/>
    </style:style>
    <style:style style:name="T5" style:family="text">
      <style:text-properties officeooo:rsid="002dcb2e"/>
    </style:style>
    <style:style style:name="T6" style:family="text">
      <style:text-properties officeooo:rsid="002fbcb7"/>
    </style:style>
    <style:style style:name="T7" style:family="text">
      <style:text-properties officeooo:rsid="0031e9e6"/>
    </style:style>
    <style:style style:name="T8" style:family="text">
      <style:text-properties officeooo:rsid="0033663e"/>
    </style:style>
    <style:style style:name="T9" style:family="text">
      <style:text-properties officeooo:rsid="0034ec75"/>
    </style:style>
    <style:style style:name="T10" style:family="text">
      <style:text-properties officeooo:rsid="0035b612"/>
    </style:style>
    <style:style style:name="T11" style:family="text">
      <style:text-properties officeooo:rsid="003a0726"/>
    </style:style>
    <style:style style:name="T12" style:family="text">
      <style:text-properties officeooo:rsid="003bb1a3"/>
    </style:style>
    <style:style style:name="T13" style:family="text">
      <style:text-properties fo:font-weight="bold" officeooo:rsid="002dcb2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7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97cm" fo:min-width="4.11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8cm" fo:min-width="2.29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5" draw:name="Forme 7" draw:style-name="gr1" draw:text-style-name="P11" svg:width="2.054cm" svg:height="0.84cm" svg:x="16.286cm" svg:y="6.1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name="Forme 4" draw:style-name="gr2" draw:text-style-name="P11" svg:width="2.008cm" svg:height="0.84cm" svg:x="15.612cm" svg:y="20.85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Forme 3" draw:style-name="gr3" draw:text-style-name="P11" svg:width="1.989cm" svg:height="0.84cm" svg:x="16.182cm" svg:y="9.88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Forme 2" draw:style-name="gr4" draw:text-style-name="P11" svg:width="4.306cm" svg:height="0.992cm" svg:x="2.03cm" svg:y="9.84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Forme 1" draw:style-name="gr5" draw:text-style-name="P11" svg:width="2.378cm" svg:height="0.84cm" svg:x="1.998cm" svg:y="6.15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" text:outline-level="1">Installer <text:span text:style-name="T5">la machine virtuelle</text:span> Linux sur votre chromebook</text:h>
      <text:list text:style-name="Numbering_20_123">
        <text:list-item>
          <text:p text:style-name="P2"><text:span text:style-name="T13">Chez vous</text:span><text:span text:style-name="T5">, avec</text:span> une bonne connexion <text:span text:style-name="T2">Wifi, </text:span><text:span text:style-name="T5">télécharger le fichier « .zst » dont vous avez eu le lien.<text:line-break/></text:span><text:span text:style-name="T7">Bien </text:span><text:span text:style-name="T8">identifi</text:span><text:span text:style-name="T7">er dans quel dossier </text:span><text:span text:style-name="T8">c</text:span><text:span text:style-name="T7">e fichier est téléchargé !</text:span></text:p>
        </text:list-item>
        <text:list-item>
          <text:p text:style-name="P3"><text:span text:style-name="T8">Puis, a</text:span>ller dans « Paramètres/<text:span text:style-name="T3">A propos de ChromeOS »</text:span> <text:line-break/>et « <text:span text:style-name="T6">C</text:span><text:span text:style-name="T3">onfigurer »</text:span> l’environnement de développement Linux.<text:line-break/><text:span text:style-name="T4"><draw:frame draw:style-name="fr1" draw:name="Image1" text:anchor-type="as-char" svg:width="17.173cm" svg:height="6.278cm" draw:z-index="0"><draw:image xlink:href="Pictures/10000001000003FB00000173033B4A34.png" xlink:type="simple" xlink:show="embed" xlink:actuate="onLoad" draw:mime-type="image/png"/></draw:frame></text:span></text:p>
        </text:list-item>
        <text:list-item>
          <text:p text:style-name="P4"><text:span text:style-name="T4">Cliquer sur « </text:span><text:span text:style-name="T8">Suivant</text:span><text:span text:style-name="T4"> », puis </text:span><text:span text:style-name="T8">choisir « nsi » comme</text:span><text:span text:style-name="T1"> nom d’utilisateur,</text:span><text:span text:style-name="T8"> laisser</text:span><text:span text:style-name="T1"> la taille disque recommandée, </text:span><text:span text:style-name="T8">puis</text:span><text:span text:style-name="T1"> cliquer sur « Installer ».</text:span><text:line-break/><draw:frame draw:style-name="fr1" draw:name="Image2" text:anchor-type="as-char" svg:width="17.207cm" svg:height="8.931cm" draw:z-index="6"><draw:image xlink:href="Pictures/10000001000002FA0000016FDC50313E.png" xlink:type="simple" xlink:show="embed" xlink:actuate="onLoad" draw:mime-type="image/png"/></draw:frame></text:p>
        </text:list-item>
        <text:list-item>
          <text:p text:style-name="P7">Attendre que la fenêtre du terminal s’ouvre et la fermer.</text:p>
        </text:list-item>
        <text:list-item>
          <text:p text:style-name="P5"><text:soft-page-break/><text:span text:style-name="T4">Cliquer sur « </text:span><text:span text:style-name="T6">E</text:span>nvironnement de développement Linux/<text:span text:style-name="T6">Sauvegarde et restauration</text:span><text:span text:style-name="T4"> », puis </text:span><text:span text:style-name="T1">« </text:span><text:span text:style-name="T9">Restaur</text:span><text:span text:style-name="T1">er »<text:line-break/></text:span><text:span text:style-name="T1"><draw:frame draw:style-name="fr1" draw:name="Image3" text:anchor-type="as-char" svg:width="17.399cm" svg:height="6.761cm" draw:z-index="7"><draw:image xlink:href="Pictures/10000001000003D50000017C54C477C6.png" xlink:type="simple" xlink:show="embed" xlink:actuate="onLoad" draw:mime-type="image/png"/></draw:frame></text:span></text:p>
        </text:list-item>
        <text:list-item>
          <text:p text:style-name="P6"><text:span text:style-name="T10">Sélectionner le fichier « .zst » téléchargé précédemment et cliquer sur « Ouvrir ».</text:span></text:p>
        </text:list-item>
        <text:list-item>
          <text:p text:style-name="P9">Attendre le message « Restauration terminée » en bas à droite de l’écran (Ne pas trop tenir compte du temps restant indiqué qui est <text:span text:style-name="T12">souvent </text:span>assez fantaisiste).<text:line-break/><draw:frame draw:style-name="fr1" draw:name="Image4" text:anchor-type="as-char" svg:width="10.095cm" svg:height="3.944cm" draw:z-index="8"><draw:image xlink:href="Pictures/1000000000000227000000D6F9BAEF8A.png" xlink:type="simple" xlink:show="embed" xlink:actuate="onLoad" draw:mime-type="image/png"/></draw:frame></text:p>
        </text:list-item>
        <text:list-item>
          <text:p text:style-name="P10">Redémarrer l’ordinateur</text:p>
        </text:list-item>
        <text:list-item>
          <text:p text:style-name="P8">Lancer le terminal <text:span text:style-name="T11">et vérifier par exemple que l’on peut lancer thonny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 fo:padding="0cm" fo:border="0.74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1:14:40.369792912</meta:creation-date>
    <dc:date>2026-06-07T21:25:53.007548216</dc:date>
    <meta:editing-duration>PT2H55M58S</meta:editing-duration>
    <meta:editing-cycles>23</meta:editing-cycles>
    <meta:generator>LibreOffice/24.2.7.2$Linux_X86_64 LibreOffice_project/420$Build-2</meta:generator>
    <meta:document-statistic meta:table-count="0" meta:image-count="4" meta:object-count="0" meta:page-count="2" meta:paragraph-count="10" meta:word-count="166" meta:character-count="984" meta:non-whitespace-character-count="832"/>
  </office:meta>
</office:document-meta>
</file>